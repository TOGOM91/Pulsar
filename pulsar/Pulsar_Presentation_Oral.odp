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960000006DA72FBD4DF.png"/>
  <manifest:file-entry manifest:media-type="image/png" manifest:full-path="Pictures/1000020100000960000007085420D367.png"/>
  <manifest:file-entry manifest:media-type="image/png" manifest:full-path="Pictures/100002010000096000000C8072C9976B.png"/>
  <manifest:file-entry manifest:media-type="image/png" manifest:full-path="Pictures/100000000000096000000708F0843942.png"/>
  <manifest:file-entry manifest:media-type="image/png" manifest:full-path="Pictures/100002010000096000000D201C0A9194.png"/>
  <manifest:file-entry manifest:media-type="" manifest:full-path="Pictures/TablePreview1.svm"/>
  <manifest:file-entry manifest:media-type="image/png" manifest:full-path="Pictures/1000020100000960000006A4278DD498.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solid" draw:fill-color="#0f172a"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standard">
      <style:graphic-properties draw:stroke="solid" svg:stroke-width="0.035cm" svg:stroke-color="#7c3aed" draw:fill="solid" draw:fill-color="#7c3aed" draw:auto-grow-height="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middle" draw:auto-grow-height="false" fo:min-height="0cm" fo:min-width="0cm" fo:padding-top="0cm" fo:padding-bottom="0cm" fo:padding-left="0cm" fo:padding-right="0cm" fo:wrap-option="wrap"/>
    </style:style>
    <style:style style:name="gr3" style:family="graphic" style:parent-style-name="standard">
      <style:graphic-properties draw:stroke="solid" svg:stroke-width="0.035cm" svg:stroke-color="#ede9fe" draw:fill="solid" draw:fill-color="#1e293b" draw:auto-grow-height="false" fo:min-height="0cm" fo:min-width="0cm" fo:padding-top="0.125cm" fo:padding-bottom="0.125cm" fo:padding-left="0.25cm" fo:padding-right="0.25cm" fo:wrap-option="wrap"/>
    </style:style>
    <style:style style:name="gr4" style:family="graphic" style:parent-style-name="standard">
      <style:graphic-properties draw:stroke="solid" svg:stroke-width="0.035cm" svg:stroke-color="#7c3aed" draw:fill="solid" draw:fill-color="#7c3aed" draw:opacity="15%" draw:auto-grow-height="false" fo:min-height="0cm" fo:min-width="0cm" fo:padding-top="0.125cm" fo:padding-bottom="0.125cm" fo:padding-left="0.25cm" fo:padding-right="0.25cm" fo:wrap-option="wrap"/>
    </style:style>
    <style:style style:name="gr5" style:family="graphic">
      <style:graphic-properties style:protect="size"/>
    </style:style>
    <style:style style:name="gr6" style:family="graphic" style:parent-style-name="standard">
      <style:graphic-properties draw:stroke="solid" svg:stroke-width="0.053cm" svg:stroke-color="#ef4444" draw:fill="solid" draw:fill-color="#fff1f2"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106cm" svg:stroke-color="#7c3aed" draw:fill="none" draw:textarea-horizontal-align="center" draw:textarea-vertical-align="middle" draw:auto-grow-height="false" fo:padding-top="0.125cm" fo:padding-bottom="0.125cm" fo:padding-left="0.25cm" fo:padding-right="0.25cm" fo:wrap-option="wrap"/>
    </style:style>
    <style:style style:name="gr8" style:family="graphic" style:parent-style-name="standard">
      <style:graphic-properties draw:stroke="solid" svg:stroke-width="0.053cm" svg:stroke-color="#10b981" draw:fill="solid" draw:fill-color="#f0fdf4" draw:auto-grow-height="false" fo:min-height="0cm" fo:min-width="0cm" fo:padding-top="0.125cm" fo:padding-bottom="0.125cm" fo:padding-left="0.25cm" fo:padding-right="0.25cm" fo:wrap-option="wrap"/>
    </style:style>
    <style:style style:name="gr9" style:family="graphic" style:parent-style-name="standard">
      <style:graphic-properties draw:stroke="solid" svg:stroke-width="0.035cm" svg:stroke-color="#ede9fe" draw:fill="solid" draw:fill-color="#ede9fe" draw:auto-grow-height="false" fo:min-height="0cm" fo:min-width="0cm" fo:padding-top="0.125cm" fo:padding-bottom="0.125cm" fo:padding-left="0.25cm" fo:padding-right="0.25cm" fo:wrap-option="wrap"/>
    </style:style>
    <style:style style:name="gr10" style:family="graphic" style:parent-style-name="standard">
      <style:graphic-properties draw:stroke="solid" svg:stroke-width="0.035cm" svg:stroke-color="#10b981" draw:fill="solid" draw:fill-color="#10b981" draw:auto-grow-height="false" fo:min-height="0cm" fo:min-width="0cm" fo:padding-top="0.125cm" fo:padding-bottom="0.125cm" fo:padding-left="0.25cm" fo:padding-right="0.25cm" fo:wrap-option="wrap"/>
    </style:style>
    <style:style style:name="gr11" style:family="graphic" style:parent-style-name="standard">
      <style:graphic-properties draw:stroke="solid" svg:stroke-width="0.035cm" svg:stroke-color="#3b82f6" draw:fill="solid" draw:fill-color="#3b82f6" draw:auto-grow-height="false" fo:min-height="0cm" fo:min-width="0cm" fo:padding-top="0.125cm" fo:padding-bottom="0.125cm" fo:padding-left="0.25cm" fo:padding-right="0.25cm" fo:wrap-option="wrap"/>
    </style:style>
    <style:style style:name="gr12" style:family="graphic" style:parent-style-name="standard">
      <style:graphic-properties draw:stroke="solid" svg:stroke-width="0.053cm" svg:stroke-color="#7c3aed" draw:fill="solid" draw:fill-color="#ede9fe" draw:auto-grow-height="false" fo:min-height="0cm" fo:min-width="0cm" fo:padding-top="0.125cm" fo:padding-bottom="0.125cm" fo:padding-left="0.25cm" fo:padding-right="0.25cm" fo:wrap-option="wrap"/>
    </style:style>
    <style:style style:name="gr13" style:family="graphic" style:parent-style-name="standard">
      <style:graphic-properties draw:stroke="solid" svg:stroke-width="0.053cm" svg:stroke-color="#ec4899" draw:fill="solid" draw:fill-color="#ffffff" draw:auto-grow-height="false" fo:min-height="0cm" fo:min-width="0cm" fo:padding-top="0.125cm" fo:padding-bottom="0.125cm" fo:padding-left="0.25cm" fo:padding-right="0.25cm" fo:wrap-option="wrap"/>
    </style:style>
    <style:style style:name="gr14" style:family="graphic" style:parent-style-name="standard">
      <style:graphic-properties draw:stroke="solid" svg:stroke-width="0.035cm" svg:stroke-color="#ec4899" draw:fill="solid" draw:fill-color="#ec4899" draw:auto-grow-height="false" fo:min-height="0cm" fo:min-width="0cm" fo:padding-top="0.125cm" fo:padding-bottom="0.125cm" fo:padding-left="0.25cm" fo:padding-right="0.25cm" fo:wrap-option="wrap"/>
    </style:style>
    <style:style style:name="gr15" style:family="graphic" style:parent-style-name="standard">
      <style:graphic-properties draw:stroke="solid" svg:stroke-width="0.053cm" svg:stroke-color="#3b82f6" draw:fill="solid" draw:fill-color="#ffffff" draw:auto-grow-height="false" fo:min-height="0cm" fo:min-width="0cm" fo:padding-top="0.125cm" fo:padding-bottom="0.125cm" fo:padding-left="0.25cm" fo:padding-right="0.25cm" fo:wrap-option="wrap"/>
    </style:style>
    <style:style style:name="gr16" style:family="graphic" style:parent-style-name="standard">
      <style:graphic-properties draw:stroke="solid" svg:stroke-width="0.053cm" svg:stroke-color="#10b981" draw:fill="solid" draw:fill-color="#ffffff" draw:auto-grow-height="false" fo:min-height="0cm" fo:min-width="0cm" fo:padding-top="0.125cm" fo:padding-bottom="0.125cm" fo:padding-left="0.25cm" fo:padding-right="0.25cm" fo:wrap-option="wrap"/>
    </style:style>
    <style:style style:name="gr17" style:family="graphic" style:parent-style-name="Objet_20_sans_20_remplissage_20_ni_20_lig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8" style:family="graphic" style:parent-style-name="standard">
      <style:graphic-properties draw:stroke="solid" svg:stroke-width="0.053cm" svg:stroke-color="#7c3aed" draw:fill="solid" draw:fill-color="#ffffff" draw:auto-grow-height="false" fo:min-height="0cm" fo:min-width="0cm" fo:padding-top="0.125cm" fo:padding-bottom="0.125cm" fo:padding-left="0.25cm" fo:padding-right="0.25cm" fo:wrap-option="wrap"/>
    </style:style>
    <style:style style:name="gr19" style:family="graphic" style:parent-style-name="standard">
      <style:graphic-properties draw:stroke="solid" svg:stroke-width="0.053cm" svg:stroke-color="#f59e0b" draw:fill="solid" draw:fill-color="#ffffff" draw:auto-grow-height="false" fo:min-height="0cm" fo:min-width="0cm" fo:padding-top="0.125cm" fo:padding-bottom="0.125cm" fo:padding-left="0.25cm" fo:padding-right="0.25cm" fo:wrap-option="wrap"/>
    </style:style>
    <style:style style:name="gr20" style:family="graphic" style:parent-style-name="standard">
      <style:graphic-properties draw:stroke="solid" svg:stroke-width="0.035cm" svg:stroke-color="#f59e0b" draw:fill="solid" draw:fill-color="#f59e0b" draw:auto-grow-height="false" fo:min-height="0cm" fo:min-width="0cm" fo:padding-top="0.125cm" fo:padding-bottom="0.125cm" fo:padding-left="0.25cm" fo:padding-right="0.25cm" fo:wrap-option="wrap"/>
    </style:style>
    <style:style style:name="gr21" style:family="graphic" style:parent-style-name="standard">
      <style:graphic-properties draw:stroke="solid" svg:stroke-width="0.053cm" svg:stroke-color="#10b981" draw:fill="solid" draw:fill-color="#d1fae5" draw:auto-grow-height="false" fo:min-height="0cm" fo:min-width="0cm" fo:padding-top="0.125cm" fo:padding-bottom="0.125cm" fo:padding-left="0.25cm" fo:padding-right="0.25cm" fo:wrap-option="wrap"/>
    </style:style>
    <style:style style:name="gr22" style:family="graphic" style:parent-style-name="standard">
      <style:graphic-properties draw:stroke="solid" svg:stroke-width="0.035cm" svg:stroke-color="#10b981" draw:fill="solid" draw:fill-color="#10b981" draw:opacity="15%" draw:auto-grow-height="false" fo:min-height="0cm" fo:min-width="0cm" fo:padding-top="0.125cm" fo:padding-bottom="0.125cm" fo:padding-left="0.25cm" fo:padding-right="0.25cm" fo:wrap-option="wrap"/>
    </style:style>
    <style:style style:name="gr23" style:family="graphic" style:parent-style-name="standard">
      <style:graphic-properties draw:stroke="solid" svg:stroke-width="0.035cm" svg:stroke-color="#3b82f6" draw:fill="solid" draw:fill-color="#3b82f6" draw:opacity="15%" draw:auto-grow-height="false" fo:min-height="0cm" fo:min-width="0cm" fo:padding-top="0.125cm" fo:padding-bottom="0.125cm" fo:padding-left="0.25cm" fo:padding-right="0.25cm" fo:wrap-option="wrap"/>
    </style:style>
    <style:style style:name="gr24" style:family="graphic" style:parent-style-name="standard">
      <style:graphic-properties draw:stroke="solid" svg:stroke-width="0.035cm" svg:stroke-color="#f59e0b" draw:fill="solid" draw:fill-color="#f59e0b" draw:opacity="15%" draw:auto-grow-height="false" fo:min-height="0cm" fo:min-width="0cm" fo:padding-top="0.125cm" fo:padding-bottom="0.125cm" fo:padding-left="0.25cm" fo:padding-right="0.25cm" fo:wrap-option="wrap"/>
    </style:style>
    <style:style style:name="gr25" style:family="graphic" style:parent-style-name="standard">
      <style:graphic-properties draw:stroke="solid" svg:stroke-width="0.035cm" svg:stroke-color="#ec4899" draw:fill="solid" draw:fill-color="#ec4899" draw:opacity="15%" draw:auto-grow-height="false" fo:min-height="0cm" fo:min-width="0cm" fo:padding-top="0.125cm" fo:padding-bottom="0.125cm" fo:padding-left="0.25cm" fo:padding-right="0.25cm" fo:wrap-option="wrap"/>
    </style:style>
    <style:style style:name="gr26" style:family="graphic" style:parent-style-name="standard">
      <style:graphic-properties draw:stroke="solid" svg:stroke-width="0.053cm" svg:stroke-color="#6366f1" draw:fill="solid" draw:fill-color="#ffffff" draw:auto-grow-height="false" fo:min-height="0cm" fo:min-width="0cm" fo:padding-top="0.125cm" fo:padding-bottom="0.125cm" fo:padding-left="0.25cm" fo:padding-right="0.25cm" fo:wrap-option="wrap"/>
    </style:style>
    <style:style style:name="gr27" style:family="graphic" style:parent-style-name="standard">
      <style:graphic-properties draw:stroke="solid" svg:stroke-width="0.035cm" svg:stroke-color="#6366f1" draw:fill="solid" draw:fill-color="#6366f1" draw:opacity="15%" draw:auto-grow-height="false" fo:min-height="0cm" fo:min-width="0cm" fo:padding-top="0.125cm" fo:padding-bottom="0.125cm" fo:padding-left="0.25cm" fo:padding-right="0.25cm" fo:wrap-option="wrap"/>
    </style:style>
    <style:style style:name="gr28" style:family="graphic" style:parent-style-name="standard">
      <style:graphic-properties draw:stroke="solid" svg:stroke-width="0.035cm" svg:stroke-color="#10b981" draw:fill="solid" draw:fill-color="#1e293b" draw:auto-grow-height="false" fo:min-height="0cm" fo:min-width="0cm" fo:padding-top="0.125cm" fo:padding-bottom="0.125cm" fo:padding-left="0.25cm" fo:padding-right="0.25cm" fo:wrap-option="wrap"/>
    </style:style>
    <style:style style:name="pr1" style:family="presentation" style:parent-style-name="Standard-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 style:family="presentation" style:parent-style-name="Standard-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co1" style:family="table-column">
      <style:table-column-properties style:column-width="5.277cm" style:use-optimal-column-width="false"/>
    </style:style>
    <style:style style:name="co2" style:family="table-column">
      <style:table-column-properties style:column-width="6.031cm" style:use-optimal-column-width="false"/>
    </style:style>
    <style:style style:name="co3" style:family="table-column">
      <style:table-column-properties style:column-width="6.028cm" style:use-optimal-column-width="false"/>
    </style:style>
    <style:style style:name="ro1" style:family="table-row">
      <style:table-row-properties style:row-height="1.32cm"/>
    </style:style>
    <style:style style:name="ro2" style:family="table-row">
      <style:table-row-properties style:row-height="1.323cm"/>
    </style:style>
    <style:style style:name="ce1" style:family="table-cell">
      <style:graphic-properties draw:fill="solid" draw:fill-color="#7c3aed" style:repeat="repeat" draw:textarea-vertical-align="top" fo:padding-top="0.127cm" fo:padding-bottom="0.127cm" fo:padding-left="0.254cm" fo:padding-right="0.254cm"/>
      <style:paragraph-properties fo:margin-left="0cm" fo:margin-right="0cm" fo:margin-top="0cm" fo:margin-bottom="0cm" fo:text-align="start" fo:text-indent="0cm" style:border-line-width="0.004cm 0cm 0.004cm" fo:border="0.004cm solid #e2e8f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 style:family="table-cell">
      <style:graphic-properties draw:fill="solid" draw:fill-color="#7c3aed" style:repeat="repeat" draw:textarea-vertical-align="top" fo:padding-top="0.127cm" fo:padding-bottom="0.127cm" fo:padding-left="0.254cm" fo:padding-right="0.254cm"/>
      <style:paragraph-properties fo:margin-left="0cm" fo:margin-right="0cm" fo:margin-top="0cm" fo:margin-bottom="0cm" fo:text-align="center" fo:text-indent="0cm" style:border-line-width="0.004cm 0cm 0.004cm" fo:border="0.004cm solid #e2e8f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 style:family="table-cell">
      <style:graphic-properties draw:fill="solid" draw:fill-color="#7c3aed" style:repeat="repeat" draw:textarea-vertical-align="top" fo:padding-top="0.127cm" fo:padding-bottom="0.127cm" fo:padding-left="0.254cm" fo:padding-right="0.254cm"/>
      <style:paragraph-properties fo:margin-left="0cm" fo:margin-right="0cm" fo:margin-top="0cm" fo:margin-bottom="0cm" fo:text-align="center" fo:text-indent="0cm" style:border-line-width="0.004cm 0cm 0.004cm" fo:border="0.004cm solid #e2e8f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 style:family="table-cell">
      <style:graphic-properties draw:fill="solid" draw:fill-color="#7c3aed" style:repeat="repeat" draw:textarea-vertical-align="top" fo:padding-top="0.127cm" fo:padding-bottom="0.127cm" fo:padding-left="0.254cm" fo:padding-right="0.254cm"/>
      <style:paragraph-properties fo:margin-left="0cm" fo:margin-right="0cm" fo:margin-top="0cm" fo:margin-bottom="0cm" fo:text-align="center" fo:text-indent="0cm" style:border-line-width="0.004cm 0cm 0.004cm" fo:border="0.004cm solid #e2e8f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 style:family="table-cell">
      <style:graphic-properties draw:fill="solid" draw:fill-color="#ffffff" style:repeat="repeat" draw:textarea-vertical-align="top" fo:padding-top="0.127cm" fo:padding-bottom="0.127cm" fo:padding-left="0.254cm" fo:padding-right="0.254cm"/>
      <style:paragraph-properties fo:margin-left="0cm" fo:margin-right="0cm" fo:margin-top="0cm" fo:margin-bottom="0cm" fo:text-align="start" fo:text-indent="0cm" style:border-line-width="0.004cm 0cm 0.004cm" fo:border="0.004cm solid #e2e8f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 style:family="table-cell">
      <style:graphic-properties draw:fill="solid" draw:fill-color="#ffffff" style:repeat="repeat" draw:textarea-vertical-align="top" fo:padding-top="0.127cm" fo:padding-bottom="0.127cm" fo:padding-left="0.254cm" fo:padding-right="0.254cm"/>
      <style:paragraph-properties fo:margin-left="0cm" fo:margin-right="0cm" fo:margin-top="0cm" fo:margin-bottom="0cm" fo:text-align="center" fo:text-indent="0cm" style:border-line-width="0.004cm 0cm 0.004cm" fo:border="0.004cm solid #e2e8f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 style:family="table-cell">
      <style:graphic-properties draw:fill="solid" draw:fill-color="#ffffff" style:repeat="repeat" draw:textarea-vertical-align="top" fo:padding-top="0.127cm" fo:padding-bottom="0.127cm" fo:padding-left="0.254cm" fo:padding-right="0.254cm"/>
      <style:paragraph-properties fo:margin-left="0cm" fo:margin-right="0cm" fo:margin-top="0cm" fo:margin-bottom="0cm" fo:text-align="center" fo:text-indent="0cm" style:border-line-width="0.004cm 0cm 0.004cm" fo:border="0.004cm solid #e2e8f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 style:family="table-cell">
      <style:graphic-properties draw:fill="solid" draw:fill-color="#ffffff" style:repeat="repeat" draw:textarea-vertical-align="top" fo:padding-top="0.127cm" fo:padding-bottom="0.127cm" fo:padding-left="0.254cm" fo:padding-right="0.254cm"/>
      <style:paragraph-properties fo:margin-left="0cm" fo:margin-right="0cm" fo:margin-top="0cm" fo:margin-bottom="0cm" fo:text-align="center" fo:text-indent="0cm" style:border-line-width="0.004cm 0cm 0.004cm" fo:border="0.004cm solid #e2e8f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 style:family="table-cell">
      <style:graphic-properties draw:fill="solid" draw:fill-color="#f8fafc" style:repeat="repeat" draw:textarea-vertical-align="top" fo:padding-top="0.127cm" fo:padding-bottom="0.127cm" fo:padding-left="0.254cm" fo:padding-right="0.254cm"/>
      <style:paragraph-properties fo:margin-left="0cm" fo:margin-right="0cm" fo:margin-top="0cm" fo:margin-bottom="0cm" fo:text-align="start" fo:text-indent="0cm" style:border-line-width="0.004cm 0cm 0.004cm" fo:border="0.004cm solid #e2e8f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 style:family="table-cell">
      <style:graphic-properties draw:fill="solid" draw:fill-color="#f8fafc" style:repeat="repeat" draw:textarea-vertical-align="top" fo:padding-top="0.127cm" fo:padding-bottom="0.127cm" fo:padding-left="0.254cm" fo:padding-right="0.254cm"/>
      <style:paragraph-properties fo:margin-left="0cm" fo:margin-right="0cm" fo:margin-top="0cm" fo:margin-bottom="0cm" fo:text-align="center" fo:text-indent="0cm" style:border-line-width="0.004cm 0cm 0.004cm" fo:border="0.004cm solid #e2e8f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 style:family="table-cell">
      <style:graphic-properties draw:fill="solid" draw:fill-color="#f8fafc" style:repeat="repeat" draw:textarea-vertical-align="top" fo:padding-top="0.127cm" fo:padding-bottom="0.127cm" fo:padding-left="0.254cm" fo:padding-right="0.254cm"/>
      <style:paragraph-properties fo:margin-left="0cm" fo:margin-right="0cm" fo:margin-top="0cm" fo:margin-bottom="0cm" fo:text-align="center" fo:text-indent="0cm" style:border-line-width="0.004cm 0cm 0.004cm" fo:border="0.004cm solid #e2e8f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 style:family="table-cell">
      <style:graphic-properties draw:fill="solid" draw:fill-color="#f8fafc" style:repeat="repeat" draw:textarea-vertical-align="top" fo:padding-top="0.127cm" fo:padding-bottom="0.127cm" fo:padding-left="0.254cm" fo:padding-right="0.254cm"/>
      <style:paragraph-properties fo:margin-left="0cm" fo:margin-right="0cm" fo:margin-top="0cm" fo:margin-bottom="0cm" fo:text-align="center" fo:text-indent="0cm" style:border-line-width="0.004cm 0cm 0.004cm" fo:border="0.004cm solid #e2e8f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 style:family="table-cell">
      <style:graphic-properties draw:fill="solid" draw:fill-color="#ffffff" style:repeat="repeat" draw:textarea-vertical-align="top" fo:padding-top="0.127cm" fo:padding-bottom="0.127cm" fo:padding-left="0.254cm" fo:padding-right="0.254cm"/>
      <style:paragraph-properties fo:margin-left="0cm" fo:margin-right="0cm" fo:margin-top="0cm" fo:margin-bottom="0cm" fo:text-align="start" fo:text-indent="0cm" style:border-line-width="0.004cm 0cm 0.004cm" fo:border="0.004cm solid #e2e8f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 style:family="table-cell">
      <style:graphic-properties draw:fill="solid" draw:fill-color="#ffffff" style:repeat="repeat" draw:textarea-vertical-align="top" fo:padding-top="0.127cm" fo:padding-bottom="0.127cm" fo:padding-left="0.254cm" fo:padding-right="0.254cm"/>
      <style:paragraph-properties fo:margin-left="0cm" fo:margin-right="0cm" fo:margin-top="0cm" fo:margin-bottom="0cm" fo:text-align="center" fo:text-indent="0cm" style:border-line-width="0.004cm 0cm 0.004cm" fo:border="0.004cm solid #e2e8f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 style:family="table-cell">
      <style:graphic-properties draw:fill="solid" draw:fill-color="#ffffff" style:repeat="repeat" draw:textarea-vertical-align="top" fo:padding-top="0.127cm" fo:padding-bottom="0.127cm" fo:padding-left="0.254cm" fo:padding-right="0.254cm"/>
      <style:paragraph-properties fo:margin-left="0cm" fo:margin-right="0cm" fo:margin-top="0cm" fo:margin-bottom="0cm" fo:text-align="center" fo:text-indent="0cm" style:border-line-width="0.004cm 0cm 0.004cm" fo:border="0.004cm solid #e2e8f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 style:family="table-cell">
      <style:graphic-properties draw:fill="solid" draw:fill-color="#ffffff" style:repeat="repeat" draw:textarea-vertical-align="top" fo:padding-top="0.127cm" fo:padding-bottom="0.127cm" fo:padding-left="0.254cm" fo:padding-right="0.254cm"/>
      <style:paragraph-properties fo:margin-left="0cm" fo:margin-right="0cm" fo:margin-top="0cm" fo:margin-bottom="0cm" fo:text-align="center" fo:text-indent="0cm" style:border-line-width="0.004cm 0cm 0.004cm" fo:border="0.004cm solid #e2e8f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 style:family="table-cell">
      <style:graphic-properties draw:fill="solid" draw:fill-color="#f8fafc" style:repeat="repeat" draw:textarea-vertical-align="top" fo:padding-top="0.127cm" fo:padding-bottom="0.127cm" fo:padding-left="0.254cm" fo:padding-right="0.254cm"/>
      <style:paragraph-properties fo:margin-left="0cm" fo:margin-right="0cm" fo:margin-top="0cm" fo:margin-bottom="0cm" fo:text-align="start" fo:text-indent="0cm" style:border-line-width="0.004cm 0cm 0.004cm" fo:border="0.004cm solid #e2e8f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 style:family="table-cell">
      <style:graphic-properties draw:fill="solid" draw:fill-color="#f8fafc" style:repeat="repeat" draw:textarea-vertical-align="top" fo:padding-top="0.127cm" fo:padding-bottom="0.127cm" fo:padding-left="0.254cm" fo:padding-right="0.254cm"/>
      <style:paragraph-properties fo:margin-left="0cm" fo:margin-right="0cm" fo:margin-top="0cm" fo:margin-bottom="0cm" fo:text-align="center" fo:text-indent="0cm" style:border-line-width="0.004cm 0cm 0.004cm" fo:border="0.004cm solid #e2e8f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 style:family="table-cell">
      <style:graphic-properties draw:fill="solid" draw:fill-color="#f8fafc" style:repeat="repeat" draw:textarea-vertical-align="top" fo:padding-top="0.127cm" fo:padding-bottom="0.127cm" fo:padding-left="0.254cm" fo:padding-right="0.254cm"/>
      <style:paragraph-properties fo:margin-left="0cm" fo:margin-right="0cm" fo:margin-top="0cm" fo:margin-bottom="0cm" fo:text-align="center" fo:text-indent="0cm" style:border-line-width="0.004cm 0cm 0.004cm" fo:border="0.004cm solid #e2e8f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 style:family="table-cell">
      <style:graphic-properties draw:fill="solid" draw:fill-color="#f8fafc" style:repeat="repeat" draw:textarea-vertical-align="top" fo:padding-top="0.127cm" fo:padding-bottom="0.127cm" fo:padding-left="0.254cm" fo:padding-right="0.254cm"/>
      <style:paragraph-properties fo:margin-left="0cm" fo:margin-right="0cm" fo:margin-top="0cm" fo:margin-bottom="0cm" fo:text-align="center" fo:text-indent="0cm" style:border-line-width="0.004cm 0cm 0.004cm" fo:border="0.004cm solid #e2e8f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P1" style:family="paragraph">
      <style:text-properties fo:font-size="18pt"/>
    </style:style>
    <style:style style:name="P2" style:family="paragraph">
      <style:paragraph-properties fo:margin-left="0cm" fo:margin-right="0cm" fo:margin-top="0cm" fo:margin-bottom="0cm" fo:text-align="start" fo:text-indent="0cm" style:punctuation-wrap="hanging" style:writing-mode="lr-tb"/>
      <style:text-properties fo:font-size="18pt" fo:hyphenate="false"/>
    </style:style>
    <style:style style:name="P3" style:family="paragraph">
      <style:paragraph-properties style:font-independent-line-spacing="true"/>
      <style:text-properties fo:font-size="18pt"/>
    </style:style>
    <style:style style:name="P4" style:family="paragraph">
      <style:paragraph-properties fo:margin-left="0cm" fo:margin-right="0cm" fo:margin-top="0cm" fo:margin-bottom="0cm" fo:text-align="center" fo:text-indent="0cm" style:punctuation-wrap="hanging" style:writing-mode="lr-tb"/>
      <style:text-properties fo:font-size="18pt" fo:hyphenate="false"/>
    </style:style>
    <style:style style:name="P5"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P6" style:family="paragraph">
      <style:paragraph-properties fo:text-align="end" style:font-independent-line-spacing="true"/>
      <style:text-properties fo:font-size="18pt" style:font-size-asian="14pt" style:font-size-complex="14pt"/>
    </style:style>
    <style:style style:name="P7" style:family="paragraph">
      <style:paragraph-properties fo:text-align="center"/>
      <style:text-properties fo:font-size="18pt"/>
    </style:style>
    <style:style style:name="P8" style:family="paragraph">
      <style:paragraph-properties fo:margin-left="0cm" fo:margin-right="0cm" fo:margin-top="0cm" fo:margin-bottom="0cm" fo:text-align="start" fo:text-indent="0cm" style:punctuation-wrap="hanging" style:writing-mode="lr-tb"/>
      <style:text-properties fo:hyphenate="false"/>
    </style:style>
    <style:style style:name="P9" style:family="paragraph">
      <style:paragraph-properties fo:margin-left="0cm" fo:margin-right="0cm" fo:margin-top="0cm" fo:margin-bottom="0cm" fo:text-align="center" fo:text-indent="0cm" style:punctuation-wrap="hanging" style:writing-mode="lr-tb"/>
      <style:text-properties fo:hyphenate="false"/>
    </style:style>
    <style:style style:name="T1" style:family="text">
      <style:text-properties fo:color="#000000" style:text-line-through-style="none" fo:font-family="Calibri" fo:font-size="72pt" fo:letter-spacing="normal" fo:font-style="normal" style:text-underline-style="none" fo:font-weight="bold" style:font-size-asian="72pt" style:font-style-asian="normal" style:font-weight-asian="bold" style:font-size-complex="72pt" style:font-style-complex="normal" style:font-weight-complex="bold"/>
    </style:style>
    <style:style style:name="T2" style:family="text">
      <style:text-properties fo:color="#0000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color="#000000" style:text-line-through-style="none" fo:font-family="Calibri"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5" style:family="text">
      <style:text-properties fo:color="#000000" style:text-line-through-style="none" fo:font-family="Calibri"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6" style:family="text">
      <style:text-properties fo:color="#000000" style:text-line-through-style="none" fo:font-family="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7" style:family="text">
      <style:text-properties fo:color="#000000" style:text-line-through-style="none" fo:font-family="Calibri"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T8"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9"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10" style:family="text">
      <style:text-properties fo:color="#000000" style:text-line-through-style="none" fo:font-family="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1" style:family="text">
      <style:text-properties fo:color="#000000" style:text-line-through-style="none" fo:font-family="Calibri" fo:font-size="15pt" fo:letter-spacing="normal" fo:font-style="normal" style:text-underline-style="none" fo:font-weight="bold" style:font-size-asian="15pt" style:font-style-asian="normal" style:font-weight-asian="bold" style:font-size-complex="15pt" style:font-style-complex="normal" style:font-weight-complex="bold"/>
    </style:style>
    <style:style style:name="T12" style:family="text">
      <style:text-properties fo:color="#000000"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3" style:family="text">
      <style:text-properties fo:color="#000000" style:text-line-through-style="none" fo:font-family="Calibri"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14" style:family="text">
      <style:text-properties fo:color="#000000" style:text-line-through-style="none" fo:font-family="Calibri"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15" style:family="text">
      <style:text-properties fo:color="#000000" style:text-line-through-style="none" fo:font-family="Calibri"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16" style:family="text">
      <style:text-properties fo:color="#000000" style:text-line-through-style="none" fo:font-family="Calibri" fo:font-size="10pt" fo:letter-spacing="normal" fo:font-style="italic" style:text-underline-style="none" fo:font-weight="normal" style:font-size-asian="10pt" style:font-style-asian="italic" style:font-weight-asian="normal" style:font-size-complex="10pt" style:font-style-complex="italic" style:font-weight-complex="normal"/>
    </style:style>
    <style:style style:name="T17" style:family="text">
      <style:text-properties fo:color="#000000" style:text-line-through-style="none" fo:font-family="Calibri"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8" style:family="text">
      <style:text-properties fo:color="#000000" style:text-line-through-style="none" fo:font-family="Calibri" fo:font-size="9.5pt" fo:letter-spacing="normal" fo:font-style="normal" style:text-underline-style="none" fo:font-weight="normal" style:font-size-asian="9.5pt" style:font-style-asian="normal" style:font-weight-asian="normal" style:font-size-complex="9.5pt" style:font-style-complex="normal" style:font-weight-complex="normal"/>
    </style:style>
    <style:style style:name="T19" style:family="text">
      <style:text-properties fo:color="#000000" style:text-line-through-style="none" fo:font-family="Calibri"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20" style:family="text">
      <style:text-properties fo:color="#000000"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1"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2" style:family="text">
      <style:text-properties fo:color="#000000" style:text-line-through-style="none" fo:font-family="Calibri" fo:font-size="30pt" fo:letter-spacing="normal" fo:font-style="normal" style:text-underline-style="none" fo:font-weight="bold" style:font-size-asian="30pt" style:font-style-asian="normal" style:font-weight-asian="bold" style:font-size-complex="30pt" style:font-style-complex="normal" style:font-weight-complex="bold"/>
    </style:style>
    <style:style style:name="T23" style:family="text">
      <style:text-properties fo:color="#000000" style:text-line-through-style="none" fo:font-family="Calibri" fo:font-size="22pt" fo:letter-spacing="normal" fo:font-style="normal" style:text-underline-style="none" fo:font-weight="bold" style:font-size-asian="22pt" style:font-style-asian="normal" style:font-weight-asian="bold" style:font-size-complex="22pt" style:font-style-complex="normal" style:font-weight-complex="bold"/>
    </style:style>
    <text:list-style style:name="L1">
      <text:list-level-style-number text:level="1" style:num-format="">
        <style:list-level-properties text:min-label-width="0.6cm"/>
        <style:text-properties fo:color="#7c3aed"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ec4899"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94a3b8"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ef4444"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f172a"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10b981"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65f46"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92400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991b1b"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334155"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3b82f6"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f59e0b"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6366f1"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 1" draw:style-name="dp1" draw:master-page-name="Standard">
        <draw:custom-shape draw:name="Shape 0" draw:style-name="gr1" draw:text-style-name="P1" draw:layer="layout" svg:width="0.304cm" svg:height="14.287cm" svg:x="0cm" svg:y="0cm">
          <text:p/>
          <draw:enhanced-geometry svg:viewBox="0 0 21600 21600" draw:type="rectangle" draw:enhanced-path="M 0 0 L 21600 0 21600 21600 0 21600 0 0 Z N"/>
        </draw:custom-shape>
        <draw:custom-shape draw:name="Text 1" draw:style-name="gr2" draw:text-style-name="P3" draw:layer="layout" svg:width="23.367cm" svg:height="2.793cm" svg:x="1.016cm" svg:y="3.048cm">
          <text:p text:style-name="P2"><text:span text:style-name="T1">PULSAR</text:span></text:p>
          <draw:enhanced-geometry svg:viewBox="0 0 21600 21600" draw:type="rectangle" draw:enhanced-path="M 0 0 L 21600 0 21600 21600 0 21600 0 0 Z N"/>
        </draw:custom-shape>
        <draw:custom-shape draw:name="Text 2" draw:style-name="gr2" draw:text-style-name="P3" draw:layer="layout" svg:width="10.159cm" svg:height="1.269cm" svg:x="1.016cm" svg:y="5.842cm">
          <text:p text:style-name="P2"><text:span text:style-name="T2">by Neptune</text:span></text:p>
          <draw:enhanced-geometry svg:viewBox="0 0 21600 21600" draw:type="rectangle" draw:enhanced-path="M 0 0 L 21600 0 21600 21600 0 21600 0 0 Z N"/>
        </draw:custom-shape>
        <draw:custom-shape draw:name="Text 3" draw:style-name="gr2" draw:text-style-name="P3" draw:layer="layout" svg:width="17.779cm" svg:height="1.142cm" svg:x="1.016cm" svg:y="7.366cm">
          <text:p text:style-name="P2"><text:span text:style-name="T3">Dossier de présentation technique</text:span></text:p>
          <draw:enhanced-geometry svg:viewBox="0 0 21600 21600" draw:type="rectangle" draw:enhanced-path="M 0 0 L 21600 0 21600 21600 0 21600 0 0 Z N"/>
        </draw:custom-shape>
        <draw:custom-shape draw:name="Shape 4" draw:style-name="gr3" draw:text-style-name="P1" draw:layer="layout" svg:width="6.603cm" svg:height="7.111cm" svg:x="18.288cm" svg:y="3.048cm">
          <text:p/>
          <draw:enhanced-geometry svg:viewBox="0 0 21600 21600" draw:type="rectangle" draw:enhanced-path="M 0 0 L 21600 0 21600 21600 0 21600 0 0 Z N"/>
        </draw:custom-shape>
        <draw:custom-shape draw:name="Text 5" draw:style-name="gr2" draw:text-style-name="P3" draw:layer="layout" svg:width="6.095cm" svg:height="0.812cm" svg:x="18.542cm" svg:y="3.429cm">
          <text:p text:style-name="P2"><text:span text:style-name="T4">Équipe Neptune</text:span></text:p>
          <draw:enhanced-geometry svg:viewBox="0 0 21600 21600" draw:type="rectangle" draw:enhanced-path="M 0 0 L 21600 0 21600 21600 0 21600 0 0 Z N"/>
        </draw:custom-shape>
        <draw:custom-shape draw:name="Text 6" draw:style-name="gr2" draw:text-style-name="P3" draw:layer="layout" svg:width="6.095cm" svg:height="0.659cm" svg:x="18.542cm" svg:y="4.318cm">
          <text:p text:style-name="P2"><text:span text:style-name="T5">• </text:span><text:span text:style-name="T5">Tom Farge</text:span></text:p>
          <draw:enhanced-geometry svg:viewBox="0 0 21600 21600" draw:type="rectangle" draw:enhanced-path="M 0 0 L 21600 0 21600 21600 0 21600 0 0 Z N"/>
        </draw:custom-shape>
        <draw:custom-shape draw:name="Text 7" draw:style-name="gr2" draw:text-style-name="P3" draw:layer="layout" svg:width="6.095cm" svg:height="0.659cm" svg:x="18.542cm" svg:y="5.029cm">
          <text:p text:style-name="P2"><text:span text:style-name="T5">• </text:span><text:span text:style-name="T5">Islem</text:span></text:p>
          <draw:enhanced-geometry svg:viewBox="0 0 21600 21600" draw:type="rectangle" draw:enhanced-path="M 0 0 L 21600 0 21600 21600 0 21600 0 0 Z N"/>
        </draw:custom-shape>
        <draw:custom-shape draw:name="Text 8" draw:style-name="gr2" draw:text-style-name="P3" draw:layer="layout" svg:width="6.095cm" svg:height="0.659cm" svg:x="18.542cm" svg:y="5.74cm">
          <text:p text:style-name="P2"><text:span text:style-name="T5">• </text:span><text:span text:style-name="T5">Manon</text:span></text:p>
          <draw:enhanced-geometry svg:viewBox="0 0 21600 21600" draw:type="rectangle" draw:enhanced-path="M 0 0 L 21600 0 21600 21600 0 21600 0 0 Z N"/>
        </draw:custom-shape>
        <draw:custom-shape draw:name="Text 9" draw:style-name="gr2" draw:text-style-name="P3" draw:layer="layout" svg:width="6.095cm" svg:height="0.659cm" svg:x="18.542cm" svg:y="6.452cm">
          <text:p text:style-name="P2"><text:span text:style-name="T5">• </text:span><text:span text:style-name="T5">Seife</text:span></text:p>
          <draw:enhanced-geometry svg:viewBox="0 0 21600 21600" draw:type="rectangle" draw:enhanced-path="M 0 0 L 21600 0 21600 21600 0 21600 0 0 Z N"/>
        </draw:custom-shape>
        <draw:custom-shape draw:name="Text 10" draw:style-name="gr2" draw:text-style-name="P3" draw:layer="layout" svg:width="6.095cm" svg:height="0.634cm" svg:x="18.542cm" svg:y="9.525cm">
          <text:p text:style-name="P2"><text:span text:style-name="T6">Mai 2026</text:span></text:p>
          <draw:enhanced-geometry svg:viewBox="0 0 21600 21600" draw:type="rectangle" draw:enhanced-path="M 0 0 L 21600 0 21600 21600 0 21600 0 0 Z N"/>
        </draw:custom-shape>
        <draw:custom-shape draw:name="Shape 11" draw:style-name="gr4" draw:text-style-name="P1" draw:layer="layout" svg:width="4.571cm" svg:height="0.761cm" svg:x="1.016cm" svg:y="12.8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12" draw:style-name="gr2" draw:text-style-name="P3" draw:layer="layout" svg:width="4.571cm" svg:height="0.761cm" svg:x="1.016cm" svg:y="12.827cm">
          <text:p text:style-name="P4"><text:span text:style-name="T7">Flutter</text:span></text:p>
          <draw:enhanced-geometry svg:viewBox="0 0 21600 21600" draw:type="rectangle" draw:enhanced-path="M 0 0 L 21600 0 21600 21600 0 21600 0 0 Z N"/>
        </draw:custom-shape>
        <draw:custom-shape draw:name="Shape 13" draw:style-name="gr4" draw:text-style-name="P1" draw:layer="layout" svg:width="4.571cm" svg:height="0.761cm" svg:x="4.953cm" svg:y="12.8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14" draw:style-name="gr2" draw:text-style-name="P3" draw:layer="layout" svg:width="4.571cm" svg:height="0.761cm" svg:x="4.953cm" svg:y="12.827cm">
          <text:p text:style-name="P4"><text:span text:style-name="T7">Dart</text:span></text:p>
          <draw:enhanced-geometry svg:viewBox="0 0 21600 21600" draw:type="rectangle" draw:enhanced-path="M 0 0 L 21600 0 21600 21600 0 21600 0 0 Z N"/>
        </draw:custom-shape>
        <draw:custom-shape draw:name="Shape 15" draw:style-name="gr4" draw:text-style-name="P1" draw:layer="layout" svg:width="4.571cm" svg:height="0.761cm" svg:x="8.89cm" svg:y="12.8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16" draw:style-name="gr2" draw:text-style-name="P3" draw:layer="layout" svg:width="4.571cm" svg:height="0.761cm" svg:x="8.89cm" svg:y="12.827cm">
          <text:p text:style-name="P4"><text:span text:style-name="T7">Isar</text:span></text:p>
          <draw:enhanced-geometry svg:viewBox="0 0 21600 21600" draw:type="rectangle" draw:enhanced-path="M 0 0 L 21600 0 21600 21600 0 21600 0 0 Z N"/>
        </draw:custom-shape>
        <draw:custom-shape draw:name="Shape 17" draw:style-name="gr4" draw:text-style-name="P1" draw:layer="layout" svg:width="4.571cm" svg:height="0.761cm" svg:x="12.827cm" svg:y="12.8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18" draw:style-name="gr2" draw:text-style-name="P3" draw:layer="layout" svg:width="4.571cm" svg:height="0.761cm" svg:x="12.827cm" svg:y="12.827cm">
          <text:p text:style-name="P4"><text:span text:style-name="T7">Riverpod</text:span></text:p>
          <draw:enhanced-geometry svg:viewBox="0 0 21600 21600" draw:type="rectangle" draw:enhanced-path="M 0 0 L 21600 0 21600 21600 0 21600 0 0 Z N"/>
        </draw:custom-shape>
        <draw:custom-shape draw:name="Shape 19" draw:style-name="gr4" draw:text-style-name="P1" draw:layer="layout" svg:width="4.571cm" svg:height="0.761cm" svg:x="16.764cm" svg:y="12.8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20" draw:style-name="gr2" draw:text-style-name="P3" draw:layer="layout" svg:width="4.571cm" svg:height="0.761cm" svg:x="16.764cm" svg:y="12.827cm">
          <text:p text:style-name="P4"><text:span text:style-name="T7">Firebase</text:span></text:p>
          <draw:enhanced-geometry svg:viewBox="0 0 21600 21600" draw:type="rectangle" draw:enhanced-path="M 0 0 L 21600 0 21600 21600 0 21600 0 0 Z N"/>
        </draw:custom-shape>
        <draw:custom-shape draw:name="Shape 21" draw:style-name="gr4" draw:text-style-name="P1" draw:layer="layout" svg:width="4.571cm" svg:height="0.761cm" svg:x="20.701cm" svg:y="12.8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22" draw:style-name="gr2" draw:text-style-name="P3" draw:layer="layout" svg:width="4.571cm" svg:height="0.761cm" svg:x="20.701cm" svg:y="12.827cm">
          <text:p text:style-name="P4"><text:span text:style-name="T7">Stripe</text:span></text:p>
          <draw:enhanced-geometry svg:viewBox="0 0 21600 21600" draw:type="rectangle" draw:enhanced-path="M 0 0 L 21600 0 21600 21600 0 21600 0 0 Z N"/>
        </draw:custom-shape>
        <presentation:notes draw:style-name="dp2">
          <draw:page-thumbnail draw:name="Slide Image Placeholder 1" draw:style-name="gr5" draw:layer="layout" svg:width="15.239cm" svg:height="8.572cm" svg:x="-0.239cm" svg:y="1.028cm" draw:page-number="1" presentation:class="page"/>
          <draw:frame draw:name="Notes Placeholder 2" presentation:style-name="pr1" draw:text-style-name="P3" draw:layer="layout" svg:width="15.239cm" svg:height="10cm" svg:x="-0.4cm" svg:y="10.2cm" presentation:class="notes" presentation:user-transformed="true">
            <draw:text-box>
              <text:p><text:span text:style-name="T8">SLIDE 1 — TITRE (20-30 secondes)</text:span></text:p>
              <text:p><text:span text:style-name="T8"/></text:p>
              <text:p><text:span text:style-name="T8">SCRIPT ORAL :</text:span></text:p>
              <text:p><text:span text:style-name="T8">"Bonjour à tous. Je suis [Prénom], membre de l'équipe Neptune. Nous allons vous présenter Pulsar, notre application mobile de billetterie événementielle éco-responsable. En 8 minutes, je vais vous montrer les choix techniques que nous avons faits — pourquoi Flutter, pourquoi cette architecture, et comment nos diagrammes se lisent."</text:span></text:p>
              <text:p><text:span text:style-name="T8"/></text:p>
              <text:p><text:span text:style-name="T8">CONSEILS :</text:span></text:p>
              <text:p><text:span text:style-name="T8">→ </text:span><text:span text:style-name="T8">Parler lentement, regarder le jury, sourire</text:span></text:p>
              <text:p><text:span text:style-name="T8">→ </text:span><text:span text:style-name="T8">Ne pas lire le slide — il est juste là pour ancrer le contexte</text:span></text:p>
              <text:p><text:span text:style-name="T8">→ </text:span><text:span text:style-name="T8">Transition : "Commençons par comprendre ce que fait Pulsar et pourquoi il existe."</text:span></text:p>
              <text:p><text:span text:style-name="T8"/></text:p>
              <text:p><text:span text:style-name="T8">QUESTIONS POSSIBLES à ce stade :</text:span></text:p>
              <text:p><text:span text:style-name="T8">Q: "C'est un projet scolaire ou réel ?"</text:span></text:p>
              <text:p><text:span text:style-name="T8">R: "C'est un projet de formation, traité comme un projet professionnel avec une vraie architecture, un vrai CDC, et des choix technologiques justifiés."</text:span></text:p>
            </draw:text-box>
          </draw:frame>
          <draw:frame draw:name="Slide Number Placeholder 3" presentation:style-name="pr2" draw:text-style-name="P6" draw:layer="layout" svg:width="8.254cm" svg:height="1.273cm" svg:x="10.791cm" svg:y="24.126cm" presentation:class="page-number" presentation:user-transformed="true">
            <draw:text-box>
              <text:p text:style-name="P5"><text:span text:style-name="T9"><text:page-number>&lt;numéro&gt;</text:page-number></text:span></text:p>
            </draw:text-box>
          </draw:frame>
        </presentation:notes>
      </draw:page>
      <draw:page draw:name="Slide 2" draw:style-name="dp3" draw:master-page-name="Standard">
        <draw:custom-shape draw:name="Text 0" draw:style-name="gr2" draw:text-style-name="P3" draw:layer="layout" svg:width="22.859cm" svg:height="1.396cm" svg:x="1.27cm" svg:y="0.635cm">
          <text:p text:style-name="P2"><text:span text:style-name="T10">Le problème · La solution</text:span></text:p>
          <draw:enhanced-geometry svg:viewBox="0 0 21600 21600" draw:type="rectangle" draw:enhanced-path="M 0 0 L 21600 0 21600 21600 0 21600 0 0 Z N"/>
        </draw:custom-shape>
        <draw:custom-shape draw:name="Shape 1" draw:style-name="gr6" draw:text-style-name="P1" draw:layer="layout" svg:width="10.667cm" svg:height="9.651cm" svg:x="1.27cm" svg:y="2.413cm">
          <text:p/>
          <draw:enhanced-geometry svg:viewBox="0 0 21600 21600" draw:type="rectangle" draw:enhanced-path="M 0 0 L 21600 0 21600 21600 0 21600 0 0 Z N"/>
        </draw:custom-shape>
        <draw:custom-shape draw:name="Text 2" draw:style-name="gr2" draw:text-style-name="P3" draw:layer="layout" svg:width="9.651cm" svg:height="0.964cm" svg:x="1.778cm" svg:y="2.667cm">
          <text:p text:style-name="P2"><text:span text:style-name="T11">😩 </text:span><text:span text:style-name="T11">Problème actuel</text:span></text:p>
          <draw:enhanced-geometry svg:viewBox="0 0 21600 21600" draw:type="rectangle" draw:enhanced-path="M 0 0 L 21600 0 21600 21600 0 21600 0 0 Z N"/>
        </draw:custom-shape>
        <draw:custom-shape draw:name="Text 3" draw:style-name="gr2" draw:text-style-name="P3" draw:layer="layout" svg:width="9.651cm" svg:height="2.082cm" svg:x="1.778cm" svg:y="3.937cm">
          <text:p text:style-name="P2"><text:span text:style-name="T12">✗ <text:s/></text:span><text:span text:style-name="T12">4-5 applications différentes</text:span></text:p>
          <text:p text:style-name="P2"><text:span text:style-name="T12">pour organiser une sortie</text:span></text:p>
          <draw:enhanced-geometry svg:viewBox="0 0 21600 21600" draw:type="rectangle" draw:enhanced-path="M 0 0 L 21600 0 21600 21600 0 21600 0 0 Z N"/>
        </draw:custom-shape>
        <draw:custom-shape draw:name="Text 4" draw:style-name="gr2" draw:text-style-name="P3" draw:layer="layout" svg:width="9.651cm" svg:height="2.082cm" svg:x="1.778cm" svg:y="6.426cm">
          <text:p text:style-name="P2"><text:span text:style-name="T12">✗ <text:s/></text:span><text:span text:style-name="T12">Aucune app ne calcule</text:span></text:p>
          <text:p text:style-name="P2"><text:span text:style-name="T12">l'impact carbone du déplacement</text:span></text:p>
          <draw:enhanced-geometry svg:viewBox="0 0 21600 21600" draw:type="rectangle" draw:enhanced-path="M 0 0 L 21600 0 21600 21600 0 21600 0 0 Z N"/>
        </draw:custom-shape>
        <draw:custom-shape draw:name="Text 5" draw:style-name="gr2" draw:text-style-name="P3" draw:layer="layout" svg:width="9.651cm" svg:height="2.082cm" svg:x="1.778cm" svg:y="8.915cm">
          <text:p text:style-name="P2"><text:span text:style-name="T12">✗ <text:s/></text:span><text:span text:style-name="T12">Les billets ne fonctionnent</text:span></text:p>
          <text:p text:style-name="P2"><text:span text:style-name="T12">pas sans connexion</text:span></text:p>
          <draw:enhanced-geometry svg:viewBox="0 0 21600 21600" draw:type="rectangle" draw:enhanced-path="M 0 0 L 21600 0 21600 21600 0 21600 0 0 Z N"/>
        </draw:custom-shape>
        <draw:line draw:name="Shape 6" draw:style-name="gr7" draw:text-style-name="P7" draw:layer="layout" svg:x1="12.319cm" svg:y1="7.239cm" svg:x2="13.843cm" svg:y2="7.239cm">
          <text:p/>
        </draw:line>
        <draw:custom-shape draw:name="Text 7" draw:style-name="gr2" draw:text-style-name="P3" draw:layer="layout" svg:width="1.269cm" svg:height="1.269cm" svg:x="12.954cm" svg:y="6.604cm">
          <text:p text:style-name="P4"><text:span text:style-name="T13">→</text:span></text:p>
          <draw:enhanced-geometry svg:viewBox="0 0 21600 21600" draw:type="rectangle" draw:enhanced-path="M 0 0 L 21600 0 21600 21600 0 21600 0 0 Z N"/>
        </draw:custom-shape>
        <draw:custom-shape draw:name="Shape 8" draw:style-name="gr8" draw:text-style-name="P1" draw:layer="layout" svg:width="10.667cm" svg:height="9.651cm" svg:x="13.97cm" svg:y="2.413cm">
          <text:p/>
          <draw:enhanced-geometry svg:viewBox="0 0 21600 21600" draw:type="rectangle" draw:enhanced-path="M 0 0 L 21600 0 21600 21600 0 21600 0 0 Z N"/>
        </draw:custom-shape>
        <draw:custom-shape draw:name="Text 9" draw:style-name="gr2" draw:text-style-name="P3" draw:layer="layout" svg:width="9.651cm" svg:height="0.964cm" svg:x="14.478cm" svg:y="2.667cm">
          <text:p text:style-name="P2"><text:span text:style-name="T11">✅ </text:span><text:span text:style-name="T11">Pulsar</text:span></text:p>
          <draw:enhanced-geometry svg:viewBox="0 0 21600 21600" draw:type="rectangle" draw:enhanced-path="M 0 0 L 21600 0 21600 21600 0 21600 0 0 Z N"/>
        </draw:custom-shape>
        <draw:custom-shape draw:name="Text 10" draw:style-name="gr2" draw:text-style-name="P3" draw:layer="layout" svg:width="9.651cm" svg:height="2.082cm" svg:x="14.478cm" svg:y="3.937cm">
          <text:p text:style-name="P2"><text:span text:style-name="T12">✓ <text:s/></text:span><text:span text:style-name="T12">Billet + Transport + Hébergement</text:span></text:p>
          <text:p text:style-name="P2"><text:span text:style-name="T12">dans une seule application</text:span></text:p>
          <draw:enhanced-geometry svg:viewBox="0 0 21600 21600" draw:type="rectangle" draw:enhanced-path="M 0 0 L 21600 0 21600 21600 0 21600 0 0 Z N"/>
        </draw:custom-shape>
        <draw:custom-shape draw:name="Text 11" draw:style-name="gr2" draw:text-style-name="P3" draw:layer="layout" svg:width="9.651cm" svg:height="2.082cm" svg:x="14.478cm" svg:y="6.426cm">
          <text:p text:style-name="P2"><text:span text:style-name="T12">✓ <text:s/></text:span><text:span text:style-name="T12">Calcul CO₂ ADEME intégré</text:span></text:p>
          <text:p text:style-name="P2"><text:span text:style-name="T12">et éco-score personnel</text:span></text:p>
          <draw:enhanced-geometry svg:viewBox="0 0 21600 21600" draw:type="rectangle" draw:enhanced-path="M 0 0 L 21600 0 21600 21600 0 21600 0 0 Z N"/>
        </draw:custom-shape>
        <draw:custom-shape draw:name="Text 12" draw:style-name="gr2" draw:text-style-name="P3" draw:layer="layout" svg:width="9.651cm" svg:height="2.082cm" svg:x="14.478cm" svg:y="8.915cm">
          <text:p text:style-name="P2"><text:span text:style-name="T12">✓ <text:s/></text:span><text:span text:style-name="T12">Mode offline-first : billets</text:span></text:p>
          <text:p text:style-name="P2"><text:span text:style-name="T12">accessibles sans réseau</text:span></text:p>
          <draw:enhanced-geometry svg:viewBox="0 0 21600 21600" draw:type="rectangle" draw:enhanced-path="M 0 0 L 21600 0 21600 21600 0 21600 0 0 Z N"/>
        </draw:custom-shape>
        <draw:custom-shape draw:name="Shape 13" draw:style-name="gr9" draw:text-style-name="P1" draw:layer="layout" svg:width="23.367cm" svg:height="1.269cm" svg:x="1.27cm" svg:y="12.573cm">
          <text:p/>
          <draw:enhanced-geometry svg:viewBox="0 0 21600 21600" draw:type="rectangle" draw:enhanced-path="M 0 0 L 21600 0 21600 21600 0 21600 0 0 Z N"/>
        </draw:custom-shape>
        <draw:custom-shape draw:name="Text 14" draw:style-name="gr2" draw:text-style-name="P3" draw:layer="layout" svg:width="22.859cm" svg:height="1.142cm" svg:x="1.524cm" svg:y="12.624cm">
          <text:p text:style-name="P4"><text:span text:style-name="T6">MVP : billetterie + transport + hébergement <text:s/>· <text:s/>Cibles : Android, iOS, Web <text:s/>· <text:s/>Stack : Flutter + Firebase + Stripe</text:span></text:p>
          <draw:enhanced-geometry svg:viewBox="0 0 21600 21600" draw:type="rectangle" draw:enhanced-path="M 0 0 L 21600 0 21600 21600 0 21600 0 0 Z N"/>
        </draw:custom-shape>
        <presentation:notes draw:style-name="dp2">
          <draw:page-thumbnail draw:name="Slide Image Placeholder 1" draw:style-name="gr5" draw:layer="layout" svg:width="15.239cm" svg:height="8.572cm" svg:x="-0.039cm" svg:y="-9.6cm" draw:page-number="2" presentation:class="page"/>
          <draw:frame draw:name="Notes Placeholder 2" presentation:style-name="pr1" draw:text-style-name="P3" draw:layer="layout" svg:width="15.239cm" svg:height="10cm" svg:x="-0.439cm" svg:y="-1.2cm" presentation:class="notes" presentation:user-transformed="true">
            <draw:text-box>
              <text:p><text:span text:style-name="T8">SLIDE 2 — PROBLÈME / SOLUTION (45-60 secondes)</text:span></text:p>
              <text:p><text:span text:style-name="T8"/></text:p>
              <text:p><text:span text:style-name="T8">SCRIPT ORAL :</text:span></text:p>
              <text:p><text:span text:style-name="T8">"Aujourd'hui, pour aller à un concert, vous utilisez Shotgun pour le billet, Google Maps pour le trajet, Booking pour l'hôtel — et vous perdez le fil entre les 3. Pulsar résout ça en un seul endroit. Et en plus, il calcule automatiquement votre empreinte carbone et vous propose les transports les moins polluants."</text:span></text:p>
              <text:p><text:span text:style-name="T8"/></text:p>
              <text:p><text:span text:style-name="T8">POINT CLÉ À INSISTER :</text:span></text:p>
              <text:p><text:span text:style-name="T8">→ </text:span><text:span text:style-name="T8">"Les billets fonctionnent SANS réseau — le QR code est généré et signé côté client."</text:span></text:p>
              <text:p><text:span text:style-name="T8">→ </text:span><text:span text:style-name="T8">C'est ça l'offline-first : votre téléphone est autonome, il se synchronise quand le réseau revient.</text:span></text:p>
              <text:p><text:span text:style-name="T8"/></text:p>
              <text:p><text:span text:style-name="T8">QUESTIONS POSSIBLES :</text:span></text:p>
              <text:p><text:span text:style-name="T8">Q: "En quoi Pulsar est différent de Shotgun ou Eventbrite ?"</text:span></text:p>
              <text:p><text:span text:style-name="T8">R: "Shotgun vend des billets, il ne gère ni le transport ni l'hébergement. Pulsar est le seul à intégrer les 3 dans un même flux avec le calcul CO₂ ADEME."</text:span></text:p>
              <text:p><text:span text:style-name="T8"/></text:p>
              <text:p><text:span text:style-name="T8">Q: "Le mode offline, comment ça marche concrètement ?"</text:span></text:p>
              <text:p><text:span text:style-name="T8">R: "Les données sont stockées localement dans Isar — une base NoSQL sur le téléphone. Quand internet revient, la synchronisation est automatique."</text:span></text:p>
            </draw:text-box>
          </draw:frame>
          <draw:frame draw:name="Slide Number Placeholder 3" presentation:style-name="pr2" draw:text-style-name="P6" draw:layer="layout" svg:width="8.254cm" svg:height="1.273cm" svg:x="10.791cm" svg:y="24.126cm" presentation:class="page-number" presentation:user-transformed="true">
            <draw:text-box>
              <text:p text:style-name="P5"><text:span text:style-name="T9"><text:page-number>&lt;numéro&gt;</text:page-number></text:span></text:p>
            </draw:text-box>
          </draw:frame>
        </presentation:notes>
      </draw:page>
      <draw:page draw:name="Slide 3" draw:style-name="dp3" draw:master-page-name="Standard">
        <draw:custom-shape draw:name="Text 0" draw:style-name="gr2" draw:text-style-name="P3" draw:layer="layout" svg:width="22.859cm" svg:height="1.396cm" svg:x="1.27cm" svg:y="0.635cm">
          <text:p text:style-name="P2"><text:span text:style-name="T10">Pourquoi Flutter ?</text:span></text:p>
          <draw:enhanced-geometry svg:viewBox="0 0 21600 21600" draw:type="rectangle" draw:enhanced-path="M 0 0 L 21600 0 21600 21600 0 21600 0 0 Z N"/>
        </draw:custom-shape>
        <draw:custom-shape draw:name="Text 1" draw:style-name="gr2" draw:text-style-name="P3" draw:layer="layout" svg:width="22.859cm" svg:height="0.761cm" svg:x="1.27cm" svg:y="2.083cm">
          <text:p text:style-name="P2"><text:span text:style-name="T12">Un seul code → 3 plateformes · Performances natives · Offline-first mature</text:span></text:p>
          <draw:enhanced-geometry svg:viewBox="0 0 21600 21600" draw:type="rectangle" draw:enhanced-path="M 0 0 L 21600 0 21600 21600 0 21600 0 0 Z N"/>
        </draw:custom-shape>
        <draw:custom-shape draw:name="Shape 2" draw:style-name="gr10" draw:text-style-name="P1" draw:layer="layout" svg:width="5.079cm" svg:height="1.066cm" svg:x="1.27cm" svg:y="3.0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3" draw:style-name="gr2" draw:text-style-name="P3" draw:layer="layout" svg:width="5.079cm" svg:height="1.066cm" svg:x="1.27cm" svg:y="3.048cm">
          <text:p text:style-name="P4"><text:span text:style-name="T14">Android</text:span></text:p>
          <draw:enhanced-geometry svg:viewBox="0 0 21600 21600" draw:type="rectangle" draw:enhanced-path="M 0 0 L 21600 0 21600 21600 0 21600 0 0 Z N"/>
        </draw:custom-shape>
        <draw:custom-shape draw:name="Shape 4" draw:style-name="gr1" draw:text-style-name="P1" draw:layer="layout" svg:width="5.079cm" svg:height="1.066cm" svg:x="7.62cm" svg:y="3.0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5" draw:style-name="gr2" draw:text-style-name="P3" draw:layer="layout" svg:width="5.079cm" svg:height="1.066cm" svg:x="7.62cm" svg:y="3.048cm">
          <text:p text:style-name="P4"><text:span text:style-name="T14">iOS</text:span></text:p>
          <draw:enhanced-geometry svg:viewBox="0 0 21600 21600" draw:type="rectangle" draw:enhanced-path="M 0 0 L 21600 0 21600 21600 0 21600 0 0 Z N"/>
        </draw:custom-shape>
        <draw:custom-shape draw:name="Shape 6" draw:style-name="gr11" draw:text-style-name="P1" draw:layer="layout" svg:width="5.079cm" svg:height="1.066cm" svg:x="13.97cm" svg:y="3.0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7" draw:style-name="gr2" draw:text-style-name="P3" draw:layer="layout" svg:width="5.079cm" svg:height="1.066cm" svg:x="13.97cm" svg:y="3.048cm">
          <text:p text:style-name="P4"><text:span text:style-name="T14">Web</text:span></text:p>
          <draw:enhanced-geometry svg:viewBox="0 0 21600 21600" draw:type="rectangle" draw:enhanced-path="M 0 0 L 21600 0 21600 21600 0 21600 0 0 Z N"/>
        </draw:custom-shape>
        <draw:custom-shape draw:name="Text 8" draw:style-name="gr2" draw:text-style-name="P3" draw:layer="layout" svg:width="7.111cm" svg:height="1.066cm" svg:x="18.034cm" svg:y="3.048cm">
          <text:p text:style-name="P2"><text:span text:style-name="T15">= 1 seule base de code Dart</text:span></text:p>
          <draw:enhanced-geometry svg:viewBox="0 0 21600 21600" draw:type="rectangle" draw:enhanced-path="M 0 0 L 21600 0 21600 21600 0 21600 0 0 Z N"/>
        </draw:custom-shape>
        <draw:frame draw:name="Table 0" draw:style-name="standard" draw:layer="layout" svg:width="23.366cm" svg:height="6.602cm" svg:x="1.27cm" svg:y="4.521cm">
          <table:table>
            <table:table-column table:style-name="co1"/>
            <table:table-column table:style-name="co2"/>
            <table:table-column table:style-name="co2"/>
            <table:table-column table:style-name="co3"/>
            <table:table-row table:style-name="ro1">
              <table:table-cell table:style-name="ce1">
                <text:p text:style-name="P8"><text:span text:style-name="T4">Critère</text:span></text:p>
              </table:table-cell>
              <table:table-cell table:style-name="ce2">
                <text:p text:style-name="P9"><text:span text:style-name="T4">Flutter ✓</text:span></text:p>
              </table:table-cell>
              <table:table-cell table:style-name="ce3">
                <text:p text:style-name="P9"><text:span text:style-name="T4">React Native</text:span></text:p>
              </table:table-cell>
              <table:table-cell table:style-name="ce4">
                <text:p text:style-name="P9"><text:span text:style-name="T4">Natif</text:span></text:p>
              </table:table-cell>
            </table:table-row>
            <table:table-row table:style-name="ro1">
              <table:table-cell table:style-name="ce5">
                <text:p text:style-name="P8"><text:span text:style-name="T6">3 plateformes</text:span></text:p>
              </table:table-cell>
              <table:table-cell table:style-name="ce6">
                <text:p text:style-name="P9"><text:span text:style-name="T6">✅ </text:span><text:span text:style-name="T6">Android+iOS+Web</text:span></text:p>
              </table:table-cell>
              <table:table-cell table:style-name="ce7">
                <text:p text:style-name="P9"><text:span text:style-name="T6">⚠️ </text:span><text:span text:style-name="T6">Pas le web natif</text:span></text:p>
              </table:table-cell>
              <table:table-cell table:style-name="ce8">
                <text:p text:style-name="P9"><text:span text:style-name="T6">❌ </text:span><text:span text:style-name="T6">2 codebases</text:span></text:p>
              </table:table-cell>
            </table:table-row>
            <table:table-row table:style-name="ro1">
              <table:table-cell table:style-name="ce9">
                <text:p text:style-name="P8"><text:span text:style-name="T6">Performances</text:span></text:p>
              </table:table-cell>
              <table:table-cell table:style-name="ce10">
                <text:p text:style-name="P9"><text:span text:style-name="T6">✅ </text:span><text:span text:style-name="T6">AOT → machine</text:span></text:p>
              </table:table-cell>
              <table:table-cell table:style-name="ce11">
                <text:p text:style-name="P9"><text:span text:style-name="T6">⚠️ </text:span><text:span text:style-name="T6">Bridge JS</text:span></text:p>
              </table:table-cell>
              <table:table-cell table:style-name="ce12">
                <text:p text:style-name="P9"><text:span text:style-name="T6">✅ </text:span><text:span text:style-name="T6">Optimal</text:span></text:p>
              </table:table-cell>
            </table:table-row>
            <table:table-row table:style-name="ro1">
              <table:table-cell table:style-name="ce13">
                <text:p text:style-name="P8"><text:span text:style-name="T6">Offline-first</text:span></text:p>
              </table:table-cell>
              <table:table-cell table:style-name="ce14">
                <text:p text:style-name="P9"><text:span text:style-name="T6">✅ </text:span><text:span text:style-name="T6">Isar intégré</text:span></text:p>
              </table:table-cell>
              <table:table-cell table:style-name="ce15">
                <text:p text:style-name="P9"><text:span text:style-name="T6">⚠️ </text:span><text:span text:style-name="T6">WatermelonDB</text:span></text:p>
              </table:table-cell>
              <table:table-cell table:style-name="ce16">
                <text:p text:style-name="P9"><text:span text:style-name="T6">✅ </text:span><text:span text:style-name="T6">Room/CoreData</text:span></text:p>
              </table:table-cell>
            </table:table-row>
            <table:table-row table:style-name="ro2">
              <table:table-cell table:style-name="ce17">
                <text:p text:style-name="P8"><text:span text:style-name="T6">Equipe de 4</text:span></text:p>
              </table:table-cell>
              <table:table-cell table:style-name="ce18">
                <text:p text:style-name="P9"><text:span text:style-name="T6">✅ </text:span><text:span text:style-name="T6">1 équipe</text:span></text:p>
              </table:table-cell>
              <table:table-cell table:style-name="ce19">
                <text:p text:style-name="P9"><text:span text:style-name="T6">✅ </text:span><text:span text:style-name="T6">1 équipe</text:span></text:p>
              </table:table-cell>
              <table:table-cell table:style-name="ce20">
                <text:p text:style-name="P9"><text:span text:style-name="T6">❌ </text:span><text:span text:style-name="T6">2 équipes</text:span></text:p>
              </table:table-cell>
            </table:table-row>
          </table:table>
          <draw:image xlink:href="Pictures/TablePreview1.svm" xlink:type="simple" xlink:show="embed" xlink:actuate="onLoad"/>
        </draw:frame>
        <draw:custom-shape draw:name="Shape 9" draw:style-name="gr12" draw:text-style-name="P1" draw:layer="layout" svg:width="23.367cm" svg:height="2.031cm" svg:x="1.27cm" svg:y="11.633cm">
          <text:p/>
          <draw:enhanced-geometry svg:viewBox="0 0 21600 21600" draw:type="rectangle" draw:enhanced-path="M 0 0 L 21600 0 21600 21600 0 21600 0 0 Z N"/>
        </draw:custom-shape>
        <draw:custom-shape draw:name="Text 10" draw:style-name="gr2" draw:text-style-name="P3" draw:layer="layout" svg:width="22.351cm" svg:height="1.675cm" svg:x="1.778cm" svg:y="11.811cm">
          <text:p text:style-name="P2"><text:span text:style-name="T5">💡 </text:span><text:span text:style-name="T5">La compilation AOT de Flutter traduit Dart directement en langage machine — contrairement à React Native qui passe par un bridge JavaScript. Résultat : 60 FPS garantis, même sur des mid-range.</text:span></text:p>
          <draw:enhanced-geometry svg:viewBox="0 0 21600 21600" draw:type="rectangle" draw:enhanced-path="M 0 0 L 21600 0 21600 21600 0 21600 0 0 Z N"/>
        </draw:custom-shape>
        <presentation:notes draw:style-name="dp2">
          <draw:page-thumbnail draw:name="Slide Image Placeholder 1" draw:style-name="gr5" draw:layer="layout" svg:width="15.239cm" svg:height="8.572cm" svg:x="-0.039cm" svg:y="-6cm" draw:page-number="3" presentation:class="page"/>
          <draw:frame draw:name="Notes Placeholder 2" presentation:style-name="pr1" draw:text-style-name="P3" draw:layer="layout" svg:width="15.239cm" svg:height="10cm" svg:x="0cm" svg:y="2.8cm" presentation:class="notes" presentation:user-transformed="true">
            <draw:text-box>
              <text:p><text:span text:style-name="T8">SLIDE 3 — FLUTTER (60 secondes)</text:span></text:p>
              <text:p><text:span text:style-name="T8"/></text:p>
              <text:p><text:span text:style-name="T8">SCRIPT ORAL :</text:span></text:p>
              <text:p><text:span text:style-name="T8">"On a choisi Flutter pour une raison simple : à 4 personnes, on ne peut pas maintenir 3 apps séparées. Flutter nous donne Android, iOS et Web à partir d'un seul code Dart. Et il compile ce code directement en langage machine — c'est ce qu'on appelle la compilation AOT. Résultat : des performances proches du natif, à 60 images par seconde, sans le bridge JavaScript de React Native qui introduit de la latence."</text:span></text:p>
              <text:p><text:span text:style-name="T8"/></text:p>
              <text:p><text:span text:style-name="T8">POINT CLÉ :</text:span></text:p>
              <text:p><text:span text:style-name="T8">→ </text:span><text:span text:style-name="T8">Si on dit 'compilation AOT' → "Ça veut dire que le code est traduit en langage machine AVANT l'installation, pas à la volée pendant l'utilisation. Comme un livre traduit avant impression vs un traducteur simultané."</text:span></text:p>
              <text:p><text:span text:style-name="T8"/></text:p>
              <text:p><text:span text:style-name="T8">QUESTIONS POSSIBLES :</text:span></text:p>
              <text:p><text:span text:style-name="T8">Q: "Pourquoi pas React Native, c'est plus populaire ?"</text:span></text:p>
              <text:p><text:span text:style-name="T8">R: "React Native est excellent mais il ne supporte pas Flutter Web nativement, et son bridge JavaScript introduit de la latence. Pour notre contrainte de 60 FPS sur les animations et le QR code offline sous 500ms, Flutter est objectivement supérieur."</text:span></text:p>
              <text:p><text:span text:style-name="T8"/></text:p>
              <text:p><text:span text:style-name="T8">Q: "Dart est un langage que vous connaissiez avant ?"</text:span></text:p>
              <text:p><text:span text:style-name="T8">R: "Non, on l'a appris sur ce projet. Sa syntaxe ressemble beaucoup à JavaScript/TypeScript, l'apprentissage est rapide — environ 1-2 semaines pour être productif."</text:span></text:p>
            </draw:text-box>
          </draw:frame>
          <draw:frame draw:name="Slide Number Placeholder 3" presentation:style-name="pr2" draw:text-style-name="P6" draw:layer="layout" svg:width="8.254cm" svg:height="1.273cm" svg:x="10.791cm" svg:y="24.126cm" presentation:class="page-number" presentation:user-transformed="true">
            <draw:text-box>
              <text:p text:style-name="P5"><text:span text:style-name="T9"><text:page-number>&lt;numéro&gt;</text:page-number></text:span></text:p>
            </draw:text-box>
          </draw:frame>
        </presentation:notes>
      </draw:page>
      <draw:page draw:name="Slide 4" draw:style-name="dp3" draw:master-page-name="Standard">
        <draw:custom-shape draw:name="Text 0" draw:style-name="gr2" draw:text-style-name="P3" draw:layer="layout" svg:width="23.367cm" svg:height="1.396cm" svg:x="1.27cm" svg:y="0.635cm">
          <text:p text:style-name="P2"><text:span text:style-name="T13">Architecture — Feature-First Clean Architecture</text:span></text:p>
          <draw:enhanced-geometry svg:viewBox="0 0 21600 21600" draw:type="rectangle" draw:enhanced-path="M 0 0 L 21600 0 21600 21600 0 21600 0 0 Z N"/>
        </draw:custom-shape>
        <draw:custom-shape draw:name="Text 1" draw:style-name="gr2" draw:text-style-name="P3" draw:layer="layout" svg:width="22.859cm" svg:height="0.761cm" svg:x="1.27cm" svg:y="2.083cm">
          <text:p text:style-name="P2"><text:span text:style-name="T12">Chaque fonctionnalité contient ses 3 couches : présentation · données · métier</text:span></text:p>
          <draw:enhanced-geometry svg:viewBox="0 0 21600 21600" draw:type="rectangle" draw:enhanced-path="M 0 0 L 21600 0 21600 21600 0 21600 0 0 Z N"/>
        </draw:custom-shape>
        <draw:custom-shape draw:name="Shape 2" draw:style-name="gr13" draw:text-style-name="P1" draw:layer="layout" svg:width="7.365cm" svg:height="5.587cm" svg:x="1.27cm" svg:y="3.175cm">
          <text:p/>
          <draw:enhanced-geometry svg:viewBox="0 0 21600 21600" draw:type="rectangle" draw:enhanced-path="M 0 0 L 21600 0 21600 21600 0 21600 0 0 Z N"/>
        </draw:custom-shape>
        <draw:custom-shape draw:name="Shape 3" draw:style-name="gr14" draw:text-style-name="P1" draw:layer="layout" svg:width="7.365cm" svg:height="1.218cm" svg:x="1.27cm" svg:y="3.175cm">
          <text:p/>
          <draw:enhanced-geometry svg:viewBox="0 0 21600 21600" draw:type="rectangle" draw:enhanced-path="M 0 0 L 21600 0 21600 21600 0 21600 0 0 Z N"/>
        </draw:custom-shape>
        <draw:custom-shape draw:name="Text 4" draw:style-name="gr2" draw:text-style-name="P3" draw:layer="layout" svg:width="7.111cm" svg:height="1.015cm" svg:x="1.397cm" svg:y="3.302cm">
          <text:p text:style-name="P4"><text:span text:style-name="T15">PRÉSENTATION</text:span></text:p>
          <draw:enhanced-geometry svg:viewBox="0 0 21600 21600" draw:type="rectangle" draw:enhanced-path="M 0 0 L 21600 0 21600 21600 0 21600 0 0 Z N"/>
        </draw:custom-shape>
        <draw:custom-shape draw:name="Text 5" draw:style-name="gr2" draw:text-style-name="P3" draw:layer="layout" svg:width="7.111cm" svg:height="1.777cm" svg:x="1.397cm" svg:y="4.699cm">
          <text:p text:style-name="P4"><text:span text:style-name="T5">Screens · Widgets</text:span></text:p>
          <text:p text:style-name="P4"><text:span text:style-name="T5">Providers Riverpod</text:span></text:p>
          <draw:enhanced-geometry svg:viewBox="0 0 21600 21600" draw:type="rectangle" draw:enhanced-path="M 0 0 L 21600 0 21600 21600 0 21600 0 0 Z N"/>
        </draw:custom-shape>
        <draw:custom-shape draw:name="Text 6" draw:style-name="gr2" draw:text-style-name="P3" draw:layer="layout" svg:width="7.111cm" svg:height="1.777cm" svg:x="1.397cm" svg:y="6.604cm">
          <text:p text:style-name="P4"><text:span text:style-name="T16">Ce que l'utilisateur</text:span></text:p>
          <text:p text:style-name="P4"><text:span text:style-name="T16">voit et touche</text:span></text:p>
          <draw:enhanced-geometry svg:viewBox="0 0 21600 21600" draw:type="rectangle" draw:enhanced-path="M 0 0 L 21600 0 21600 21600 0 21600 0 0 Z N"/>
        </draw:custom-shape>
        <draw:custom-shape draw:name="Text 7" draw:style-name="gr2" draw:text-style-name="P3" draw:layer="layout" svg:width="0.761cm" svg:height="1.269cm" svg:x="8.636cm" svg:y="5.08cm">
          <text:p text:style-name="P4"><text:span text:style-name="T17">→</text:span></text:p>
          <draw:enhanced-geometry svg:viewBox="0 0 21600 21600" draw:type="rectangle" draw:enhanced-path="M 0 0 L 21600 0 21600 21600 0 21600 0 0 Z N"/>
        </draw:custom-shape>
        <draw:custom-shape draw:name="Shape 8" draw:style-name="gr15" draw:text-style-name="P1" draw:layer="layout" svg:width="7.365cm" svg:height="5.587cm" svg:x="9.144cm" svg:y="3.175cm">
          <text:p/>
          <draw:enhanced-geometry svg:viewBox="0 0 21600 21600" draw:type="rectangle" draw:enhanced-path="M 0 0 L 21600 0 21600 21600 0 21600 0 0 Z N"/>
        </draw:custom-shape>
        <draw:custom-shape draw:name="Shape 9" draw:style-name="gr11" draw:text-style-name="P1" draw:layer="layout" svg:width="7.365cm" svg:height="1.218cm" svg:x="9.144cm" svg:y="3.175cm">
          <text:p/>
          <draw:enhanced-geometry svg:viewBox="0 0 21600 21600" draw:type="rectangle" draw:enhanced-path="M 0 0 L 21600 0 21600 21600 0 21600 0 0 Z N"/>
        </draw:custom-shape>
        <draw:custom-shape draw:name="Text 10" draw:style-name="gr2" draw:text-style-name="P3" draw:layer="layout" svg:width="7.111cm" svg:height="1.015cm" svg:x="9.271cm" svg:y="3.302cm">
          <text:p text:style-name="P4"><text:span text:style-name="T15">DONNÉES</text:span></text:p>
          <draw:enhanced-geometry svg:viewBox="0 0 21600 21600" draw:type="rectangle" draw:enhanced-path="M 0 0 L 21600 0 21600 21600 0 21600 0 0 Z N"/>
        </draw:custom-shape>
        <draw:custom-shape draw:name="Text 11" draw:style-name="gr2" draw:text-style-name="P3" draw:layer="layout" svg:width="7.111cm" svg:height="1.777cm" svg:x="9.271cm" svg:y="4.699cm">
          <text:p text:style-name="P4"><text:span text:style-name="T5">Repositories</text:span></text:p>
          <text:p text:style-name="P4"><text:span text:style-name="T5">Sources de données</text:span></text:p>
          <draw:enhanced-geometry svg:viewBox="0 0 21600 21600" draw:type="rectangle" draw:enhanced-path="M 0 0 L 21600 0 21600 21600 0 21600 0 0 Z N"/>
        </draw:custom-shape>
        <draw:custom-shape draw:name="Text 12" draw:style-name="gr2" draw:text-style-name="P3" draw:layer="layout" svg:width="7.111cm" svg:height="1.777cm" svg:x="9.271cm" svg:y="6.604cm">
          <text:p text:style-name="P4"><text:span text:style-name="T16">Accès à Isar,</text:span></text:p>
          <text:p text:style-name="P4"><text:span text:style-name="T16">API distantes</text:span></text:p>
          <draw:enhanced-geometry svg:viewBox="0 0 21600 21600" draw:type="rectangle" draw:enhanced-path="M 0 0 L 21600 0 21600 21600 0 21600 0 0 Z N"/>
        </draw:custom-shape>
        <draw:custom-shape draw:name="Text 13" draw:style-name="gr2" draw:text-style-name="P3" draw:layer="layout" svg:width="0.761cm" svg:height="1.269cm" svg:x="16.51cm" svg:y="5.08cm">
          <text:p text:style-name="P4"><text:span text:style-name="T17">→</text:span></text:p>
          <draw:enhanced-geometry svg:viewBox="0 0 21600 21600" draw:type="rectangle" draw:enhanced-path="M 0 0 L 21600 0 21600 21600 0 21600 0 0 Z N"/>
        </draw:custom-shape>
        <draw:custom-shape draw:name="Shape 14" draw:style-name="gr16" draw:text-style-name="P1" draw:layer="layout" svg:width="7.365cm" svg:height="5.587cm" svg:x="17.018cm" svg:y="3.175cm">
          <text:p/>
          <draw:enhanced-geometry svg:viewBox="0 0 21600 21600" draw:type="rectangle" draw:enhanced-path="M 0 0 L 21600 0 21600 21600 0 21600 0 0 Z N"/>
        </draw:custom-shape>
        <draw:custom-shape draw:name="Shape 15" draw:style-name="gr10" draw:text-style-name="P1" draw:layer="layout" svg:width="7.365cm" svg:height="1.218cm" svg:x="17.018cm" svg:y="3.175cm">
          <text:p/>
          <draw:enhanced-geometry svg:viewBox="0 0 21600 21600" draw:type="rectangle" draw:enhanced-path="M 0 0 L 21600 0 21600 21600 0 21600 0 0 Z N"/>
        </draw:custom-shape>
        <draw:custom-shape draw:name="Text 16" draw:style-name="gr2" draw:text-style-name="P3" draw:layer="layout" svg:width="7.111cm" svg:height="1.015cm" svg:x="17.145cm" svg:y="3.302cm">
          <text:p text:style-name="P4"><text:span text:style-name="T15">MÉTIER</text:span></text:p>
          <draw:enhanced-geometry svg:viewBox="0 0 21600 21600" draw:type="rectangle" draw:enhanced-path="M 0 0 L 21600 0 21600 21600 0 21600 0 0 Z N"/>
        </draw:custom-shape>
        <draw:custom-shape draw:name="Text 17" draw:style-name="gr2" draw:text-style-name="P3" draw:layer="layout" svg:width="7.111cm" svg:height="1.777cm" svg:x="17.145cm" svg:y="4.699cm">
          <text:p text:style-name="P4"><text:span text:style-name="T5">Modèles Freezed</text:span></text:p>
          <text:p text:style-name="P4"><text:span text:style-name="T5">Règles business</text:span></text:p>
          <draw:enhanced-geometry svg:viewBox="0 0 21600 21600" draw:type="rectangle" draw:enhanced-path="M 0 0 L 21600 0 21600 21600 0 21600 0 0 Z N"/>
        </draw:custom-shape>
        <draw:custom-shape draw:name="Text 18" draw:style-name="gr2" draw:text-style-name="P3" draw:layer="layout" svg:width="7.111cm" svg:height="1.777cm" svg:x="17.145cm" svg:y="6.604cm">
          <text:p text:style-name="P4"><text:span text:style-name="T16">Logique pure,</text:span></text:p>
          <text:p text:style-name="P4"><text:span text:style-name="T16">sans technologie</text:span></text:p>
          <draw:enhanced-geometry svg:viewBox="0 0 21600 21600" draw:type="rectangle" draw:enhanced-path="M 0 0 L 21600 0 21600 21600 0 21600 0 0 Z N"/>
        </draw:custom-shape>
        <draw:custom-shape draw:name="Text 19" draw:style-name="gr2" draw:text-style-name="P3" draw:layer="layout" svg:width="7.619cm" svg:height="0.761cm" svg:x="1.27cm" svg:y="9.144cm">
          <text:p text:style-name="P2"><text:span text:style-name="T15">9 modules Feature-First :</text:span></text:p>
          <draw:enhanced-geometry svg:viewBox="0 0 21600 21600" draw:type="rectangle" draw:enhanced-path="M 0 0 L 21600 0 21600 21600 0 21600 0 0 Z N"/>
        </draw:custom-shape>
        <draw:custom-shape draw:name="Shape 20" draw:style-name="gr1" draw:text-style-name="P1" draw:layer="layout" svg:width="7.111cm" svg:height="0.863cm" svg:x="1.27cm" svg:y="10.0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21" draw:style-name="gr2" draw:text-style-name="P3" draw:layer="layout" svg:width="7.111cm" svg:height="0.863cm" svg:x="1.27cm" svg:y="10.033cm">
          <text:p text:style-name="P4"><text:span text:style-name="T14">events/</text:span></text:p>
          <draw:enhanced-geometry svg:viewBox="0 0 21600 21600" draw:type="rectangle" draw:enhanced-path="M 0 0 L 21600 0 21600 21600 0 21600 0 0 Z N"/>
        </draw:custom-shape>
        <draw:custom-shape draw:name="Shape 22" draw:style-name="gr1" draw:text-style-name="P1" draw:layer="layout" svg:width="7.111cm" svg:height="0.863cm" svg:x="9.144cm" svg:y="10.0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23" draw:style-name="gr2" draw:text-style-name="P3" draw:layer="layout" svg:width="7.111cm" svg:height="0.863cm" svg:x="9.144cm" svg:y="10.033cm">
          <text:p text:style-name="P4"><text:span text:style-name="T14">tickets/</text:span></text:p>
          <draw:enhanced-geometry svg:viewBox="0 0 21600 21600" draw:type="rectangle" draw:enhanced-path="M 0 0 L 21600 0 21600 21600 0 21600 0 0 Z N"/>
        </draw:custom-shape>
        <draw:custom-shape draw:name="Shape 24" draw:style-name="gr1" draw:text-style-name="P1" draw:layer="layout" svg:width="7.111cm" svg:height="0.863cm" svg:x="17.018cm" svg:y="10.0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25" draw:style-name="gr2" draw:text-style-name="P3" draw:layer="layout" svg:width="7.111cm" svg:height="0.863cm" svg:x="17.018cm" svg:y="10.033cm">
          <text:p text:style-name="P4"><text:span text:style-name="T14">cart/</text:span></text:p>
          <draw:enhanced-geometry svg:viewBox="0 0 21600 21600" draw:type="rectangle" draw:enhanced-path="M 0 0 L 21600 0 21600 21600 0 21600 0 0 Z N"/>
        </draw:custom-shape>
        <draw:custom-shape draw:name="Shape 26" draw:style-name="gr1" draw:text-style-name="P1" draw:layer="layout" svg:width="7.111cm" svg:height="0.863cm" svg:x="1.27cm" svg:y="11.0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27" draw:style-name="gr2" draw:text-style-name="P3" draw:layer="layout" svg:width="7.111cm" svg:height="0.863cm" svg:x="1.27cm" svg:y="11.049cm">
          <text:p text:style-name="P4"><text:span text:style-name="T14">profile/</text:span></text:p>
          <draw:enhanced-geometry svg:viewBox="0 0 21600 21600" draw:type="rectangle" draw:enhanced-path="M 0 0 L 21600 0 21600 21600 0 21600 0 0 Z N"/>
        </draw:custom-shape>
        <draw:custom-shape draw:name="Shape 28" draw:style-name="gr11" draw:text-style-name="P1" draw:layer="layout" svg:width="7.111cm" svg:height="0.863cm" svg:x="9.144cm" svg:y="11.0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29" draw:style-name="gr2" draw:text-style-name="P3" draw:layer="layout" svg:width="7.111cm" svg:height="0.863cm" svg:x="9.144cm" svg:y="11.049cm">
          <text:p text:style-name="P4"><text:span text:style-name="T14">transport/</text:span></text:p>
          <draw:enhanced-geometry svg:viewBox="0 0 21600 21600" draw:type="rectangle" draw:enhanced-path="M 0 0 L 21600 0 21600 21600 0 21600 0 0 Z N"/>
        </draw:custom-shape>
        <draw:custom-shape draw:name="Shape 30" draw:style-name="gr11" draw:text-style-name="P1" draw:layer="layout" svg:width="7.111cm" svg:height="0.863cm" svg:x="17.018cm" svg:y="11.0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31" draw:style-name="gr2" draw:text-style-name="P3" draw:layer="layout" svg:width="7.111cm" svg:height="0.863cm" svg:x="17.018cm" svg:y="11.049cm">
          <text:p text:style-name="P4"><text:span text:style-name="T14">hebergement/</text:span></text:p>
          <draw:enhanced-geometry svg:viewBox="0 0 21600 21600" draw:type="rectangle" draw:enhanced-path="M 0 0 L 21600 0 21600 21600 0 21600 0 0 Z N"/>
        </draw:custom-shape>
        <draw:custom-shape draw:name="Shape 32" draw:style-name="gr11" draw:text-style-name="P1" draw:layer="layout" svg:width="7.111cm" svg:height="0.863cm" svg:x="1.27cm" svg:y="12.0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33" draw:style-name="gr2" draw:text-style-name="P3" draw:layer="layout" svg:width="7.111cm" svg:height="0.863cm" svg:x="1.27cm" svg:y="12.065cm">
          <text:p text:style-name="P4"><text:span text:style-name="T14">social/</text:span></text:p>
          <draw:enhanced-geometry svg:viewBox="0 0 21600 21600" draw:type="rectangle" draw:enhanced-path="M 0 0 L 21600 0 21600 21600 0 21600 0 0 Z N"/>
        </draw:custom-shape>
        <draw:custom-shape draw:name="Shape 34" draw:style-name="gr11" draw:text-style-name="P1" draw:layer="layout" svg:width="7.111cm" svg:height="0.863cm" svg:x="9.144cm" svg:y="12.0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35" draw:style-name="gr2" draw:text-style-name="P3" draw:layer="layout" svg:width="7.111cm" svg:height="0.863cm" svg:x="9.144cm" svg:y="12.065cm">
          <text:p text:style-name="P4"><text:span text:style-name="T14">b2b/</text:span></text:p>
          <draw:enhanced-geometry svg:viewBox="0 0 21600 21600" draw:type="rectangle" draw:enhanced-path="M 0 0 L 21600 0 21600 21600 0 21600 0 0 Z N"/>
        </draw:custom-shape>
        <draw:custom-shape draw:name="Shape 36" draw:style-name="gr11" draw:text-style-name="P1" draw:layer="layout" svg:width="7.111cm" svg:height="0.863cm" svg:x="17.018cm" svg:y="12.0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37" draw:style-name="gr2" draw:text-style-name="P3" draw:layer="layout" svg:width="7.111cm" svg:height="0.863cm" svg:x="17.018cm" svg:y="12.065cm">
          <text:p text:style-name="P4"><text:span text:style-name="T14">core/</text:span></text:p>
          <draw:enhanced-geometry svg:viewBox="0 0 21600 21600" draw:type="rectangle" draw:enhanced-path="M 0 0 L 21600 0 21600 21600 0 21600 0 0 Z N"/>
        </draw:custom-shape>
        <draw:custom-shape draw:name="Shape 38" draw:style-name="gr12" draw:text-style-name="P1" draw:layer="layout" svg:width="23.367cm" svg:height="0.812cm" svg:x="1.27cm" svg:y="12.954cm">
          <text:p/>
          <draw:enhanced-geometry svg:viewBox="0 0 21600 21600" draw:type="rectangle" draw:enhanced-path="M 0 0 L 21600 0 21600 21600 0 21600 0 0 Z N"/>
        </draw:custom-shape>
        <draw:custom-shape draw:name="Text 39" draw:style-name="gr2" draw:text-style-name="P3" draw:layer="layout" svg:width="22.351cm" svg:height="0.71cm" svg:x="1.651cm" svg:y="13.005cm">
          <text:p text:style-name="P2"><text:span text:style-name="T18">Règle de dépendance : Métier ne connaît ni l'interface ni la base de données. Changer de BDD = modifier uniquement la couche Données.</text:span></text:p>
          <draw:enhanced-geometry svg:viewBox="0 0 21600 21600" draw:type="rectangle" draw:enhanced-path="M 0 0 L 21600 0 21600 21600 0 21600 0 0 Z N"/>
        </draw:custom-shape>
        <presentation:notes draw:style-name="dp2">
          <draw:page-thumbnail draw:name="Slide Image Placeholder 1" draw:style-name="gr5" draw:layer="layout" svg:width="15.239cm" svg:height="8.572cm" svg:x="-0.2cm" svg:y="-11.6cm" draw:page-number="4" presentation:class="page"/>
          <draw:frame draw:name="Notes Placeholder 2" presentation:style-name="pr1" draw:text-style-name="P3" draw:layer="layout" svg:width="15.239cm" svg:height="10cm" svg:x="-0.2cm" svg:y="-1.8cm" presentation:class="notes" presentation:user-transformed="true">
            <draw:text-box>
              <text:p><text:span text:style-name="T8">SLIDE 4 — ARCHITECTURE (60-75 secondes)</text:span></text:p>
              <text:p><text:span text:style-name="T8"/></text:p>
              <text:p><text:span text:style-name="T8">SCRIPT ORAL :</text:span></text:p>
              <text:p><text:span text:style-name="T8">"Notre application est organisée selon la Clean Architecture. Concrètement, ça signifie que le code est découpé en 3 couches : la Présentation — ce que l'utilisateur voit, les Données — comment on accède à la base, et le Métier — les règles de l'application. La règle fondamentale : le Métier ne sait pas comment les données sont stockées, ni comment elles sont affichées. Résultat : si demain on change de base de données, on ne touche qu'à la couche Données — les 8 autres modules ne bougent pas."</text:span></text:p>
              <text:p><text:span text:style-name="T8"/></text:p>
              <text:p><text:span text:style-name="T8">POINT CLÉ — FEATURE-FIRST :</text:span></text:p>
              <text:p><text:span text:style-name="T8">→ </text:span><text:span text:style-name="T8">"Au lieu de mettre tous les écrans dans un dossier, tous les modèles dans un autre — on regroupe par fonctionnalité. Quand Islem travaille sur le transport et Manon sur le profil, ils ne sont jamais dans le même fichier."</text:span></text:p>
              <text:p><text:span text:style-name="T8"/></text:p>
              <text:p><text:span text:style-name="T8">QUESTIONS POSSIBLES :</text:span></text:p>
              <text:p><text:span text:style-name="T8">Q: "C'est beaucoup de complexité pour un projet scolaire, non ?"</text:span></text:p>
              <text:p><text:span text:style-name="T8">R: "Au contraire — on a 9 features dans le CDC. Sans cette structure, chaque ajout aurait des effets de bord imprévisibles. Le surcoût initial est de 2-3 heures de setup, récupéré dès la 2e feature."</text:span></text:p>
              <text:p><text:span text:style-name="T8"/></text:p>
              <text:p><text:span text:style-name="T8">Q: "Qu'est-ce que Riverpod ?"</text:span></text:p>
              <text:p><text:span text:style-name="T8">R: "C'est notre gestionnaire d'état. Quand le panier change, tous les écrans qui l'affichent se mettent à jour automatiquement, sans qu'on gère manuellement les notifications. Et toutes les erreurs sont détectées à la compilation, pas en production."</text:span></text:p>
            </draw:text-box>
          </draw:frame>
          <draw:frame draw:name="Slide Number Placeholder 3" presentation:style-name="pr2" draw:text-style-name="P6" draw:layer="layout" svg:width="8.254cm" svg:height="1.273cm" svg:x="10.791cm" svg:y="24.126cm" presentation:class="page-number" presentation:user-transformed="true">
            <draw:text-box>
              <text:p text:style-name="P5"><text:span text:style-name="T9"><text:page-number>&lt;numéro&gt;</text:page-number></text:span></text:p>
            </draw:text-box>
          </draw:frame>
        </presentation:notes>
      </draw:page>
      <draw:page draw:name="Slide 5" draw:style-name="dp3" draw:master-page-name="Standard">
        <draw:custom-shape draw:name="Text 0" draw:style-name="gr2" draw:text-style-name="P3" draw:layer="layout" svg:width="22.859cm" svg:height="1.269cm" svg:x="1.27cm" svg:y="0.508cm">
          <text:p text:style-name="P2"><text:span text:style-name="T13">ERD — Base de données Isar</text:span></text:p>
          <draw:enhanced-geometry svg:viewBox="0 0 21600 21600" draw:type="rectangle" draw:enhanced-path="M 0 0 L 21600 0 21600 21600 0 21600 0 0 Z N"/>
        </draw:custom-shape>
        <draw:custom-shape draw:name="Text 1" draw:style-name="gr2" draw:text-style-name="P3" draw:layer="layout" svg:width="22.859cm" svg:height="0.71cm" svg:x="1.27cm" svg:y="1.829cm">
          <text:p text:style-name="P2"><text:span text:style-name="T12">5 collections NoSQL · Offline-first · Synchronisation Firebase</text:span></text:p>
          <draw:enhanced-geometry svg:viewBox="0 0 21600 21600" draw:type="rectangle" draw:enhanced-path="M 0 0 L 21600 0 21600 21600 0 21600 0 0 Z N"/>
        </draw:custom-shape>
        <draw:frame draw:name="Image 0" draw:style-name="gr17" draw:text-style-name="P7" draw:layer="layout" svg:width="14.731cm" svg:height="10.921cm" svg:x="1.27cm" svg:y="2.667cm">
          <draw:image xlink:href="Pictures/100000000000096000000708F0843942.png" xlink:type="simple" xlink:show="embed" xlink:actuate="onLoad">
            <text:p/>
          </draw:image>
        </draw:frame>
        <draw:custom-shape draw:name="Shape 2" draw:style-name="gr18" draw:text-style-name="P1" draw:layer="layout" svg:width="8.127cm" svg:height="1.98cm" svg:x="16.637cm" svg:y="2.667cm">
          <text:p/>
          <draw:enhanced-geometry svg:viewBox="0 0 21600 21600" draw:type="rectangle" draw:enhanced-path="M 0 0 L 21600 0 21600 21600 0 21600 0 0 Z N"/>
        </draw:custom-shape>
        <draw:custom-shape draw:name="Shape 3" draw:style-name="gr1" draw:text-style-name="P1" draw:layer="layout" svg:width="0.304cm" svg:height="1.98cm" svg:x="16.637cm" svg:y="2.667cm">
          <text:p/>
          <draw:enhanced-geometry svg:viewBox="0 0 21600 21600" draw:type="rectangle" draw:enhanced-path="M 0 0 L 21600 0 21600 21600 0 21600 0 0 Z N"/>
        </draw:custom-shape>
        <draw:custom-shape draw:name="Text 4" draw:style-name="gr2" draw:text-style-name="P3" draw:layer="layout" svg:width="7.619cm" svg:height="0.71cm" svg:x="17.145cm" svg:y="2.794cm">
          <text:p text:style-name="P2"><text:span text:style-name="T4">IsarUserProfile</text:span></text:p>
          <draw:enhanced-geometry svg:viewBox="0 0 21600 21600" draw:type="rectangle" draw:enhanced-path="M 0 0 L 21600 0 21600 21600 0 21600 0 0 Z N"/>
        </draw:custom-shape>
        <draw:custom-shape draw:name="Text 5" draw:style-name="gr2" draw:text-style-name="P3" draw:layer="layout" svg:width="7.619cm" svg:height="0.888cm" svg:x="17.145cm" svg:y="3.505cm">
          <text:p text:style-name="P2"><text:span text:style-name="T6">Profil unique + éco-score + préférences</text:span></text:p>
          <draw:enhanced-geometry svg:viewBox="0 0 21600 21600" draw:type="rectangle" draw:enhanced-path="M 0 0 L 21600 0 21600 21600 0 21600 0 0 Z N"/>
        </draw:custom-shape>
        <draw:custom-shape draw:name="Shape 6" draw:style-name="gr13" draw:text-style-name="P1" draw:layer="layout" svg:width="8.127cm" svg:height="1.98cm" svg:x="16.637cm" svg:y="4.851cm">
          <text:p/>
          <draw:enhanced-geometry svg:viewBox="0 0 21600 21600" draw:type="rectangle" draw:enhanced-path="M 0 0 L 21600 0 21600 21600 0 21600 0 0 Z N"/>
        </draw:custom-shape>
        <draw:custom-shape draw:name="Shape 7" draw:style-name="gr14" draw:text-style-name="P1" draw:layer="layout" svg:width="0.304cm" svg:height="1.98cm" svg:x="16.637cm" svg:y="4.851cm">
          <text:p/>
          <draw:enhanced-geometry svg:viewBox="0 0 21600 21600" draw:type="rectangle" draw:enhanced-path="M 0 0 L 21600 0 21600 21600 0 21600 0 0 Z N"/>
        </draw:custom-shape>
        <draw:custom-shape draw:name="Text 8" draw:style-name="gr2" draw:text-style-name="P3" draw:layer="layout" svg:width="7.619cm" svg:height="0.71cm" svg:x="17.145cm" svg:y="4.978cm">
          <text:p text:style-name="P2"><text:span text:style-name="T4">IsarEvent</text:span></text:p>
          <draw:enhanced-geometry svg:viewBox="0 0 21600 21600" draw:type="rectangle" draw:enhanced-path="M 0 0 L 21600 0 21600 21600 0 21600 0 0 Z N"/>
        </draw:custom-shape>
        <draw:custom-shape draw:name="Text 9" draw:style-name="gr2" draw:text-style-name="P3" draw:layer="layout" svg:width="7.619cm" svg:height="0.888cm" svg:x="17.145cm" svg:y="5.69cm">
          <text:p text:style-name="P2"><text:span text:style-name="T6">Catalogue dénormalisé, offline-ready</text:span></text:p>
          <draw:enhanced-geometry svg:viewBox="0 0 21600 21600" draw:type="rectangle" draw:enhanced-path="M 0 0 L 21600 0 21600 21600 0 21600 0 0 Z N"/>
        </draw:custom-shape>
        <draw:custom-shape draw:name="Shape 10" draw:style-name="gr16" draw:text-style-name="P1" draw:layer="layout" svg:width="8.127cm" svg:height="1.98cm" svg:x="16.637cm" svg:y="7.036cm">
          <text:p/>
          <draw:enhanced-geometry svg:viewBox="0 0 21600 21600" draw:type="rectangle" draw:enhanced-path="M 0 0 L 21600 0 21600 21600 0 21600 0 0 Z N"/>
        </draw:custom-shape>
        <draw:custom-shape draw:name="Shape 11" draw:style-name="gr10" draw:text-style-name="P1" draw:layer="layout" svg:width="0.304cm" svg:height="1.98cm" svg:x="16.637cm" svg:y="7.036cm">
          <text:p/>
          <draw:enhanced-geometry svg:viewBox="0 0 21600 21600" draw:type="rectangle" draw:enhanced-path="M 0 0 L 21600 0 21600 21600 0 21600 0 0 Z N"/>
        </draw:custom-shape>
        <draw:custom-shape draw:name="Text 12" draw:style-name="gr2" draw:text-style-name="P3" draw:layer="layout" svg:width="7.619cm" svg:height="0.71cm" svg:x="17.145cm" svg:y="7.163cm">
          <text:p text:style-name="P2"><text:span text:style-name="T4">IsarTicket</text:span></text:p>
          <draw:enhanced-geometry svg:viewBox="0 0 21600 21600" draw:type="rectangle" draw:enhanced-path="M 0 0 L 21600 0 21600 21600 0 21600 0 0 Z N"/>
        </draw:custom-shape>
        <draw:custom-shape draw:name="Text 13" draw:style-name="gr2" draw:text-style-name="P3" draw:layer="layout" svg:width="7.619cm" svg:height="0.888cm" svg:x="17.145cm" svg:y="7.874cm">
          <text:p text:style-name="P2"><text:span text:style-name="T6">Billet + QR code HMAC-SHA256</text:span></text:p>
          <draw:enhanced-geometry svg:viewBox="0 0 21600 21600" draw:type="rectangle" draw:enhanced-path="M 0 0 L 21600 0 21600 21600 0 21600 0 0 Z N"/>
        </draw:custom-shape>
        <draw:custom-shape draw:name="Shape 14" draw:style-name="gr15" draw:text-style-name="P1" draw:layer="layout" svg:width="8.127cm" svg:height="1.98cm" svg:x="16.637cm" svg:y="9.22cm">
          <text:p/>
          <draw:enhanced-geometry svg:viewBox="0 0 21600 21600" draw:type="rectangle" draw:enhanced-path="M 0 0 L 21600 0 21600 21600 0 21600 0 0 Z N"/>
        </draw:custom-shape>
        <draw:custom-shape draw:name="Shape 15" draw:style-name="gr11" draw:text-style-name="P1" draw:layer="layout" svg:width="0.304cm" svg:height="1.98cm" svg:x="16.637cm" svg:y="9.22cm">
          <text:p/>
          <draw:enhanced-geometry svg:viewBox="0 0 21600 21600" draw:type="rectangle" draw:enhanced-path="M 0 0 L 21600 0 21600 21600 0 21600 0 0 Z N"/>
        </draw:custom-shape>
        <draw:custom-shape draw:name="Text 16" draw:style-name="gr2" draw:text-style-name="P3" draw:layer="layout" svg:width="7.619cm" svg:height="0.71cm" svg:x="17.145cm" svg:y="9.347cm">
          <text:p text:style-name="P2"><text:span text:style-name="T4">IsarCartItem</text:span></text:p>
          <draw:enhanced-geometry svg:viewBox="0 0 21600 21600" draw:type="rectangle" draw:enhanced-path="M 0 0 L 21600 0 21600 21600 0 21600 0 0 Z N"/>
        </draw:custom-shape>
        <draw:custom-shape draw:name="Text 17" draw:style-name="gr2" draw:text-style-name="P3" draw:layer="layout" svg:width="7.619cm" svg:height="0.888cm" svg:x="17.145cm" svg:y="10.058cm">
          <text:p text:style-name="P2"><text:span text:style-name="T6">Panier → devient Ticket au checkout</text:span></text:p>
          <draw:enhanced-geometry svg:viewBox="0 0 21600 21600" draw:type="rectangle" draw:enhanced-path="M 0 0 L 21600 0 21600 21600 0 21600 0 0 Z N"/>
        </draw:custom-shape>
        <draw:custom-shape draw:name="Shape 18" draw:style-name="gr19" draw:text-style-name="P1" draw:layer="layout" svg:width="8.127cm" svg:height="1.98cm" svg:x="16.637cm" svg:y="11.405cm">
          <text:p/>
          <draw:enhanced-geometry svg:viewBox="0 0 21600 21600" draw:type="rectangle" draw:enhanced-path="M 0 0 L 21600 0 21600 21600 0 21600 0 0 Z N"/>
        </draw:custom-shape>
        <draw:custom-shape draw:name="Shape 19" draw:style-name="gr20" draw:text-style-name="P1" draw:layer="layout" svg:width="0.304cm" svg:height="1.98cm" svg:x="16.637cm" svg:y="11.405cm">
          <text:p/>
          <draw:enhanced-geometry svg:viewBox="0 0 21600 21600" draw:type="rectangle" draw:enhanced-path="M 0 0 L 21600 0 21600 21600 0 21600 0 0 Z N"/>
        </draw:custom-shape>
        <draw:custom-shape draw:name="Text 20" draw:style-name="gr2" draw:text-style-name="P3" draw:layer="layout" svg:width="7.619cm" svg:height="0.71cm" svg:x="17.145cm" svg:y="11.532cm">
          <text:p text:style-name="P2"><text:span text:style-name="T4">IsarFavorite</text:span></text:p>
          <draw:enhanced-geometry svg:viewBox="0 0 21600 21600" draw:type="rectangle" draw:enhanced-path="M 0 0 L 21600 0 21600 21600 0 21600 0 0 Z N"/>
        </draw:custom-shape>
        <draw:custom-shape draw:name="Text 21" draw:style-name="gr2" draw:text-style-name="P3" draw:layer="layout" svg:width="7.619cm" svg:height="0.888cm" svg:x="17.145cm" svg:y="12.243cm">
          <text:p text:style-name="P2"><text:span text:style-name="T6">Index unique par eventId</text:span></text:p>
          <draw:enhanced-geometry svg:viewBox="0 0 21600 21600" draw:type="rectangle" draw:enhanced-path="M 0 0 L 21600 0 21600 21600 0 21600 0 0 Z N"/>
        </draw:custom-shape>
        <presentation:notes draw:style-name="dp2">
          <draw:page-thumbnail draw:name="Slide Image Placeholder 1" draw:style-name="gr5" draw:layer="layout" svg:width="15.239cm" svg:height="8.572cm" svg:x="-0.4cm" svg:y="-12.7cm" draw:page-number="5" presentation:class="page"/>
          <draw:frame draw:name="Notes Placeholder 2" presentation:style-name="pr1" draw:text-style-name="P3" draw:layer="layout" svg:width="15.239cm" svg:height="10.2cm" svg:x="-0.639cm" svg:y="-3.4cm" presentation:class="notes" presentation:user-transformed="true">
            <draw:text-box>
              <text:p><text:span text:style-name="T8">SLIDE 5 — ERD (60-75 secondes)</text:span></text:p>
              <text:p><text:span text:style-name="T8"/></text:p>
              <text:p><text:span text:style-name="T8">SCRIPT ORAL :</text:span></text:p>
              <text:p><text:span text:style-name="T8">"Notre base de données locale utilise Isar — une base NoSQL qui vit directement sur le téléphone. On a 5 collections. IsarUserProfile stocke le profil de l'utilisateur avec son éco-score. IsarEvent contient le catalogue d'événements — il est intentionnellement dénormalisé, c'est-à-dire que chaque événement porte toutes ses informations, pour qu'on puisse l'afficher même sans réseau. IsarTicket contient les billets avec le QR code signé cryptographiquement. IsarCartItem est le panier temporaire — il devient des billets après paiement. Et IsarFavorite est une table de jonction simple pour les favoris."</text:span></text:p>
              <text:p><text:span text:style-name="T8"/></text:p>
              <text:p><text:span text:style-name="T8">DÉNORMALISATION — POINT IMPORTANT :</text:span></text:p>
              <text:p><text:span text:style-name="T8">→ </text:span><text:span text:style-name="T8">"Vous noterez que IsarTicket copie le nom et le lieu de l'événement. En SQL pur, c'est une faute — on ferait une jointure. Mais ici c'est voulu : c'est un snapshot transactionnel. Si l'organisateur change le nom de l'événement après la vente, le billet doit conserver l'ancienne information."</text:span></text:p>
              <text:p><text:span text:style-name="T8"/></text:p>
              <text:p><text:span text:style-name="T8">QUESTIONS POSSIBLES :</text:span></text:p>
              <text:p><text:span text:style-name="T8">Q: "Pourquoi NoSQL et pas SQL ?"</text:span></text:p>
              <text:p><text:span text:style-name="T8">R: "Isar fait 250 000 opérations par seconde sur mobile — largement au-dessus de SQLite. Et en mode offline-first, chaque document doit être auto-suffisant : pas de jointures possibles sans réseau. C'est exactement le pattern MongoDB/Firestore."</text:span></text:p>
              <text:p><text:span text:style-name="T8"/></text:p>
              <text:p><text:span text:style-name="T8">Q: "Isar ne supporte pas Flutter Web, non ?"</text:span></text:p>
              <text:p><text:span text:style-name="T8">R: "C'est exact, c'est un risque documenté dans notre CDC. La mitigation : notre couche Repository abstrait l'accès à la base. Si on cible le web en V2, on migre vers Hive CE en 2-3 jours sans toucher aux écrans."</text:span></text:p>
            </draw:text-box>
          </draw:frame>
          <draw:frame draw:name="Slide Number Placeholder 3" presentation:style-name="pr2" draw:text-style-name="P6" draw:layer="layout" svg:width="8.254cm" svg:height="1.273cm" svg:x="10.791cm" svg:y="24.126cm" presentation:class="page-number" presentation:user-transformed="true">
            <draw:text-box>
              <text:p text:style-name="P5"><text:span text:style-name="T9"><text:page-number>&lt;numéro&gt;</text:page-number></text:span></text:p>
            </draw:text-box>
          </draw:frame>
        </presentation:notes>
      </draw:page>
      <draw:page draw:name="Slide 6" draw:style-name="dp3" draw:master-page-name="Standard">
        <draw:custom-shape draw:name="Text 0" draw:style-name="gr2" draw:text-style-name="P3" draw:layer="layout" svg:width="22.859cm" svg:height="1.269cm" svg:x="1.27cm" svg:y="0.508cm">
          <text:p text:style-name="P2"><text:span text:style-name="T13">MCD &amp; MLD — Modélisation Merise</text:span></text:p>
          <draw:enhanced-geometry svg:viewBox="0 0 21600 21600" draw:type="rectangle" draw:enhanced-path="M 0 0 L 21600 0 21600 21600 0 21600 0 0 Z N"/>
        </draw:custom-shape>
        <draw:custom-shape draw:name="Text 1" draw:style-name="gr2" draw:text-style-name="P3" draw:layer="layout" svg:width="22.859cm" svg:height="0.71cm" svg:x="1.27cm" svg:y="1.829cm">
          <text:p text:style-name="P2"><text:span text:style-name="T12">Du conceptuel (entités métier) au logique (tables SQL) — 3 règles de passage Merise</text:span></text:p>
          <draw:enhanced-geometry svg:viewBox="0 0 21600 21600" draw:type="rectangle" draw:enhanced-path="M 0 0 L 21600 0 21600 21600 0 21600 0 0 Z N"/>
        </draw:custom-shape>
        <draw:frame draw:name="Image 0" draw:style-name="gr17" draw:text-style-name="P7" draw:layer="layout" svg:width="11.683cm" svg:height="8.889cm" svg:x="0.762cm" svg:y="2.667cm">
          <draw:image xlink:href="Pictures/1000020100000960000007085420D367.png" xlink:type="simple" xlink:show="embed" xlink:actuate="onLoad">
            <text:p/>
          </draw:image>
        </draw:frame>
        <draw:custom-shape draw:name="Text 2" draw:style-name="gr2" draw:text-style-name="P3" draw:layer="layout" svg:width="11.683cm" svg:height="0.761cm" svg:x="0.762cm" svg:y="11.684cm">
          <text:p text:style-name="P4"><text:span text:style-name="T14">MCD — Conceptuel</text:span></text:p>
          <draw:enhanced-geometry svg:viewBox="0 0 21600 21600" draw:type="rectangle" draw:enhanced-path="M 0 0 L 21600 0 21600 21600 0 21600 0 0 Z N"/>
        </draw:custom-shape>
        <draw:custom-shape draw:name="Text 3" draw:style-name="gr2" draw:text-style-name="P3" draw:layer="layout" svg:width="1.523cm" svg:height="1.523cm" svg:x="12.7cm" svg:y="6.35cm">
          <text:p text:style-name="P4"><text:span text:style-name="T10">→</text:span></text:p>
          <draw:enhanced-geometry svg:viewBox="0 0 21600 21600" draw:type="rectangle" draw:enhanced-path="M 0 0 L 21600 0 21600 21600 0 21600 0 0 Z N"/>
        </draw:custom-shape>
        <draw:frame draw:name="Image 1" draw:style-name="gr17" draw:text-style-name="P7" draw:layer="layout" svg:width="10.159cm" svg:height="8.889cm" svg:x="14.478cm" svg:y="2.667cm">
          <draw:image xlink:href="Pictures/1000020100000960000006A4278DD498.png" xlink:type="simple" xlink:show="embed" xlink:actuate="onLoad">
            <text:p/>
          </draw:image>
        </draw:frame>
        <draw:custom-shape draw:name="Text 4" draw:style-name="gr2" draw:text-style-name="P3" draw:layer="layout" svg:width="10.159cm" svg:height="0.761cm" svg:x="14.478cm" svg:y="11.684cm">
          <text:p text:style-name="P4"><text:span text:style-name="T14">MLD — Logique</text:span></text:p>
          <draw:enhanced-geometry svg:viewBox="0 0 21600 21600" draw:type="rectangle" draw:enhanced-path="M 0 0 L 21600 0 21600 21600 0 21600 0 0 Z N"/>
        </draw:custom-shape>
        <draw:custom-shape draw:name="Shape 5" draw:style-name="gr1" draw:text-style-name="P1" draw:layer="layout" svg:width="1.066cm" svg:height="1.066cm" svg:x="1.27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6" draw:style-name="gr2" draw:text-style-name="P3" draw:layer="layout" svg:width="1.066cm" svg:height="1.066cm" svg:x="1.27cm" svg:y="12.7cm">
          <text:p text:style-name="P4"><text:span text:style-name="T19">1</text:span></text:p>
          <draw:enhanced-geometry svg:viewBox="0 0 21600 21600" draw:type="rectangle" draw:enhanced-path="M 0 0 L 21600 0 21600 21600 0 21600 0 0 Z N"/>
        </draw:custom-shape>
        <draw:custom-shape draw:name="Text 7" draw:style-name="gr2" draw:text-style-name="P3" draw:layer="layout" svg:width="7.111cm" svg:height="0.964cm" svg:x="2.591cm" svg:y="12.751cm">
          <text:p text:style-name="P2"><text:span text:style-name="T5">Chaque entité → table</text:span></text:p>
          <draw:enhanced-geometry svg:viewBox="0 0 21600 21600" draw:type="rectangle" draw:enhanced-path="M 0 0 L 21600 0 21600 21600 0 21600 0 0 Z N"/>
        </draw:custom-shape>
        <draw:custom-shape draw:name="Shape 8" draw:style-name="gr10" draw:text-style-name="P1" draw:layer="layout" svg:width="1.066cm" svg:height="1.066cm" svg:x="9.144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9" draw:style-name="gr2" draw:text-style-name="P3" draw:layer="layout" svg:width="1.066cm" svg:height="1.066cm" svg:x="9.144cm" svg:y="12.7cm">
          <text:p text:style-name="P4"><text:span text:style-name="T19">2</text:span></text:p>
          <draw:enhanced-geometry svg:viewBox="0 0 21600 21600" draw:type="rectangle" draw:enhanced-path="M 0 0 L 21600 0 21600 21600 0 21600 0 0 Z N"/>
        </draw:custom-shape>
        <draw:custom-shape draw:name="Text 10" draw:style-name="gr2" draw:text-style-name="P3" draw:layer="layout" svg:width="7.111cm" svg:height="0.964cm" svg:x="10.465cm" svg:y="12.751cm">
          <text:p text:style-name="P2"><text:span text:style-name="T5">Identifiant → clé primaire (PK)</text:span></text:p>
          <draw:enhanced-geometry svg:viewBox="0 0 21600 21600" draw:type="rectangle" draw:enhanced-path="M 0 0 L 21600 0 21600 21600 0 21600 0 0 Z N"/>
        </draw:custom-shape>
        <draw:custom-shape draw:name="Shape 11" draw:style-name="gr20" draw:text-style-name="P1" draw:layer="layout" svg:width="1.066cm" svg:height="1.066cm" svg:x="17.018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12" draw:style-name="gr2" draw:text-style-name="P3" draw:layer="layout" svg:width="1.066cm" svg:height="1.066cm" svg:x="17.018cm" svg:y="12.7cm">
          <text:p text:style-name="P4"><text:span text:style-name="T19">3</text:span></text:p>
          <draw:enhanced-geometry svg:viewBox="0 0 21600 21600" draw:type="rectangle" draw:enhanced-path="M 0 0 L 21600 0 21600 21600 0 21600 0 0 Z N"/>
        </draw:custom-shape>
        <draw:custom-shape draw:name="Text 13" draw:style-name="gr2" draw:text-style-name="P3" draw:layer="layout" svg:width="7.111cm" svg:height="0.964cm" svg:x="18.339cm" svg:y="12.751cm">
          <text:p text:style-name="P2"><text:span text:style-name="T5">Association 1,N → clé étrangère (FK)</text:span></text:p>
          <draw:enhanced-geometry svg:viewBox="0 0 21600 21600" draw:type="rectangle" draw:enhanced-path="M 0 0 L 21600 0 21600 21600 0 21600 0 0 Z N"/>
        </draw:custom-shape>
        <presentation:notes draw:style-name="dp2">
          <draw:page-thumbnail draw:name="Slide Image Placeholder 1" draw:style-name="gr5" draw:layer="layout" svg:width="15.239cm" svg:height="8.572cm" svg:x="-0.2cm" svg:y="-10.972cm" draw:page-number="6" presentation:class="page"/>
          <draw:frame draw:name="Notes Placeholder 2" presentation:style-name="pr1" draw:text-style-name="P3" draw:layer="layout" svg:width="15.239cm" svg:height="10cm" svg:x="-0.039cm" svg:y="-2.2cm" presentation:class="notes" presentation:user-transformed="true">
            <draw:text-box>
              <text:p><text:span text:style-name="T8">SLIDE 6 — MCD / MLD (60 secondes)</text:span></text:p>
              <text:p><text:span text:style-name="T8"/></text:p>
              <text:p><text:span text:style-name="T8">SCRIPT ORAL :</text:span></text:p>
              <text:p><text:span text:style-name="T8">"La méthode Merise demande de concevoir les données en deux étapes. D'abord le MCD — le Modèle Conceptuel — qui représente les entités métier et leurs associations, sans penser à la technologie. On voit ici nos 5 entités : Utilisateur, Événement, Billet, Panier et Favori. Ensuite, on applique 3 règles mécaniques pour obtenir le MLD — le Modèle Logique. Règle 1 : chaque entité devient une table. Règle 2 : son identifiant devient la clé primaire. Règle 3 : chaque association 1 à N se traduit par une clé étrangère dans la table côté N."</text:span></text:p>
              <text:p><text:span text:style-name="T8"/></text:p>
              <text:p><text:span text:style-name="T8">POINT CLÉ :</text:span></text:p>
              <text:p><text:span text:style-name="T8">→ </text:span><text:span text:style-name="T8">"Le MCD dit QUOI. Le MLD dit COMMENT stocker. L'ERD qu'on a vu avant dit COMMENT c'est réellement implémenté dans Isar."</text:span></text:p>
              <text:p><text:span text:style-name="T8">→ </text:span><text:span text:style-name="T8">"La cardinalité 1,N de ACHÈTE signifie qu'un utilisateur peut acheter plusieurs billets, mais chaque billet appartient à un seul utilisateur."</text:span></text:p>
              <text:p><text:span text:style-name="T8"/></text:p>
              <text:p><text:span text:style-name="T8">QUESTIONS POSSIBLES :</text:span></text:p>
              <text:p><text:span text:style-name="T8">Q: "Pourquoi faire un MLD si vous n'utilisez pas SQL ?"</text:span></text:p>
              <text:p><text:span text:style-name="T8">R: "Deux raisons. D'abord, c'est un exercice pédagogique qui montre qu'on maîtrise la modélisation relationnelle. Ensuite, si en V2 on ajoute un back-end PostgreSQL pour les données serveur, ce MLD est directement utilisable. La couche mobile Isar et le back-end SQL peuvent coexister."</text:span></text:p>
              <text:p><text:span text:style-name="T8"/></text:p>
              <text:p><text:span text:style-name="T8">Q: "Les cardinalités de l'association FAVORI sont-elles correctes ?"</text:span></text:p>
              <text:p><text:span text:style-name="T8">R: "Oui — c'est une association N:N avec un attribut propre (dateAjout), donc on la modélise comme une entité-association. Un utilisateur peut avoir 0 à N favoris, et un événement peut être favori de 0 à N utilisateurs."</text:span></text:p>
            </draw:text-box>
          </draw:frame>
          <draw:frame draw:name="Slide Number Placeholder 3" presentation:style-name="pr2" draw:text-style-name="P6" draw:layer="layout" svg:width="8.254cm" svg:height="1.273cm" svg:x="10.791cm" svg:y="24.126cm" presentation:class="page-number" presentation:user-transformed="true">
            <draw:text-box>
              <text:p text:style-name="P5"><text:span text:style-name="T9"><text:page-number>&lt;numéro&gt;</text:page-number></text:span></text:p>
            </draw:text-box>
          </draw:frame>
        </presentation:notes>
      </draw:page>
      <draw:page draw:name="Slide 7" draw:style-name="dp3" draw:master-page-name="Standard">
        <draw:custom-shape draw:name="Text 0" draw:style-name="gr2" draw:text-style-name="P3" draw:layer="layout" svg:width="22.859cm" svg:height="1.269cm" svg:x="1.27cm" svg:y="0.508cm">
          <text:p text:style-name="P2"><text:span text:style-name="T13">Classes &amp; Activité UML</text:span></text:p>
          <draw:enhanced-geometry svg:viewBox="0 0 21600 21600" draw:type="rectangle" draw:enhanced-path="M 0 0 L 21600 0 21600 21600 0 21600 0 0 Z N"/>
        </draw:custom-shape>
        <draw:custom-shape draw:name="Text 1" draw:style-name="gr2" draw:text-style-name="P3" draw:layer="layout" svg:width="22.859cm" svg:height="0.71cm" svg:x="1.27cm" svg:y="1.829cm">
          <text:p text:style-name="P2"><text:span text:style-name="T12">Structure objet du code Flutter · Flux de contrôle du parcours principal</text:span></text:p>
          <draw:enhanced-geometry svg:viewBox="0 0 21600 21600" draw:type="rectangle" draw:enhanced-path="M 0 0 L 21600 0 21600 21600 0 21600 0 0 Z N"/>
        </draw:custom-shape>
        <draw:frame draw:name="Image 0" draw:style-name="gr17" draw:text-style-name="P7" draw:layer="layout" svg:width="13.969cm" svg:height="9.651cm" svg:x="0.762cm" svg:y="2.54cm">
          <draw:image xlink:href="Pictures/1000020100000960000006DA72FBD4DF.png" xlink:type="simple" xlink:show="embed" xlink:actuate="onLoad">
            <text:p/>
          </draw:image>
        </draw:frame>
        <draw:custom-shape draw:name="Text 2" draw:style-name="gr2" draw:text-style-name="P3" draw:layer="layout" svg:width="13.969cm" svg:height="0.71cm" svg:x="0.762cm" svg:y="12.243cm">
          <text:p text:style-name="P4"><text:span text:style-name="T14">Diagramme de Classes</text:span></text:p>
          <draw:enhanced-geometry svg:viewBox="0 0 21600 21600" draw:type="rectangle" draw:enhanced-path="M 0 0 L 21600 0 21600 21600 0 21600 0 0 Z N"/>
        </draw:custom-shape>
        <draw:frame draw:name="Image 1" draw:style-name="gr17" draw:text-style-name="P7" draw:layer="layout" svg:width="9.651cm" svg:height="9.651cm" svg:x="15.24cm" svg:y="2.54cm">
          <draw:image xlink:href="Pictures/100002010000096000000D201C0A9194.png" xlink:type="simple" xlink:show="embed" xlink:actuate="onLoad">
            <text:p/>
          </draw:image>
        </draw:frame>
        <draw:custom-shape draw:name="Text 3" draw:style-name="gr2" draw:text-style-name="P3" draw:layer="layout" svg:width="9.651cm" svg:height="0.71cm" svg:x="15.24cm" svg:y="12.243cm">
          <text:p text:style-name="P4"><text:span text:style-name="T14">Diagramme d'Activité</text:span></text:p>
          <draw:enhanced-geometry svg:viewBox="0 0 21600 21600" draw:type="rectangle" draw:enhanced-path="M 0 0 L 21600 0 21600 21600 0 21600 0 0 Z N"/>
        </draw:custom-shape>
        <draw:custom-shape draw:name="Shape 4" draw:style-name="gr1" draw:text-style-name="P1" draw:layer="layout" svg:width="0.253cm" svg:height="0.253cm" svg:x="0.762cm" svg:y="13.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5" draw:style-name="gr2" draw:text-style-name="P3" draw:layer="layout" svg:width="24.129cm" svg:height="0.558cm" svg:x="0.762cm" svg:y="13.081cm">
          <text:p text:style-name="P2"><text:span text:style-name="T18">● </text:span><text:span text:style-name="T18">5 modèles Freezed immutables (domain)</text:span></text:p>
          <draw:enhanced-geometry svg:viewBox="0 0 21600 21600" draw:type="rectangle" draw:enhanced-path="M 0 0 L 21600 0 21600 21600 0 21600 0 0 Z N"/>
        </draw:custom-shape>
        <draw:custom-shape draw:name="Shape 6" draw:style-name="gr10" draw:text-style-name="P1" draw:layer="layout" svg:width="0.253cm" svg:height="0.253cm" svg:x="0.762cm" svg:y="13.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7" draw:style-name="gr2" draw:text-style-name="P3" draw:layer="layout" svg:width="24.129cm" svg:height="0.558cm" svg:x="0.762cm" svg:y="13.081cm">
          <text:p text:style-name="P2"><text:span text:style-name="T18">● </text:span><text:span text:style-name="T18">3 repositories (data) → IsarService</text:span></text:p>
          <draw:enhanced-geometry svg:viewBox="0 0 21600 21600" draw:type="rectangle" draw:enhanced-path="M 0 0 L 21600 0 21600 21600 0 21600 0 0 Z N"/>
        </draw:custom-shape>
        <draw:custom-shape draw:name="Shape 8" draw:style-name="gr11" draw:text-style-name="P1" draw:layer="layout" svg:width="0.253cm" svg:height="0.253cm" svg:x="0.762cm" svg:y="13.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9" draw:style-name="gr2" draw:text-style-name="P3" draw:layer="layout" svg:width="24.129cm" svg:height="0.558cm" svg:x="0.762cm" svg:y="13.081cm">
          <text:p text:style-name="P2"><text:span text:style-name="T18">● </text:span><text:span text:style-name="T18">3 swimlanes : Utilisateur, Système, Organisateur</text:span></text:p>
          <draw:enhanced-geometry svg:viewBox="0 0 21600 21600" draw:type="rectangle" draw:enhanced-path="M 0 0 L 21600 0 21600 21600 0 21600 0 0 Z N"/>
        </draw:custom-shape>
        <draw:custom-shape draw:name="Shape 10" draw:style-name="gr20" draw:text-style-name="P1" draw:layer="layout" svg:width="0.253cm" svg:height="0.253cm" svg:x="0.762cm" svg:y="13.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11" draw:style-name="gr2" draw:text-style-name="P3" draw:layer="layout" svg:width="24.129cm" svg:height="0.558cm" svg:x="0.762cm" svg:y="13.081cm">
          <text:p text:style-name="P2"><text:span text:style-name="T18">● </text:span><text:span text:style-name="T18">Fork/Join = transport + hébergement en parallèle</text:span></text:p>
          <draw:enhanced-geometry svg:viewBox="0 0 21600 21600" draw:type="rectangle" draw:enhanced-path="M 0 0 L 21600 0 21600 21600 0 21600 0 0 Z N"/>
        </draw:custom-shape>
        <draw:custom-shape draw:name="Text 12" draw:style-name="gr2" draw:text-style-name="P3" draw:layer="layout" svg:width="24.129cm" svg:height="0.507cm" svg:x="0.762cm" svg:y="13.056cm">
          <text:p text:style-name="P2"><text:span text:style-name="T18">● </text:span><text:span text:style-name="T18">5 modèles Freezed immutables (domain)</text:span></text:p>
          <draw:enhanced-geometry svg:viewBox="0 0 21600 21600" draw:type="rectangle" draw:enhanced-path="M 0 0 L 21600 0 21600 21600 0 21600 0 0 Z N"/>
        </draw:custom-shape>
        <draw:custom-shape draw:name="Text 13" draw:style-name="gr2" draw:text-style-name="P3" draw:layer="layout" svg:width="24.129cm" svg:height="0.507cm" svg:x="0.762cm" svg:y="13.589cm">
          <text:p text:style-name="P2"><text:span text:style-name="T18">● </text:span><text:span text:style-name="T18">3 repositories (data) → IsarService</text:span></text:p>
          <draw:enhanced-geometry svg:viewBox="0 0 21600 21600" draw:type="rectangle" draw:enhanced-path="M 0 0 L 21600 0 21600 21600 0 21600 0 0 Z N"/>
        </draw:custom-shape>
        <draw:custom-shape draw:name="Text 14" draw:style-name="gr2" draw:text-style-name="P3" draw:layer="layout" svg:width="24.129cm" svg:height="0.507cm" svg:x="0.762cm" svg:y="14.122cm">
          <text:p text:style-name="P2"><text:span text:style-name="T18">● </text:span><text:span text:style-name="T18">3 swimlanes : Utilisateur, Système, Organisateur</text:span></text:p>
          <draw:enhanced-geometry svg:viewBox="0 0 21600 21600" draw:type="rectangle" draw:enhanced-path="M 0 0 L 21600 0 21600 21600 0 21600 0 0 Z N"/>
        </draw:custom-shape>
        <draw:custom-shape draw:name="Text 15" draw:style-name="gr2" draw:text-style-name="P3" draw:layer="layout" svg:width="24.129cm" svg:height="0.507cm" svg:x="0.762cm" svg:y="14.656cm">
          <text:p text:style-name="P2"><text:span text:style-name="T18">● </text:span><text:span text:style-name="T18">Fork/Join = transport + hébergement en parallèle</text:span></text:p>
          <draw:enhanced-geometry svg:viewBox="0 0 21600 21600" draw:type="rectangle" draw:enhanced-path="M 0 0 L 21600 0 21600 21600 0 21600 0 0 Z N"/>
        </draw:custom-shape>
        <presentation:notes draw:style-name="dp2">
          <draw:page-thumbnail draw:name="Slide Image Placeholder 1" draw:style-name="gr5" draw:layer="layout" svg:width="15.239cm" svg:height="8.572cm" svg:x="-0.439cm" svg:y="-10.8cm" draw:page-number="7" presentation:class="page"/>
          <draw:frame draw:name="Notes Placeholder 2" presentation:style-name="pr1" draw:text-style-name="P3" draw:layer="layout" svg:width="15.239cm" svg:height="10cm" svg:x="-0.039cm" svg:y="-1.8cm" presentation:class="notes" presentation:user-transformed="true">
            <draw:text-box>
              <text:p><text:span text:style-name="T8">SLIDE 7 — CLASSES + ACTIVITÉ (60 secondes)</text:span></text:p>
              <text:p><text:span text:style-name="T8"/></text:p>
              <text:p><text:span text:style-name="T8">SCRIPT ORAL CLASSES :</text:span></text:p>
              <text:p><text:span text:style-name="T8">"Le diagramme de classes montre l'organisation objet du code Flutter. On voit 5 modèles Freezed — ce sont nos données immutables, elles ne peuvent pas être modifiées accidentellement. 3 repositories gèrent l'accès à Isar, et tous les 3 dépendent d'un IsarService singleton. Les flèches en pointillé avec 'manages' montrent que les repositories orchestrent les collections sans les connaître directement."</text:span></text:p>
              <text:p><text:span text:style-name="T8"/></text:p>
              <text:p><text:span text:style-name="T8">SCRIPT ORAL ACTIVITÉ :</text:span></text:p>
              <text:p><text:span text:style-name="T8">"Le diagramme d'activité montre le parcours utilisateur avec 3 couloirs. Ce qui est intéressant, c'est le Fork après le paiement — ça signifie que la planification du transport et la réservation de l'hébergement sont des activités indépendantes, l'utilisateur peut faire l'une sans l'autre. Le Join attend que les deux soient terminées avant de continuer vers le Jour J."</text:span></text:p>
              <text:p><text:span text:style-name="T8"/></text:p>
              <text:p><text:span text:style-name="T8">QUESTIONS POSSIBLES :</text:span></text:p>
              <text:p><text:span text:style-name="T8">Q: "Pourquoi des modèles immutables (Freezed) ?"</text:span></text:p>
              <text:p><text:span text:style-name="T8">R: "L'immutabilité garantit qu'un widget UI ne peut pas modifier accidentellement une donnée partagée. Pour changer un champ, on crée une copie avec copyWith — ce qui crée une nouvelle version traçable dans l'arbre de widgets."</text:span></text:p>
              <text:p><text:span text:style-name="T8"/></text:p>
              <text:p><text:span text:style-name="T8">Q: "Le fork dans le diagramme d'activité, c'est du multi-threading ?"</text:span></text:p>
              <text:p><text:span text:style-name="T8">R: "Non, c'est une notation UML qui dit que ces deux activités sont indépendantes fonctionnellement — l'utilisateur peut les faire dans n'importe quel ordre. Dans l'UI, il les fait l'une après l'autre. Le fork montre l'absence de dépendance, pas une exécution simultanée."</text:span></text:p>
            </draw:text-box>
          </draw:frame>
          <draw:frame draw:name="Slide Number Placeholder 3" presentation:style-name="pr2" draw:text-style-name="P6" draw:layer="layout" svg:width="8.254cm" svg:height="1.273cm" svg:x="10.791cm" svg:y="24.126cm" presentation:class="page-number" presentation:user-transformed="true">
            <draw:text-box>
              <text:p text:style-name="P5"><text:span text:style-name="T9"><text:page-number>&lt;numéro&gt;</text:page-number></text:span></text:p>
            </draw:text-box>
          </draw:frame>
        </presentation:notes>
      </draw:page>
      <draw:page draw:name="Slide 8" draw:style-name="dp3" draw:master-page-name="Standard">
        <draw:custom-shape draw:name="Text 0" draw:style-name="gr2" draw:text-style-name="P3" draw:layer="layout" svg:width="22.859cm" svg:height="1.269cm" svg:x="1.27cm" svg:y="0.508cm">
          <text:p text:style-name="P2"><text:span text:style-name="T13">Parcours Utilisateurs — 5 flowcharts</text:span></text:p>
          <draw:enhanced-geometry svg:viewBox="0 0 21600 21600" draw:type="rectangle" draw:enhanced-path="M 0 0 L 21600 0 21600 21600 0 21600 0 0 Z N"/>
        </draw:custom-shape>
        <draw:custom-shape draw:name="Text 1" draw:style-name="gr2" draw:text-style-name="P3" draw:layer="layout" svg:width="22.859cm" svg:height="0.71cm" svg:x="1.27cm" svg:y="1.829cm">
          <text:p text:style-name="P2"><text:span text:style-name="T12">Centrés Utilisateur · Intégrant Système, Organisateur et Hôte aux moments clés</text:span></text:p>
          <draw:enhanced-geometry svg:viewBox="0 0 21600 21600" draw:type="rectangle" draw:enhanced-path="M 0 0 L 21600 0 21600 21600 0 21600 0 0 Z N"/>
        </draw:custom-shape>
        <draw:frame draw:name="Image 0" draw:style-name="gr17" draw:text-style-name="P7" draw:layer="layout" svg:width="8.889cm" svg:height="10.667cm" svg:x="0.762cm" svg:y="2.54cm">
          <draw:image xlink:href="Pictures/100002010000096000000C8072C9976B.png" xlink:type="simple" xlink:show="embed" xlink:actuate="onLoad">
            <text:p/>
          </draw:image>
        </draw:frame>
        <draw:custom-shape draw:name="Shape 2" draw:style-name="gr18" draw:text-style-name="P1" draw:layer="layout" svg:width="14.731cm" svg:height="1.929cm" svg:x="10.16cm" svg:y="2.667cm">
          <text:p/>
          <draw:enhanced-geometry svg:viewBox="0 0 21600 21600" draw:type="rectangle" draw:enhanced-path="M 0 0 L 21600 0 21600 21600 0 21600 0 0 Z N"/>
        </draw:custom-shape>
        <draw:custom-shape draw:name="Shape 3" draw:style-name="gr1" draw:text-style-name="P1" draw:layer="layout" svg:width="1.167cm" svg:height="1.929cm" svg:x="10.16cm" svg:y="2.667cm">
          <text:p/>
          <draw:enhanced-geometry svg:viewBox="0 0 21600 21600" draw:type="rectangle" draw:enhanced-path="M 0 0 L 21600 0 21600 21600 0 21600 0 0 Z N"/>
        </draw:custom-shape>
        <draw:custom-shape draw:name="Text 4" draw:style-name="gr2" draw:text-style-name="P3" draw:layer="layout" svg:width="1.167cm" svg:height="1.929cm" svg:x="10.16cm" svg:y="2.667cm">
          <text:p text:style-name="P4"><text:span text:style-name="T20">1</text:span></text:p>
          <draw:enhanced-geometry svg:viewBox="0 0 21600 21600" draw:type="rectangle" draw:enhanced-path="M 0 0 L 21600 0 21600 21600 0 21600 0 0 Z N"/>
        </draw:custom-shape>
        <draw:custom-shape draw:name="Text 5" draw:style-name="gr2" draw:text-style-name="P3" draw:layer="layout" svg:width="12.953cm" svg:height="0.761cm" svg:x="11.557cm" svg:y="2.845cm">
          <text:p text:style-name="P2"><text:span text:style-name="T15">Achat billet</text:span></text:p>
          <draw:enhanced-geometry svg:viewBox="0 0 21600 21600" draw:type="rectangle" draw:enhanced-path="M 0 0 L 21600 0 21600 21600 0 21600 0 0 Z N"/>
        </draw:custom-shape>
        <draw:custom-shape draw:name="Text 6" draw:style-name="gr2" draw:text-style-name="P3" draw:layer="layout" svg:width="12.953cm" svg:height="0.634cm" svg:x="11.557cm" svg:y="3.607cm">
          <text:p text:style-name="P2"><text:span text:style-name="T6">8 étapes · de la découverte au QR</text:span></text:p>
          <draw:enhanced-geometry svg:viewBox="0 0 21600 21600" draw:type="rectangle" draw:enhanced-path="M 0 0 L 21600 0 21600 21600 0 21600 0 0 Z N"/>
        </draw:custom-shape>
        <draw:custom-shape draw:name="Shape 7" draw:style-name="gr16" draw:text-style-name="P1" draw:layer="layout" svg:width="14.731cm" svg:height="1.929cm" svg:x="10.16cm" svg:y="4.877cm">
          <text:p/>
          <draw:enhanced-geometry svg:viewBox="0 0 21600 21600" draw:type="rectangle" draw:enhanced-path="M 0 0 L 21600 0 21600 21600 0 21600 0 0 Z N"/>
        </draw:custom-shape>
        <draw:custom-shape draw:name="Shape 8" draw:style-name="gr10" draw:text-style-name="P1" draw:layer="layout" svg:width="1.167cm" svg:height="1.929cm" svg:x="10.16cm" svg:y="4.877cm">
          <text:p/>
          <draw:enhanced-geometry svg:viewBox="0 0 21600 21600" draw:type="rectangle" draw:enhanced-path="M 0 0 L 21600 0 21600 21600 0 21600 0 0 Z N"/>
        </draw:custom-shape>
        <draw:custom-shape draw:name="Text 9" draw:style-name="gr2" draw:text-style-name="P3" draw:layer="layout" svg:width="1.167cm" svg:height="1.929cm" svg:x="10.16cm" svg:y="4.877cm">
          <text:p text:style-name="P4"><text:span text:style-name="T20">2</text:span></text:p>
          <draw:enhanced-geometry svg:viewBox="0 0 21600 21600" draw:type="rectangle" draw:enhanced-path="M 0 0 L 21600 0 21600 21600 0 21600 0 0 Z N"/>
        </draw:custom-shape>
        <draw:custom-shape draw:name="Text 10" draw:style-name="gr2" draw:text-style-name="P3" draw:layer="layout" svg:width="12.953cm" svg:height="0.761cm" svg:x="11.557cm" svg:y="5.055cm">
          <text:p text:style-name="P2"><text:span text:style-name="T15">Transport CO₂</text:span></text:p>
          <draw:enhanced-geometry svg:viewBox="0 0 21600 21600" draw:type="rectangle" draw:enhanced-path="M 0 0 L 21600 0 21600 21600 0 21600 0 0 Z N"/>
        </draw:custom-shape>
        <draw:custom-shape draw:name="Text 11" draw:style-name="gr2" draw:text-style-name="P3" draw:layer="layout" svg:width="12.953cm" svg:height="0.634cm" svg:x="11.557cm" svg:y="5.817cm">
          <text:p text:style-name="P2"><text:span text:style-name="T6">3 branches · train/covoit/multimodal</text:span></text:p>
          <draw:enhanced-geometry svg:viewBox="0 0 21600 21600" draw:type="rectangle" draw:enhanced-path="M 0 0 L 21600 0 21600 21600 0 21600 0 0 Z N"/>
        </draw:custom-shape>
        <draw:custom-shape draw:name="Shape 12" draw:style-name="gr13" draw:text-style-name="P1" draw:layer="layout" svg:width="14.731cm" svg:height="1.929cm" svg:x="10.16cm" svg:y="7.087cm">
          <text:p/>
          <draw:enhanced-geometry svg:viewBox="0 0 21600 21600" draw:type="rectangle" draw:enhanced-path="M 0 0 L 21600 0 21600 21600 0 21600 0 0 Z N"/>
        </draw:custom-shape>
        <draw:custom-shape draw:name="Shape 13" draw:style-name="gr14" draw:text-style-name="P1" draw:layer="layout" svg:width="1.167cm" svg:height="1.929cm" svg:x="10.16cm" svg:y="7.087cm">
          <text:p/>
          <draw:enhanced-geometry svg:viewBox="0 0 21600 21600" draw:type="rectangle" draw:enhanced-path="M 0 0 L 21600 0 21600 21600 0 21600 0 0 Z N"/>
        </draw:custom-shape>
        <draw:custom-shape draw:name="Text 14" draw:style-name="gr2" draw:text-style-name="P3" draw:layer="layout" svg:width="1.167cm" svg:height="1.929cm" svg:x="10.16cm" svg:y="7.087cm">
          <text:p text:style-name="P4"><text:span text:style-name="T20">3</text:span></text:p>
          <draw:enhanced-geometry svg:viewBox="0 0 21600 21600" draw:type="rectangle" draw:enhanced-path="M 0 0 L 21600 0 21600 21600 0 21600 0 0 Z N"/>
        </draw:custom-shape>
        <draw:custom-shape draw:name="Text 15" draw:style-name="gr2" draw:text-style-name="P3" draw:layer="layout" svg:width="12.953cm" svg:height="0.761cm" svg:x="11.557cm" svg:y="7.264cm">
          <text:p text:style-name="P2"><text:span text:style-name="T15">Hébergement</text:span></text:p>
          <draw:enhanced-geometry svg:viewBox="0 0 21600 21600" draw:type="rectangle" draw:enhanced-path="M 0 0 L 21600 0 21600 21600 0 21600 0 0 Z N"/>
        </draw:custom-shape>
        <draw:custom-shape draw:name="Text 16" draw:style-name="gr2" draw:text-style-name="P3" draw:layer="layout" svg:width="12.953cm" svg:height="0.634cm" svg:x="11.557cm" svg:y="8.026cm">
          <text:p text:style-name="P2"><text:span text:style-name="T6">6 étapes · classique ou collaboratif</text:span></text:p>
          <draw:enhanced-geometry svg:viewBox="0 0 21600 21600" draw:type="rectangle" draw:enhanced-path="M 0 0 L 21600 0 21600 21600 0 21600 0 0 Z N"/>
        </draw:custom-shape>
        <draw:custom-shape draw:name="Shape 17" draw:style-name="gr19" draw:text-style-name="P1" draw:layer="layout" svg:width="14.731cm" svg:height="1.929cm" svg:x="10.16cm" svg:y="9.296cm">
          <text:p/>
          <draw:enhanced-geometry svg:viewBox="0 0 21600 21600" draw:type="rectangle" draw:enhanced-path="M 0 0 L 21600 0 21600 21600 0 21600 0 0 Z N"/>
        </draw:custom-shape>
        <draw:custom-shape draw:name="Shape 18" draw:style-name="gr20" draw:text-style-name="P1" draw:layer="layout" svg:width="1.167cm" svg:height="1.929cm" svg:x="10.16cm" svg:y="9.296cm">
          <text:p/>
          <draw:enhanced-geometry svg:viewBox="0 0 21600 21600" draw:type="rectangle" draw:enhanced-path="M 0 0 L 21600 0 21600 21600 0 21600 0 0 Z N"/>
        </draw:custom-shape>
        <draw:custom-shape draw:name="Text 19" draw:style-name="gr2" draw:text-style-name="P3" draw:layer="layout" svg:width="1.167cm" svg:height="1.929cm" svg:x="10.16cm" svg:y="9.296cm">
          <text:p text:style-name="P4"><text:span text:style-name="T20">4</text:span></text:p>
          <draw:enhanced-geometry svg:viewBox="0 0 21600 21600" draw:type="rectangle" draw:enhanced-path="M 0 0 L 21600 0 21600 21600 0 21600 0 0 Z N"/>
        </draw:custom-shape>
        <draw:custom-shape draw:name="Text 20" draw:style-name="gr2" draw:text-style-name="P3" draw:layer="layout" svg:width="12.953cm" svg:height="0.761cm" svg:x="11.557cm" svg:y="9.474cm">
          <text:p text:style-name="P2"><text:span text:style-name="T15">Jour J</text:span></text:p>
          <draw:enhanced-geometry svg:viewBox="0 0 21600 21600" draw:type="rectangle" draw:enhanced-path="M 0 0 L 21600 0 21600 21600 0 21600 0 0 Z N"/>
        </draw:custom-shape>
        <draw:custom-shape draw:name="Text 21" draw:style-name="gr2" draw:text-style-name="P3" draw:layer="layout" svg:width="12.953cm" svg:height="0.634cm" svg:x="11.557cm" svg:y="10.236cm">
          <text:p text:style-name="P2"><text:span text:style-name="T6">7 étapes · scan → bilan post-event</text:span></text:p>
          <draw:enhanced-geometry svg:viewBox="0 0 21600 21600" draw:type="rectangle" draw:enhanced-path="M 0 0 L 21600 0 21600 21600 0 21600 0 0 Z N"/>
        </draw:custom-shape>
        <draw:custom-shape draw:name="Shape 22" draw:style-name="gr15" draw:text-style-name="P1" draw:layer="layout" svg:width="14.731cm" svg:height="1.929cm" svg:x="10.16cm" svg:y="11.506cm">
          <text:p/>
          <draw:enhanced-geometry svg:viewBox="0 0 21600 21600" draw:type="rectangle" draw:enhanced-path="M 0 0 L 21600 0 21600 21600 0 21600 0 0 Z N"/>
        </draw:custom-shape>
        <draw:custom-shape draw:name="Shape 23" draw:style-name="gr11" draw:text-style-name="P1" draw:layer="layout" svg:width="1.167cm" svg:height="1.929cm" svg:x="10.16cm" svg:y="11.506cm">
          <text:p/>
          <draw:enhanced-geometry svg:viewBox="0 0 21600 21600" draw:type="rectangle" draw:enhanced-path="M 0 0 L 21600 0 21600 21600 0 21600 0 0 Z N"/>
        </draw:custom-shape>
        <draw:custom-shape draw:name="Text 24" draw:style-name="gr2" draw:text-style-name="P3" draw:layer="layout" svg:width="1.167cm" svg:height="1.929cm" svg:x="10.16cm" svg:y="11.506cm">
          <text:p text:style-name="P4"><text:span text:style-name="T20">5</text:span></text:p>
          <draw:enhanced-geometry svg:viewBox="0 0 21600 21600" draw:type="rectangle" draw:enhanced-path="M 0 0 L 21600 0 21600 21600 0 21600 0 0 Z N"/>
        </draw:custom-shape>
        <draw:custom-shape draw:name="Text 25" draw:style-name="gr2" draw:text-style-name="P3" draw:layer="layout" svg:width="12.953cm" svg:height="0.761cm" svg:x="11.557cm" svg:y="11.684cm">
          <text:p text:style-name="P2"><text:span text:style-name="T15">Vue globale</text:span></text:p>
          <draw:enhanced-geometry svg:viewBox="0 0 21600 21600" draw:type="rectangle" draw:enhanced-path="M 0 0 L 21600 0 21600 21600 0 21600 0 0 Z N"/>
        </draw:custom-shape>
        <draw:custom-shape draw:name="Text 26" draw:style-name="gr2" draw:text-style-name="P3" draw:layer="layout" svg:width="12.953cm" svg:height="0.634cm" svg:x="11.557cm" svg:y="12.446cm">
          <text:p text:style-name="P2"><text:span text:style-name="T6">5 phases · J-30 → J+1</text:span></text:p>
          <draw:enhanced-geometry svg:viewBox="0 0 21600 21600" draw:type="rectangle" draw:enhanced-path="M 0 0 L 21600 0 21600 21600 0 21600 0 0 Z N"/>
        </draw:custom-shape>
        <draw:custom-shape draw:name="Shape 27" draw:style-name="gr21" draw:text-style-name="P1" draw:layer="layout" svg:width="24.129cm" svg:height="0.812cm" svg:x="0.762cm" svg:y="13.36cm">
          <text:p/>
          <draw:enhanced-geometry svg:viewBox="0 0 21600 21600" draw:type="rectangle" draw:enhanced-path="M 0 0 L 21600 0 21600 21600 0 21600 0 0 Z N"/>
        </draw:custom-shape>
        <draw:custom-shape draw:name="Text 28" draw:style-name="gr2" draw:text-style-name="P3" draw:layer="layout" svg:width="23.367cm" svg:height="0.71cm" svg:x="1.016cm" svg:y="13.411cm">
          <text:p text:style-name="P2"><text:span text:style-name="T18">Chaque parcours est tracé aux user stories du CDC — les 5 parcours couvrent les 9 modules fonctionnels.</text:span></text:p>
          <draw:enhanced-geometry svg:viewBox="0 0 21600 21600" draw:type="rectangle" draw:enhanced-path="M 0 0 L 21600 0 21600 21600 0 21600 0 0 Z N"/>
        </draw:custom-shape>
        <presentation:notes draw:style-name="dp2">
          <draw:page-thumbnail draw:name="Slide Image Placeholder 1" draw:style-name="gr5" draw:layer="layout" svg:width="15.239cm" svg:height="8.572cm" svg:x="-0.039cm" svg:y="-10.6cm" draw:page-number="8" presentation:class="page"/>
          <draw:frame draw:name="Notes Placeholder 2" presentation:style-name="pr1" draw:text-style-name="P3" draw:layer="layout" svg:width="15.239cm" svg:height="10cm" svg:x="0.161cm" svg:y="-1.6cm" presentation:class="notes" presentation:user-transformed="true">
            <draw:text-box>
              <text:p><text:span text:style-name="T8">SLIDE 8 — PARCOURS UTILISATEURS (45-60 secondes)</text:span></text:p>
              <text:p><text:span text:style-name="T8"/></text:p>
              <text:p><text:span text:style-name="T8">SCRIPT ORAL :</text:span></text:p>
              <text:p><text:span text:style-name="T8">"Pour chaque fonctionnalité importante, on a modélisé le parcours utilisateur complet. Le parcours 1 montre l'achat d'un billet en 8 étapes — de l'ouverture de l'app jusqu'à la réception du QR code. On voit que le système intervient à l'étape 7 pour générer le QR et envoyer la notification. Les parcours 2 et 3 enchaînent automatiquement après l'achat pour proposer le transport et l'hébergement. Ensemble, ces 5 parcours couvrent les 9 modules du CDC."</text:span></text:p>
              <text:p><text:span text:style-name="T8"/></text:p>
              <text:p><text:span text:style-name="T8">ÉMOTIONS CIBLES — BON POINT À MENTIONNER :</text:span></text:p>
              <text:p><text:span text:style-name="T8">→ </text:span><text:span text:style-name="T8">"On a associé une émotion cible à chaque phase : curiosité en découverte, satisfaction à l'achat, fierté pour le choix bas carbone, immersion le jour J. Ce n'est pas du marketing — c'est ce qui guide les micro-décisions d'UX."</text:span></text:p>
              <text:p><text:span text:style-name="T8"/></text:p>
              <text:p><text:span text:style-name="T8">QUESTIONS POSSIBLES :</text:span></text:p>
              <text:p><text:span text:style-name="T8">Q: "Pourquoi 5 parcours séparés et pas 1 parcours global ?"</text:span></text:p>
              <text:p><text:span text:style-name="T8">R: "Un parcours de 30 étapes serait illisible. La décomposition permet à chaque membre de l'équipe d'avoir un périmètre, facilite les tests — on peut tester le transport indépendamment — et correspond à notre architecture Feature-First."</text:span></text:p>
              <text:p><text:span text:style-name="T8"/></text:p>
              <text:p><text:span text:style-name="T8">Q: "Comment vous vous assurez que les parcours correspondent au code ?"</text:span></text:p>
              <text:p><text:span text:style-name="T8">R: "Chaque étape du parcours renvoie à une ou plusieurs user stories du CDC. Par exemple l'étape 7 (paiement) correspond aux US-PAY-01, US-PAY-02. C'est une traçabilité bidirectionnelle."</text:span></text:p>
            </draw:text-box>
          </draw:frame>
          <draw:frame draw:name="Slide Number Placeholder 3" presentation:style-name="pr2" draw:text-style-name="P6" draw:layer="layout" svg:width="8.254cm" svg:height="1.273cm" svg:x="10.791cm" svg:y="24.126cm" presentation:class="page-number" presentation:user-transformed="true">
            <draw:text-box>
              <text:p text:style-name="P5"><text:span text:style-name="T9"><text:page-number>&lt;numéro&gt;</text:page-number></text:span></text:p>
            </draw:text-box>
          </draw:frame>
        </presentation:notes>
      </draw:page>
      <draw:page draw:name="Slide 9" draw:style-name="dp3" draw:master-page-name="Standard">
        <draw:custom-shape draw:name="Text 0" draw:style-name="gr2" draw:text-style-name="P3" draw:layer="layout" svg:width="22.859cm" svg:height="1.269cm" svg:x="1.27cm" svg:y="0.508cm">
          <text:p text:style-name="P2"><text:span text:style-name="T13">Sécurité — 6 couches de protection</text:span></text:p>
          <draw:enhanced-geometry svg:viewBox="0 0 21600 21600" draw:type="rectangle" draw:enhanced-path="M 0 0 L 21600 0 21600 21600 0 21600 0 0 Z N"/>
        </draw:custom-shape>
        <draw:custom-shape draw:name="Shape 1" draw:style-name="gr18" draw:text-style-name="P1" draw:layer="layout" svg:width="11.683cm" svg:height="3.25cm" svg:x="1.016cm" svg:y="2.413cm">
          <text:p/>
          <draw:enhanced-geometry svg:viewBox="0 0 21600 21600" draw:type="rectangle" draw:enhanced-path="M 0 0 L 21600 0 21600 21600 0 21600 0 0 Z N"/>
        </draw:custom-shape>
        <draw:custom-shape draw:name="Shape 2" draw:style-name="gr4" draw:text-style-name="P1" draw:layer="layout" svg:width="1.32cm" svg:height="1.32cm" svg:x="1.372cm" svg:y="3.3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3" draw:style-name="gr2" draw:text-style-name="P3" draw:layer="layout" svg:width="1.523cm" svg:height="1.472cm" svg:x="1.27cm" svg:y="3.302cm">
          <text:p text:style-name="P4"><text:span text:style-name="T21">🔐</text:span></text:p>
          <draw:enhanced-geometry svg:viewBox="0 0 21600 21600" draw:type="rectangle" draw:enhanced-path="M 0 0 L 21600 0 21600 21600 0 21600 0 0 Z N"/>
        </draw:custom-shape>
        <draw:custom-shape draw:name="Text 4" draw:style-name="gr2" draw:text-style-name="P3" draw:layer="layout" svg:width="9.397cm" svg:height="0.913cm" svg:x="2.997cm" svg:y="2.769cm">
          <text:p text:style-name="P2"><text:span text:style-name="T4">QR code HMAC-SHA256</text:span></text:p>
          <draw:enhanced-geometry svg:viewBox="0 0 21600 21600" draw:type="rectangle" draw:enhanced-path="M 0 0 L 21600 0 21600 21600 0 21600 0 0 Z N"/>
        </draw:custom-shape>
        <draw:custom-shape draw:name="Text 5" draw:style-name="gr2" draw:text-style-name="P3" draw:layer="layout" svg:width="9.397cm" svg:height="1.574cm" svg:x="2.997cm" svg:y="3.734cm">
          <text:p text:style-name="P2"><text:span text:style-name="T18">Signature cryptographique — impossible à falsifier sans la clé serveur</text:span></text:p>
          <draw:enhanced-geometry svg:viewBox="0 0 21600 21600" draw:type="rectangle" draw:enhanced-path="M 0 0 L 21600 0 21600 21600 0 21600 0 0 Z N"/>
        </draw:custom-shape>
        <draw:custom-shape draw:name="Shape 6" draw:style-name="gr16" draw:text-style-name="P1" draw:layer="layout" svg:width="11.683cm" svg:height="3.25cm" svg:x="13.335cm" svg:y="2.413cm">
          <text:p/>
          <draw:enhanced-geometry svg:viewBox="0 0 21600 21600" draw:type="rectangle" draw:enhanced-path="M 0 0 L 21600 0 21600 21600 0 21600 0 0 Z N"/>
        </draw:custom-shape>
        <draw:custom-shape draw:name="Shape 7" draw:style-name="gr22" draw:text-style-name="P1" draw:layer="layout" svg:width="1.32cm" svg:height="1.32cm" svg:x="13.691cm" svg:y="3.3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8" draw:style-name="gr2" draw:text-style-name="P3" draw:layer="layout" svg:width="1.523cm" svg:height="1.472cm" svg:x="13.589cm" svg:y="3.302cm">
          <text:p text:style-name="P4"><text:span text:style-name="T21">💳</text:span></text:p>
          <draw:enhanced-geometry svg:viewBox="0 0 21600 21600" draw:type="rectangle" draw:enhanced-path="M 0 0 L 21600 0 21600 21600 0 21600 0 0 Z N"/>
        </draw:custom-shape>
        <draw:custom-shape draw:name="Text 9" draw:style-name="gr2" draw:text-style-name="P3" draw:layer="layout" svg:width="9.397cm" svg:height="0.913cm" svg:x="15.316cm" svg:y="2.769cm">
          <text:p text:style-name="P2"><text:span text:style-name="T4">Paiement Stripe (PCI-DSS)</text:span></text:p>
          <draw:enhanced-geometry svg:viewBox="0 0 21600 21600" draw:type="rectangle" draw:enhanced-path="M 0 0 L 21600 0 21600 21600 0 21600 0 0 Z N"/>
        </draw:custom-shape>
        <draw:custom-shape draw:name="Text 10" draw:style-name="gr2" draw:text-style-name="P3" draw:layer="layout" svg:width="9.397cm" svg:height="1.574cm" svg:x="15.316cm" svg:y="3.734cm">
          <text:p text:style-name="P2"><text:span text:style-name="T18">Aucune donnée bancaire sur nos serveurs — Stripe gère tout</text:span></text:p>
          <draw:enhanced-geometry svg:viewBox="0 0 21600 21600" draw:type="rectangle" draw:enhanced-path="M 0 0 L 21600 0 21600 21600 0 21600 0 0 Z N"/>
        </draw:custom-shape>
        <draw:custom-shape draw:name="Shape 11" draw:style-name="gr15" draw:text-style-name="P1" draw:layer="layout" svg:width="11.683cm" svg:height="3.25cm" svg:x="1.016cm" svg:y="6.02cm">
          <text:p/>
          <draw:enhanced-geometry svg:viewBox="0 0 21600 21600" draw:type="rectangle" draw:enhanced-path="M 0 0 L 21600 0 21600 21600 0 21600 0 0 Z N"/>
        </draw:custom-shape>
        <draw:custom-shape draw:name="Shape 12" draw:style-name="gr23" draw:text-style-name="P1" draw:layer="layout" svg:width="1.32cm" svg:height="1.32cm" svg:x="1.372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13" draw:style-name="gr2" draw:text-style-name="P3" draw:layer="layout" svg:width="1.523cm" svg:height="1.472cm" svg:x="1.27cm" svg:y="6.909cm">
          <text:p text:style-name="P4"><text:span text:style-name="T21">🪙</text:span></text:p>
          <draw:enhanced-geometry svg:viewBox="0 0 21600 21600" draw:type="rectangle" draw:enhanced-path="M 0 0 L 21600 0 21600 21600 0 21600 0 0 Z N"/>
        </draw:custom-shape>
        <draw:custom-shape draw:name="Text 14" draw:style-name="gr2" draw:text-style-name="P3" draw:layer="layout" svg:width="9.397cm" svg:height="0.913cm" svg:x="2.997cm" svg:y="6.375cm">
          <text:p text:style-name="P2"><text:span text:style-name="T4">Firebase Auth + JWT</text:span></text:p>
          <draw:enhanced-geometry svg:viewBox="0 0 21600 21600" draw:type="rectangle" draw:enhanced-path="M 0 0 L 21600 0 21600 21600 0 21600 0 0 Z N"/>
        </draw:custom-shape>
        <draw:custom-shape draw:name="Text 15" draw:style-name="gr2" draw:text-style-name="P3" draw:layer="layout" svg:width="9.397cm" svg:height="1.574cm" svg:x="2.997cm" svg:y="7.341cm">
          <text:p text:style-name="P2"><text:span text:style-name="T18">Tokens signés avec rôles (user/organizer/host) — refresh automatique</text:span></text:p>
          <draw:enhanced-geometry svg:viewBox="0 0 21600 21600" draw:type="rectangle" draw:enhanced-path="M 0 0 L 21600 0 21600 21600 0 21600 0 0 Z N"/>
        </draw:custom-shape>
        <draw:custom-shape draw:name="Shape 16" draw:style-name="gr19" draw:text-style-name="P1" draw:layer="layout" svg:width="11.683cm" svg:height="3.25cm" svg:x="13.335cm" svg:y="6.02cm">
          <text:p/>
          <draw:enhanced-geometry svg:viewBox="0 0 21600 21600" draw:type="rectangle" draw:enhanced-path="M 0 0 L 21600 0 21600 21600 0 21600 0 0 Z N"/>
        </draw:custom-shape>
        <draw:custom-shape draw:name="Shape 17" draw:style-name="gr24" draw:text-style-name="P1" draw:layer="layout" svg:width="1.32cm" svg:height="1.32cm" svg:x="13.691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18" draw:style-name="gr2" draw:text-style-name="P3" draw:layer="layout" svg:width="1.523cm" svg:height="1.472cm" svg:x="13.589cm" svg:y="6.909cm">
          <text:p text:style-name="P4"><text:span text:style-name="T21">🔒</text:span></text:p>
          <draw:enhanced-geometry svg:viewBox="0 0 21600 21600" draw:type="rectangle" draw:enhanced-path="M 0 0 L 21600 0 21600 21600 0 21600 0 0 Z N"/>
        </draw:custom-shape>
        <draw:custom-shape draw:name="Text 19" draw:style-name="gr2" draw:text-style-name="P3" draw:layer="layout" svg:width="9.397cm" svg:height="0.913cm" svg:x="15.316cm" svg:y="6.375cm">
          <text:p text:style-name="P2"><text:span text:style-name="T4">Chiffrement AES-256</text:span></text:p>
          <draw:enhanced-geometry svg:viewBox="0 0 21600 21600" draw:type="rectangle" draw:enhanced-path="M 0 0 L 21600 0 21600 21600 0 21600 0 0 Z N"/>
        </draw:custom-shape>
        <draw:custom-shape draw:name="Text 20" draw:style-name="gr2" draw:text-style-name="P3" draw:layer="layout" svg:width="9.397cm" svg:height="1.574cm" svg:x="15.316cm" svg:y="7.341cm">
          <text:p text:style-name="P2"><text:span text:style-name="T18">Base Isar locale chiffrée — perte du téléphone ≠ fuite de données</text:span></text:p>
          <draw:enhanced-geometry svg:viewBox="0 0 21600 21600" draw:type="rectangle" draw:enhanced-path="M 0 0 L 21600 0 21600 21600 0 21600 0 0 Z N"/>
        </draw:custom-shape>
        <draw:custom-shape draw:name="Shape 21" draw:style-name="gr13" draw:text-style-name="P1" draw:layer="layout" svg:width="11.683cm" svg:height="3.25cm" svg:x="1.016cm" svg:y="9.627cm">
          <text:p/>
          <draw:enhanced-geometry svg:viewBox="0 0 21600 21600" draw:type="rectangle" draw:enhanced-path="M 0 0 L 21600 0 21600 21600 0 21600 0 0 Z N"/>
        </draw:custom-shape>
        <draw:custom-shape draw:name="Shape 22" draw:style-name="gr25" draw:text-style-name="P1" draw:layer="layout" svg:width="1.32cm" svg:height="1.32cm" svg:x="1.372cm" svg:y="10.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23" draw:style-name="gr2" draw:text-style-name="P3" draw:layer="layout" svg:width="1.523cm" svg:height="1.472cm" svg:x="1.27cm" svg:y="10.516cm">
          <text:p text:style-name="P4"><text:span text:style-name="T21">🌐</text:span></text:p>
          <draw:enhanced-geometry svg:viewBox="0 0 21600 21600" draw:type="rectangle" draw:enhanced-path="M 0 0 L 21600 0 21600 21600 0 21600 0 0 Z N"/>
        </draw:custom-shape>
        <draw:custom-shape draw:name="Text 24" draw:style-name="gr2" draw:text-style-name="P3" draw:layer="layout" svg:width="9.397cm" svg:height="0.913cm" svg:x="2.997cm" svg:y="9.982cm">
          <text:p text:style-name="P2"><text:span text:style-name="T4">HTTPS / TLS 1.3</text:span></text:p>
          <draw:enhanced-geometry svg:viewBox="0 0 21600 21600" draw:type="rectangle" draw:enhanced-path="M 0 0 L 21600 0 21600 21600 0 21600 0 0 Z N"/>
        </draw:custom-shape>
        <draw:custom-shape draw:name="Text 25" draw:style-name="gr2" draw:text-style-name="P3" draw:layer="layout" svg:width="9.397cm" svg:height="1.574cm" svg:x="2.997cm" svg:y="10.947cm">
          <text:p text:style-name="P2"><text:span text:style-name="T18">Toutes les communications chiffrées — certificate pinning sur les endpoints clés</text:span></text:p>
          <draw:enhanced-geometry svg:viewBox="0 0 21600 21600" draw:type="rectangle" draw:enhanced-path="M 0 0 L 21600 0 21600 21600 0 21600 0 0 Z N"/>
        </draw:custom-shape>
        <draw:custom-shape draw:name="Shape 26" draw:style-name="gr26" draw:text-style-name="P1" draw:layer="layout" svg:width="11.683cm" svg:height="3.25cm" svg:x="13.335cm" svg:y="9.627cm">
          <text:p/>
          <draw:enhanced-geometry svg:viewBox="0 0 21600 21600" draw:type="rectangle" draw:enhanced-path="M 0 0 L 21600 0 21600 21600 0 21600 0 0 Z N"/>
        </draw:custom-shape>
        <draw:custom-shape draw:name="Shape 27" draw:style-name="gr27" draw:text-style-name="P1" draw:layer="layout" svg:width="1.32cm" svg:height="1.32cm" svg:x="13.691cm" svg:y="10.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28" draw:style-name="gr2" draw:text-style-name="P3" draw:layer="layout" svg:width="1.523cm" svg:height="1.472cm" svg:x="13.589cm" svg:y="10.516cm">
          <text:p text:style-name="P4"><text:span text:style-name="T21">🛡️</text:span></text:p>
          <draw:enhanced-geometry svg:viewBox="0 0 21600 21600" draw:type="rectangle" draw:enhanced-path="M 0 0 L 21600 0 21600 21600 0 21600 0 0 Z N"/>
        </draw:custom-shape>
        <draw:custom-shape draw:name="Text 29" draw:style-name="gr2" draw:text-style-name="P3" draw:layer="layout" svg:width="9.397cm" svg:height="0.913cm" svg:x="15.316cm" svg:y="9.982cm">
          <text:p text:style-name="P2"><text:span text:style-name="T4">RGPD / Privacy by Design</text:span></text:p>
          <draw:enhanced-geometry svg:viewBox="0 0 21600 21600" draw:type="rectangle" draw:enhanced-path="M 0 0 L 21600 0 21600 21600 0 21600 0 0 Z N"/>
        </draw:custom-shape>
        <draw:custom-shape draw:name="Text 30" draw:style-name="gr2" draw:text-style-name="P3" draw:layer="layout" svg:width="9.397cm" svg:height="1.574cm" svg:x="15.316cm" svg:y="10.947cm">
          <text:p text:style-name="P2"><text:span text:style-name="T18">Droit d'accès, rectification, suppression, export dès la V1</text:span></text:p>
          <draw:enhanced-geometry svg:viewBox="0 0 21600 21600" draw:type="rectangle" draw:enhanced-path="M 0 0 L 21600 0 21600 21600 0 21600 0 0 Z N"/>
        </draw:custom-shape>
        <presentation:notes draw:style-name="dp2">
          <draw:page-thumbnail draw:name="Slide Image Placeholder 1" draw:style-name="gr5" draw:layer="layout" svg:width="15.239cm" svg:height="8.572cm" svg:x="-0.039cm" svg:y="2.028cm" draw:page-number="9" presentation:class="page"/>
          <draw:frame draw:name="Notes Placeholder 2" presentation:style-name="pr1" draw:text-style-name="P3" draw:layer="layout" svg:width="15.239cm" svg:height="10cm" svg:x="0cm" svg:y="11cm" presentation:class="notes" presentation:user-transformed="true">
            <draw:text-box>
              <text:p><text:span text:style-name="T8">SLIDE 9 — SÉCURITÉ (45 secondes — slide rapide)</text:span></text:p>
              <text:p><text:span text:style-name="T8"/></text:p>
              <text:p><text:span text:style-name="T8">SCRIPT ORAL :</text:span></text:p>
              <text:p><text:span text:style-name="T8">"La sécurité est traitée à chaque couche. Le point le plus technique : le QR code est signé avec HMAC-SHA256. Concrètement, le serveur calcule une signature à partir du contenu du billet et d'une clé secrète. À l'entrée, le scan reçoit la signature et la recalcule — si elles correspondent, le billet est authentique. Personne ne peut fabriquer un faux QR sans la clé secrète du serveur. Pour le paiement, on délègue à Stripe — nos serveurs ne voient jamais de numéro de CB."</text:span></text:p>
              <text:p><text:span text:style-name="T8"/></text:p>
              <text:p><text:span text:style-name="T8">ANALOGIE UTILE :</text:span></text:p>
              <text:p><text:span text:style-name="T8">→ </text:span><text:span text:style-name="T8">HMAC = "Un sceau royal sur un document. Vous pouvez lire le document, mais vous ne pouvez pas le reproduire sans le sceau."</text:span></text:p>
              <text:p><text:span text:style-name="T8">→ </text:span><text:span text:style-name="T8">Stripe = "Un notaire pour les paiements : il certifie la transaction, on n'a pas à gérer la sécurité bancaire nous-mêmes."</text:span></text:p>
              <text:p><text:span text:style-name="T8"/></text:p>
              <text:p><text:span text:style-name="T8">QUESTIONS POSSIBLES :</text:span></text:p>
              <text:p><text:span text:style-name="T8">Q: "Comment prouvez-vous la conformité RGPD ?"</text:span></text:p>
              <text:p><text:span text:style-name="T8">R: "Privacy by Design dès le CDC : l'utilisateur peut exporter ses données en JSON, les supprimer en cascade, et le consentement est granulaire (notif, géoloc, partage social) — un toggle par traitement."</text:span></text:p>
              <text:p><text:span text:style-name="T8"/></text:p>
              <text:p><text:span text:style-name="T8">Q: "Le chiffrement AES-256, c'est standard ?"</text:span></text:p>
              <text:p><text:span text:style-name="T8">R: "Oui, c'est le standard militaire américain, recommandé par l'ANSSI. Isar le propose nativement avec une clé dérivée du PIN biométrique du téléphone."</text:span></text:p>
            </draw:text-box>
          </draw:frame>
          <draw:frame draw:name="Slide Number Placeholder 3" presentation:style-name="pr2" draw:text-style-name="P6" draw:layer="layout" svg:width="8.254cm" svg:height="1.273cm" svg:x="10.791cm" svg:y="24.126cm" presentation:class="page-number" presentation:user-transformed="true">
            <draw:text-box>
              <text:p text:style-name="P5"><text:span text:style-name="T9"><text:page-number>&lt;numéro&gt;</text:page-number></text:span></text:p>
            </draw:text-box>
          </draw:frame>
        </presentation:notes>
      </draw:page>
      <draw:page draw:name="Slide 10" draw:style-name="dp1" draw:master-page-name="Standard">
        <draw:custom-shape draw:name="Shape 0" draw:style-name="gr10" draw:text-style-name="P1" draw:layer="layout" svg:width="0.304cm" svg:height="14.287cm" svg:x="0cm" svg:y="0cm">
          <text:p/>
          <draw:enhanced-geometry svg:viewBox="0 0 21600 21600" draw:type="rectangle" draw:enhanced-path="M 0 0 L 21600 0 21600 21600 0 21600 0 0 Z N"/>
        </draw:custom-shape>
        <draw:custom-shape draw:name="Text 1" draw:style-name="gr2" draw:text-style-name="P3" draw:layer="layout" svg:width="22.859cm" svg:height="1.396cm" svg:x="1.016cm" svg:y="0.762cm">
          <text:p text:style-name="P2"><text:span text:style-name="T22">Ce qu'on a livré</text:span></text:p>
          <draw:enhanced-geometry svg:viewBox="0 0 21600 21600" draw:type="rectangle" draw:enhanced-path="M 0 0 L 21600 0 21600 21600 0 21600 0 0 Z N"/>
        </draw:custom-shape>
        <draw:custom-shape draw:name="Shape 2" draw:style-name="gr28" draw:text-style-name="P1" draw:layer="layout" svg:width="11.683cm" svg:height="2.844cm" svg:x="1.016cm" svg:y="2.667cm">
          <text:p/>
          <draw:enhanced-geometry svg:viewBox="0 0 21600 21600" draw:type="rectangle" draw:enhanced-path="M 0 0 L 21600 0 21600 21600 0 21600 0 0 Z N"/>
        </draw:custom-shape>
        <draw:custom-shape draw:name="Text 3" draw:style-name="gr2" draw:text-style-name="P3" draw:layer="layout" svg:width="1.396cm" svg:height="1.396cm" svg:x="1.397cm" svg:y="3.429cm">
          <text:p text:style-name="P4"><text:span text:style-name="T2">📱</text:span></text:p>
          <draw:enhanced-geometry svg:viewBox="0 0 21600 21600" draw:type="rectangle" draw:enhanced-path="M 0 0 L 21600 0 21600 21600 0 21600 0 0 Z N"/>
        </draw:custom-shape>
        <draw:custom-shape draw:name="Text 4" draw:style-name="gr2" draw:text-style-name="P3" draw:layer="layout" svg:width="9.397cm" svg:height="0.964cm" svg:x="3.048cm" svg:y="3.048cm">
          <text:p text:style-name="P2"><text:span text:style-name="T15">App Flutter complète</text:span></text:p>
          <draw:enhanced-geometry svg:viewBox="0 0 21600 21600" draw:type="rectangle" draw:enhanced-path="M 0 0 L 21600 0 21600 21600 0 21600 0 0 Z N"/>
        </draw:custom-shape>
        <draw:custom-shape draw:name="Text 5" draw:style-name="gr2" draw:text-style-name="P3" draw:layer="layout" svg:width="9.397cm" svg:height="1.015cm" svg:x="3.048cm" svg:y="4.064cm">
          <text:p text:style-name="P2"><text:span text:style-name="T6">42 fichiers · Android + iOS + Web</text:span></text:p>
          <draw:enhanced-geometry svg:viewBox="0 0 21600 21600" draw:type="rectangle" draw:enhanced-path="M 0 0 L 21600 0 21600 21600 0 21600 0 0 Z N"/>
        </draw:custom-shape>
        <draw:custom-shape draw:name="Shape 6" draw:style-name="gr28" draw:text-style-name="P1" draw:layer="layout" svg:width="11.683cm" svg:height="2.844cm" svg:x="13.462cm" svg:y="2.667cm">
          <text:p/>
          <draw:enhanced-geometry svg:viewBox="0 0 21600 21600" draw:type="rectangle" draw:enhanced-path="M 0 0 L 21600 0 21600 21600 0 21600 0 0 Z N"/>
        </draw:custom-shape>
        <draw:custom-shape draw:name="Text 7" draw:style-name="gr2" draw:text-style-name="P3" draw:layer="layout" svg:width="1.396cm" svg:height="1.396cm" svg:x="13.843cm" svg:y="3.429cm">
          <text:p text:style-name="P4"><text:span text:style-name="T2">📋</text:span></text:p>
          <draw:enhanced-geometry svg:viewBox="0 0 21600 21600" draw:type="rectangle" draw:enhanced-path="M 0 0 L 21600 0 21600 21600 0 21600 0 0 Z N"/>
        </draw:custom-shape>
        <draw:custom-shape draw:name="Text 8" draw:style-name="gr2" draw:text-style-name="P3" draw:layer="layout" svg:width="9.397cm" svg:height="0.964cm" svg:x="15.494cm" svg:y="3.048cm">
          <text:p text:style-name="P2"><text:span text:style-name="T15">CDC complet</text:span></text:p>
          <draw:enhanced-geometry svg:viewBox="0 0 21600 21600" draw:type="rectangle" draw:enhanced-path="M 0 0 L 21600 0 21600 21600 0 21600 0 0 Z N"/>
        </draw:custom-shape>
        <draw:custom-shape draw:name="Text 9" draw:style-name="gr2" draw:text-style-name="P3" draw:layer="layout" svg:width="9.397cm" svg:height="1.015cm" svg:x="15.494cm" svg:y="4.064cm">
          <text:p text:style-name="P2"><text:span text:style-name="T6">60 user stories · 9 modules · planning 6 phases</text:span></text:p>
          <draw:enhanced-geometry svg:viewBox="0 0 21600 21600" draw:type="rectangle" draw:enhanced-path="M 0 0 L 21600 0 21600 21600 0 21600 0 0 Z N"/>
        </draw:custom-shape>
        <draw:custom-shape draw:name="Shape 10" draw:style-name="gr28" draw:text-style-name="P1" draw:layer="layout" svg:width="11.683cm" svg:height="2.844cm" svg:x="1.016cm" svg:y="5.918cm">
          <text:p/>
          <draw:enhanced-geometry svg:viewBox="0 0 21600 21600" draw:type="rectangle" draw:enhanced-path="M 0 0 L 21600 0 21600 21600 0 21600 0 0 Z N"/>
        </draw:custom-shape>
        <draw:custom-shape draw:name="Text 11" draw:style-name="gr2" draw:text-style-name="P3" draw:layer="layout" svg:width="1.396cm" svg:height="1.396cm" svg:x="1.397cm" svg:y="6.68cm">
          <text:p text:style-name="P4"><text:span text:style-name="T2">🗄️</text:span></text:p>
          <draw:enhanced-geometry svg:viewBox="0 0 21600 21600" draw:type="rectangle" draw:enhanced-path="M 0 0 L 21600 0 21600 21600 0 21600 0 0 Z N"/>
        </draw:custom-shape>
        <draw:custom-shape draw:name="Text 12" draw:style-name="gr2" draw:text-style-name="P3" draw:layer="layout" svg:width="9.397cm" svg:height="0.964cm" svg:x="3.048cm" svg:y="6.299cm">
          <text:p text:style-name="P2"><text:span text:style-name="T15">ERD + MCD + MLD</text:span></text:p>
          <draw:enhanced-geometry svg:viewBox="0 0 21600 21600" draw:type="rectangle" draw:enhanced-path="M 0 0 L 21600 0 21600 21600 0 21600 0 0 Z N"/>
        </draw:custom-shape>
        <draw:custom-shape draw:name="Text 13" draw:style-name="gr2" draw:text-style-name="P3" draw:layer="layout" svg:width="9.397cm" svg:height="1.015cm" svg:x="3.048cm" svg:y="7.315cm">
          <text:p text:style-name="P2"><text:span text:style-name="T6">5 entités · cohérence totale du schéma</text:span></text:p>
          <draw:enhanced-geometry svg:viewBox="0 0 21600 21600" draw:type="rectangle" draw:enhanced-path="M 0 0 L 21600 0 21600 21600 0 21600 0 0 Z N"/>
        </draw:custom-shape>
        <draw:custom-shape draw:name="Shape 14" draw:style-name="gr28" draw:text-style-name="P1" draw:layer="layout" svg:width="11.683cm" svg:height="2.844cm" svg:x="13.462cm" svg:y="5.918cm">
          <text:p/>
          <draw:enhanced-geometry svg:viewBox="0 0 21600 21600" draw:type="rectangle" draw:enhanced-path="M 0 0 L 21600 0 21600 21600 0 21600 0 0 Z N"/>
        </draw:custom-shape>
        <draw:custom-shape draw:name="Text 15" draw:style-name="gr2" draw:text-style-name="P3" draw:layer="layout" svg:width="1.396cm" svg:height="1.396cm" svg:x="13.843cm" svg:y="6.68cm">
          <text:p text:style-name="P4"><text:span text:style-name="T2">📐</text:span></text:p>
          <draw:enhanced-geometry svg:viewBox="0 0 21600 21600" draw:type="rectangle" draw:enhanced-path="M 0 0 L 21600 0 21600 21600 0 21600 0 0 Z N"/>
        </draw:custom-shape>
        <draw:custom-shape draw:name="Text 16" draw:style-name="gr2" draw:text-style-name="P3" draw:layer="layout" svg:width="9.397cm" svg:height="0.964cm" svg:x="15.494cm" svg:y="6.299cm">
          <text:p text:style-name="P2"><text:span text:style-name="T15">Diagrammes UML</text:span></text:p>
          <draw:enhanced-geometry svg:viewBox="0 0 21600 21600" draw:type="rectangle" draw:enhanced-path="M 0 0 L 21600 0 21600 21600 0 21600 0 0 Z N"/>
        </draw:custom-shape>
        <draw:custom-shape draw:name="Text 17" draw:style-name="gr2" draw:text-style-name="P3" draw:layer="layout" svg:width="9.397cm" svg:height="1.015cm" svg:x="15.494cm" svg:y="7.315cm">
          <text:p text:style-name="P2"><text:span text:style-name="T6">Classes + Activité + 5 parcours flowcharts</text:span></text:p>
          <draw:enhanced-geometry svg:viewBox="0 0 21600 21600" draw:type="rectangle" draw:enhanced-path="M 0 0 L 21600 0 21600 21600 0 21600 0 0 Z N"/>
        </draw:custom-shape>
        <draw:custom-shape draw:name="Shape 18" draw:style-name="gr28" draw:text-style-name="P1" draw:layer="layout" svg:width="11.683cm" svg:height="2.844cm" svg:x="1.016cm" svg:y="9.169cm">
          <text:p/>
          <draw:enhanced-geometry svg:viewBox="0 0 21600 21600" draw:type="rectangle" draw:enhanced-path="M 0 0 L 21600 0 21600 21600 0 21600 0 0 Z N"/>
        </draw:custom-shape>
        <draw:custom-shape draw:name="Text 19" draw:style-name="gr2" draw:text-style-name="P3" draw:layer="layout" svg:width="1.396cm" svg:height="1.396cm" svg:x="1.397cm" svg:y="9.931cm">
          <text:p text:style-name="P4"><text:span text:style-name="T2">✏️</text:span></text:p>
          <draw:enhanced-geometry svg:viewBox="0 0 21600 21600" draw:type="rectangle" draw:enhanced-path="M 0 0 L 21600 0 21600 21600 0 21600 0 0 Z N"/>
        </draw:custom-shape>
        <draw:custom-shape draw:name="Text 20" draw:style-name="gr2" draw:text-style-name="P3" draw:layer="layout" svg:width="9.397cm" svg:height="0.964cm" svg:x="3.048cm" svg:y="9.55cm">
          <text:p text:style-name="P2"><text:span text:style-name="T15">Fichier draw.io</text:span></text:p>
          <draw:enhanced-geometry svg:viewBox="0 0 21600 21600" draw:type="rectangle" draw:enhanced-path="M 0 0 L 21600 0 21600 21600 0 21600 0 0 Z N"/>
        </draw:custom-shape>
        <draw:custom-shape draw:name="Text 21" draw:style-name="gr2" draw:text-style-name="P3" draw:layer="layout" svg:width="9.397cm" svg:height="1.015cm" svg:x="3.048cm" svg:y="10.566cm">
          <text:p text:style-name="P2"><text:span text:style-name="T6">8 onglets · 100% éditables</text:span></text:p>
          <draw:enhanced-geometry svg:viewBox="0 0 21600 21600" draw:type="rectangle" draw:enhanced-path="M 0 0 L 21600 0 21600 21600 0 21600 0 0 Z N"/>
        </draw:custom-shape>
        <draw:custom-shape draw:name="Shape 22" draw:style-name="gr28" draw:text-style-name="P1" draw:layer="layout" svg:width="11.683cm" svg:height="2.844cm" svg:x="13.462cm" svg:y="9.169cm">
          <text:p/>
          <draw:enhanced-geometry svg:viewBox="0 0 21600 21600" draw:type="rectangle" draw:enhanced-path="M 0 0 L 21600 0 21600 21600 0 21600 0 0 Z N"/>
        </draw:custom-shape>
        <draw:custom-shape draw:name="Text 23" draw:style-name="gr2" draw:text-style-name="P3" draw:layer="layout" svg:width="1.396cm" svg:height="1.396cm" svg:x="13.843cm" svg:y="9.931cm">
          <text:p text:style-name="P4"><text:span text:style-name="T2">📖</text:span></text:p>
          <draw:enhanced-geometry svg:viewBox="0 0 21600 21600" draw:type="rectangle" draw:enhanced-path="M 0 0 L 21600 0 21600 21600 0 21600 0 0 Z N"/>
        </draw:custom-shape>
        <draw:custom-shape draw:name="Text 24" draw:style-name="gr2" draw:text-style-name="P3" draw:layer="layout" svg:width="9.397cm" svg:height="0.964cm" svg:x="15.494cm" svg:y="9.55cm">
          <text:p text:style-name="P2"><text:span text:style-name="T15">Dossier de présentation</text:span></text:p>
          <draw:enhanced-geometry svg:viewBox="0 0 21600 21600" draw:type="rectangle" draw:enhanced-path="M 0 0 L 21600 0 21600 21600 0 21600 0 0 Z N"/>
        </draw:custom-shape>
        <draw:custom-shape draw:name="Text 25" draw:style-name="gr2" draw:text-style-name="P3" draw:layer="layout" svg:width="9.397cm" svg:height="1.015cm" svg:x="15.494cm" svg:y="10.566cm">
          <text:p text:style-name="P2"><text:span text:style-name="T6">~25 pages · 25 Q&amp;R anticipées · glossaire 65 termes</text:span></text:p>
          <draw:enhanced-geometry svg:viewBox="0 0 21600 21600" draw:type="rectangle" draw:enhanced-path="M 0 0 L 21600 0 21600 21600 0 21600 0 0 Z N"/>
        </draw:custom-shape>
        <draw:custom-shape draw:name="Text 26" draw:style-name="gr2" draw:text-style-name="P3" draw:layer="layout" svg:width="23.367cm" svg:height="1.066cm" svg:x="1.016cm" svg:y="12.954cm">
          <text:p text:style-name="P4"><text:span text:style-name="T23">Merci · Questions ?</text:span></text:p>
          <draw:enhanced-geometry svg:viewBox="0 0 21600 21600" draw:type="rectangle" draw:enhanced-path="M 0 0 L 21600 0 21600 21600 0 21600 0 0 Z N"/>
        </draw:custom-shape>
        <presentation:notes draw:style-name="dp2">
          <draw:page-thumbnail draw:name="Slide Image Placeholder 1" draw:style-name="gr5" draw:layer="layout" svg:width="15.239cm" svg:height="8.572cm" svg:x="-0.039cm" svg:y="1.028cm" draw:page-number="10" presentation:class="page"/>
          <draw:frame draw:name="Notes Placeholder 2" presentation:style-name="pr1" draw:text-style-name="P3" draw:layer="layout" svg:width="15.239cm" svg:height="10cm" svg:x="0.161cm" svg:y="10.4cm" presentation:class="notes" presentation:user-transformed="true">
            <draw:text-box>
              <text:p><text:span text:style-name="T8">SLIDE 10 — CONCLUSION (30 secondes)</text:span></text:p>
              <text:p><text:span text:style-name="T8"/></text:p>
              <text:p><text:span text:style-name="T8">SCRIPT ORAL :</text:span></text:p>
              <text:p><text:span text:style-name="T8">"Pour résumer ce qu'on a produit : une application Flutter complète avec 42 fichiers organisés en Feature-First Clean Architecture, un CDC de 60 user stories, une modélisation complète — ERD, MCD, MLD, diagramme de classes et d'activité — et tous les fichiers sont 100% éditables dans draw.io. On a traité ce projet scolaire comme un vrai projet professionnel, avec les standards de l'industrie. Merci de votre attention, je suis disponible pour vos questions."</text:span></text:p>
              <text:p><text:span text:style-name="T8"/></text:p>
              <text:p><text:span text:style-name="T8">CONSEILS POUR LA Q&amp;R :</text:span></text:p>
              <text:p><text:span text:style-name="T8">→ </text:span><text:span text:style-name="T8">Prenez 2-3 secondes avant de répondre — ça montre que vous réfléchissez</text:span></text:p>
              <text:p><text:span text:style-name="T8">→ </text:span><text:span text:style-name="T8">Si vous ne savez pas : "C'est une bonne question, ça n'est pas dans le périmètre du MVP mais voici comment on l'aborderait en V2..."</text:span></text:p>
              <text:p><text:span text:style-name="T8">→ </text:span><text:span text:style-name="T8">Reformulez les questions difficiles avant de répondre</text:span></text:p>
              <text:p><text:span text:style-name="T8"/></text:p>
              <text:p><text:span text:style-name="T8">TOP 5 QUESTIONS SURPRISES POSSIBLES :</text:span></text:p>
              <text:p><text:span text:style-name="T8">1. "Montrez-moi concrètement comment Riverpod fonctionne dans votre code."</text:span></text:p>
              <text:p><text:span text:style-name="T8"><text:s text:c="3"/>→ </text:span><text:span text:style-name="T8">Expliquer EventProvider : un Provider qui lit Isar et expose une liste d'événements. Tous les widgets qui font ref.watch(eventProvider) se rebuild automatiquement.</text:span></text:p>
              <text:p><text:span text:style-name="T8"/></text:p>
              <text:p><text:span text:style-name="T8">2. "Si Firebase tombe en panne, que se passe-t-il ?"</text:span></text:p>
              <text:p><text:span text:style-name="T8"><text:s text:c="3"/>→ </text:span><text:span text:style-name="T8">L'app continue à fonctionner en offline (Isar local). Les nouvelles données ne se synchronisent pas mais tout l'existant reste accessible. On resynchrone dès que Firebase revient.</text:span></text:p>
              <text:p><text:span text:style-name="T8"/></text:p>
              <text:p><text:span text:style-name="T8">3. "Comment vous testez le QR code ?"</text:span></text:p>
              <text:p><text:span text:style-name="T8"><text:s text:c="3"/>→ </text:span><text:span text:style-name="T8">Test unitaire : générer un QR avec une clé de test, simuler le scan, vérifier que la signature est valide. Test d'intégration : simuler le parcours complet achat → scan en environnement de test.</text:span></text:p>
              <text:p><text:span text:style-name="T8"/></text:p>
              <text:p><text:span text:style-name="T8">4. "Votre CDC mentionne un assistant de planification IA — c'est implémenté ?"</text:span></text:p>
              <text:p><text:span text:style-name="T8"><text:s text:c="3"/>→ </text:span><text:span text:style-name="T8">Non, c'est en MoSCoW 'Could Have', prévu en phase 5-6. Le MVP se concentre sur les 'Must Have'.</text:span></text:p>
              <text:p><text:span text:style-name="T8"/></text:p>
              <text:p><text:span text:style-name="T8">5. "Quel est votre KPI le plus important ?"</text:span></text:p>
              <text:p><text:span text:style-name="T8"><text:s text:c="3"/>→ </text:span><text:span text:style-name="T8">Le taux de conversion catalogue → achat, cible &gt; 8%. C'est le KPI qui valide la proposition de valeur principale de l'app.</text:span></text:p>
            </draw:text-box>
          </draw:frame>
          <draw:frame draw:name="Slide Number Placeholder 3" presentation:style-name="pr2" draw:text-style-name="P6" draw:layer="layout" svg:width="8.254cm" svg:height="1.273cm" svg:x="10.791cm" svg:y="24.126cm" presentation:class="page-number" presentation:user-transformed="true">
            <draw:text-box>
              <text:p text:style-name="P5"><text:span text:style-name="T9"><text:page-number>&lt;numé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Calibri" fo:font-size="32pt" fo:letter-spacing="normal"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cm" fo:margin-bottom="0.4cm" fo:text-align="start" style:punctuation-wrap="hanging" style:writing-mode="lr-tb"/>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Standard-outline3" style:family="presentation" style:parent-style-name="Standard-outline2">
      <style:paragraph-properties fo:margin-top="0cm" fo:margin-bottom="0.3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outline4" style:family="presentation" style:parent-style-name="Standard-outline3">
      <style:paragraph-properties fo:margin-top="0cm" fo:margin-bottom="0.2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alibri" fo:font-size="18pt" fo:letter-spacing="normal"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4.288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85cm"/>
    </style:style>
    <style:style style:name="Mpr2"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éro&gt;</text:page-number></text:p>
        </draw:text-box>
      </draw:frame>
    </style:handout-master>
    <style:master-page style:name="Standard" style:page-layout-name="PM1" draw:style-name="Mdp1">
      <draw:frame presentation:style-name="Standard-title" draw:layer="backgroundobjects" svg:width="22.859cm" svg:height="2.385cm" svg:x="1.27cm" svg:y="0.57cm" presentation:class="title" presentation:placeholder="true">
        <draw:text-box/>
      </draw:frame>
      <draw:frame presentation:style-name="Standard-outline1" draw:layer="backgroundobjects" svg:width="22.859cm" svg:height="9.429cm" svg:x="1.27cm" svg:y="3.343cm" presentation:class="outline" presentation:placeholder="true">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presentation:header/></text:p>
          </draw:text-box>
        </draw:frame>
        <draw:frame presentation:style-name="Mpr1" draw:text-style-name="MP2" draw:layer="backgroundobjects" svg:width="9.113cm" svg:height="1.484cm" svg:x="11.886cm" svg:y="0cm" presentation:class="date-time">
          <draw:text-box>
            <text:p text:style-name="MP2"><presentation:date-time/></text:p>
          </draw:text-box>
        </draw:frame>
        <draw:frame presentation:style-name="Mpr2" draw:text-style-name="MP1" draw:layer="backgroundobjects" svg:width="9.113cm" svg:height="1.484cm" svg:x="0cm" svg:y="28.215cm" presentation:class="footer">
          <draw:text-box>
            <text:p text:style-name="MP1"><presentation:footer/></text:p>
          </draw:text-box>
        </draw:frame>
        <draw:frame presentation:style-name="Mpr2" draw:text-style-name="MP2" draw:layer="backgroundobjects" svg:width="9.113cm" svg:height="1.484cm" svg:x="11.886cm" svg:y="28.215cm" presentation:class="page-number">
          <draw:text-box>
            <text:p text:style-name="MP2"><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6-05-25T22:21:56.22</dc:date>
    <meta:document-statistic meta:object-count="283"/>
    <meta:generator>OpenOffice/4.1.14$Win32 OpenOffice.org_project/4114m1$Build-9811</meta:generator>
  </office:meta>
</office:document-meta>
</file>