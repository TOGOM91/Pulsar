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3" style:family="table">
      <style:table-properties style:width="15.921cm" fo:margin-left="-0.191cm" fo:margin-top="0cm" fo:margin-bottom="0cm" table:align="left"/>
    </style:style>
    <style:style style:name="Tableau3.A" style:family="table-column">
      <style:table-column-properties style:column-width="4.408cm"/>
    </style:style>
    <style:style style:name="Tableau3.B" style:family="table-column">
      <style:table-column-properties style:column-width="11.511cm"/>
    </style:style>
    <style:style style:name="Tableau3.1" style:family="table-row">
      <style:table-row-properties style:min-row-height="1.612cm" style:keep-together="true" fo:keep-together="auto"/>
    </style:style>
    <style:style style:name="Tableau3.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3.2" style:family="table-row">
      <style:table-row-properties style:keep-together="true" fo:keep-together="auto"/>
    </style:style>
    <style:style style:name="Tableau3.A2"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3.A3" style:family="table-cell">
      <style:table-cell-properties style:vertical-align="middle" fo:padding-left="0.191cm" fo:padding-right="0.191cm" fo:padding-top="0cm" fo:padding-bottom="0cm" fo:border="0.004cm solid #e2e8f0"/>
    </style:style>
    <style:style style:name="Tableau4" style:family="table">
      <style:table-properties style:width="15.921cm" fo:margin-left="-0.191cm" fo:margin-top="0cm" fo:margin-bottom="0cm" table:align="left"/>
    </style:style>
    <style:style style:name="Tableau4.A" style:family="table-column">
      <style:table-column-properties style:column-width="2.644cm"/>
    </style:style>
    <style:style style:name="Tableau4.B" style:family="table-column">
      <style:table-column-properties style:column-width="4.408cm"/>
    </style:style>
    <style:style style:name="Tableau4.C" style:family="table-column">
      <style:table-column-properties style:column-width="3.526cm"/>
    </style:style>
    <style:style style:name="Tableau4.D" style:family="table-column">
      <style:table-column-properties style:column-width="5.341cm"/>
    </style:style>
    <style:style style:name="Tableau4.1" style:family="table-row">
      <style:table-row-properties style:keep-together="true" fo:keep-together="auto"/>
    </style:style>
    <style:style style:name="Tableau4.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4.A2" style:family="table-cell">
      <style:table-cell-properties style:vertical-align="middle" fo:padding-left="0.191cm" fo:padding-right="0.191cm" fo:padding-top="0cm" fo:padding-bottom="0cm" fo:border="0.004cm solid #e2e8f0"/>
    </style:style>
    <style:style style:name="Tableau4.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5" style:family="table">
      <style:table-properties style:width="15.921cm" fo:margin-left="-0.191cm" fo:margin-top="0cm" fo:margin-bottom="0cm" table:align="left"/>
    </style:style>
    <style:style style:name="Tableau5.A" style:family="table-column">
      <style:table-column-properties style:column-width="4.408cm"/>
    </style:style>
    <style:style style:name="Tableau5.B" style:family="table-column">
      <style:table-column-properties style:column-width="2.644cm"/>
    </style:style>
    <style:style style:name="Tableau5.C" style:family="table-column">
      <style:table-column-properties style:column-width="2.999cm"/>
    </style:style>
    <style:style style:name="Tableau5.E" style:family="table-column">
      <style:table-column-properties style:column-width="3.226cm"/>
    </style:style>
    <style:style style:name="Tableau5.1" style:family="table-row">
      <style:table-row-properties style:keep-together="true" fo:keep-together="auto"/>
    </style:style>
    <style:style style:name="Tableau5.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5.A2" style:family="table-cell">
      <style:table-cell-properties style:vertical-align="middle" fo:padding-left="0.191cm" fo:padding-right="0.191cm" fo:padding-top="0cm" fo:padding-bottom="0cm" fo:border="0.004cm solid #e2e8f0"/>
    </style:style>
    <style:style style:name="Tableau5.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6" style:family="table">
      <style:table-properties style:width="15.921cm" fo:margin-left="-0.191cm" fo:margin-top="0cm" fo:margin-bottom="0cm" table:align="left"/>
    </style:style>
    <style:style style:name="Tableau6.A" style:family="table-column">
      <style:table-column-properties style:column-width="3.526cm"/>
    </style:style>
    <style:style style:name="Tableau6.B" style:family="table-column">
      <style:table-column-properties style:column-width="3.879cm"/>
    </style:style>
    <style:style style:name="Tableau6.C" style:family="table-column">
      <style:table-column-properties style:column-width="2.646cm"/>
    </style:style>
    <style:style style:name="Tableau6.D" style:family="table-column">
      <style:table-column-properties style:column-width="5.868cm"/>
    </style:style>
    <style:style style:name="Tableau6.1" style:family="table-row">
      <style:table-row-properties style:keep-together="true" fo:keep-together="auto"/>
    </style:style>
    <style:style style:name="Tableau6.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6.A2" style:family="table-cell">
      <style:table-cell-properties style:vertical-align="middle" fo:padding-left="0.191cm" fo:padding-right="0.191cm" fo:padding-top="0cm" fo:padding-bottom="0cm" fo:border="0.004cm solid #e2e8f0"/>
    </style:style>
    <style:style style:name="Tableau6.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7" style:family="table">
      <style:table-properties style:width="15.921cm" fo:margin-left="-0.191cm" fo:margin-top="0cm" fo:margin-bottom="0cm" table:align="left"/>
    </style:style>
    <style:style style:name="Tableau7.A" style:family="table-column">
      <style:table-column-properties style:column-width="3.173cm"/>
    </style:style>
    <style:style style:name="Tableau7.B" style:family="table-column">
      <style:table-column-properties style:column-width="4.939cm"/>
    </style:style>
    <style:style style:name="Tableau7.C" style:family="table-column">
      <style:table-column-properties style:column-width="2.822cm"/>
    </style:style>
    <style:style style:name="Tableau7.D" style:family="table-column">
      <style:table-column-properties style:column-width="4.985cm"/>
    </style:style>
    <style:style style:name="Tableau7.1" style:family="table-row">
      <style:table-row-properties style:keep-together="true" fo:keep-together="auto"/>
    </style:style>
    <style:style style:name="Tableau7.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7.A2" style:family="table-cell">
      <style:table-cell-properties style:vertical-align="middle" fo:padding-left="0.191cm" fo:padding-right="0.191cm" fo:padding-top="0cm" fo:padding-bottom="0cm" fo:border="0.004cm solid #e2e8f0"/>
    </style:style>
    <style:style style:name="Tableau7.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8" style:family="table">
      <style:table-properties style:width="15.921cm" fo:margin-left="-0.191cm" fo:margin-top="0cm" fo:margin-bottom="0cm" table:align="left"/>
    </style:style>
    <style:style style:name="Tableau8.A" style:family="table-column">
      <style:table-column-properties style:column-width="4.937cm"/>
    </style:style>
    <style:style style:name="Tableau8.B" style:family="table-column">
      <style:table-column-properties style:column-width="4.41cm"/>
    </style:style>
    <style:style style:name="Tableau8.C" style:family="table-column">
      <style:table-column-properties style:column-width="6.574cm"/>
    </style:style>
    <style:style style:name="Tableau8.1" style:family="table-row">
      <style:table-row-properties style:keep-together="true" fo:keep-together="auto"/>
    </style:style>
    <style:style style:name="Tableau8.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8.A2" style:family="table-cell">
      <style:table-cell-properties style:vertical-align="middle" fo:padding-left="0.191cm" fo:padding-right="0.191cm" fo:padding-top="0cm" fo:padding-bottom="0cm" fo:border="0.004cm solid #e2e8f0"/>
    </style:style>
    <style:style style:name="Tableau8.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9" style:family="table">
      <style:table-properties style:width="15.921cm" fo:margin-left="-0.191cm" fo:margin-top="0cm" fo:margin-bottom="0cm" table:align="left"/>
    </style:style>
    <style:style style:name="Tableau9.A" style:family="table-column">
      <style:table-column-properties style:column-width="3.879cm"/>
    </style:style>
    <style:style style:name="Tableau9.B" style:family="table-column">
      <style:table-column-properties style:column-width="3.881cm"/>
    </style:style>
    <style:style style:name="Tableau9.C" style:family="table-column">
      <style:table-column-properties style:column-width="4.057cm"/>
    </style:style>
    <style:style style:name="Tableau9.D" style:family="table-column">
      <style:table-column-properties style:column-width="4.103cm"/>
    </style:style>
    <style:style style:name="Tableau9.1" style:family="table-row">
      <style:table-row-properties style:keep-together="true" fo:keep-together="auto"/>
    </style:style>
    <style:style style:name="Tableau9.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9.A2" style:family="table-cell">
      <style:table-cell-properties style:vertical-align="middle" fo:padding-left="0.191cm" fo:padding-right="0.191cm" fo:padding-top="0cm" fo:padding-bottom="0cm" fo:border="0.004cm solid #e2e8f0"/>
    </style:style>
    <style:style style:name="Tableau9.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0" style:family="table">
      <style:table-properties style:width="15.921cm" fo:margin-left="-0.191cm" fo:margin-top="0cm" fo:margin-bottom="0cm" table:align="left"/>
    </style:style>
    <style:style style:name="Tableau10.A" style:family="table-column">
      <style:table-column-properties style:column-width="3.879cm"/>
    </style:style>
    <style:style style:name="Tableau10.B" style:family="table-column">
      <style:table-column-properties style:column-width="3.881cm"/>
    </style:style>
    <style:style style:name="Tableau10.C" style:family="table-column">
      <style:table-column-properties style:column-width="2.644cm"/>
    </style:style>
    <style:style style:name="Tableau10.D" style:family="table-column">
      <style:table-column-properties style:column-width="5.516cm"/>
    </style:style>
    <style:style style:name="Tableau10.1" style:family="table-row">
      <style:table-row-properties style:keep-together="true" fo:keep-together="auto"/>
    </style:style>
    <style:style style:name="Tableau10.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10.A2" style:family="table-cell">
      <style:table-cell-properties style:vertical-align="middle" fo:padding-left="0.191cm" fo:padding-right="0.191cm" fo:padding-top="0cm" fo:padding-bottom="0cm" fo:border="0.004cm solid #e2e8f0"/>
    </style:style>
    <style:style style:name="Tableau10.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1" style:family="table">
      <style:table-properties style:width="15.921cm" fo:margin-left="-0.191cm" fo:margin-top="0cm" fo:margin-bottom="0cm" table:align="left"/>
    </style:style>
    <style:style style:name="Tableau11.A" style:family="table-column">
      <style:table-column-properties style:column-width="2.644cm"/>
    </style:style>
    <style:style style:name="Tableau11.B" style:family="table-column">
      <style:table-column-properties style:column-width="4.939cm"/>
    </style:style>
    <style:style style:name="Tableau11.C" style:family="table-column">
      <style:table-column-properties style:column-width="8.338cm"/>
    </style:style>
    <style:style style:name="Tableau11.1" style:family="table-row">
      <style:table-row-properties style:keep-together="true" fo:keep-together="auto"/>
    </style:style>
    <style:style style:name="Tableau11.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11.A2" style:family="table-cell">
      <style:table-cell-properties style:vertical-align="middle" fo:padding-left="0.191cm" fo:padding-right="0.191cm" fo:padding-top="0cm" fo:padding-bottom="0cm" fo:border="0.004cm solid #e2e8f0"/>
    </style:style>
    <style:style style:name="Tableau11.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2" style:family="table">
      <style:table-properties style:width="15.921cm" fo:margin-left="-0.191cm" fo:margin-top="0cm" fo:margin-bottom="0cm" table:align="left"/>
    </style:style>
    <style:style style:name="Tableau12.A" style:family="table-column">
      <style:table-column-properties style:column-width="4.408cm"/>
    </style:style>
    <style:style style:name="Tableau12.B" style:family="table-column">
      <style:table-column-properties style:column-width="2.293cm"/>
    </style:style>
    <style:style style:name="Tableau12.C" style:family="table-column">
      <style:table-column-properties style:column-width="2.115cm"/>
    </style:style>
    <style:style style:name="Tableau12.D" style:family="table-column">
      <style:table-column-properties style:column-width="7.103cm"/>
    </style:style>
    <style:style style:name="Tableau12.1" style:family="table-row">
      <style:table-row-properties style:keep-together="true" fo:keep-together="auto"/>
    </style:style>
    <style:style style:name="Tableau12.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12.A2" style:family="table-cell">
      <style:table-cell-properties style:vertical-align="middle" fo:padding-left="0.191cm" fo:padding-right="0.191cm" fo:padding-top="0cm" fo:padding-bottom="0cm" fo:border="0.004cm solid #e2e8f0"/>
    </style:style>
    <style:style style:name="Tableau12.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3" style:family="table">
      <style:table-properties style:width="15.921cm" fo:margin-left="-0.191cm" fo:margin-top="0cm" fo:margin-bottom="0cm" table:align="left"/>
    </style:style>
    <style:style style:name="Tableau13.A" style:family="table-column">
      <style:table-column-properties style:column-width="3.879cm"/>
    </style:style>
    <style:style style:name="Tableau13.B" style:family="table-column">
      <style:table-column-properties style:column-width="12.04cm"/>
    </style:style>
    <style:style style:name="Tableau13.1" style:family="table-row">
      <style:table-row-properties style:keep-together="true" fo:keep-together="auto"/>
    </style:style>
    <style:style style:name="Tableau13.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13.A2" style:family="table-cell">
      <style:table-cell-properties style:vertical-align="middle" fo:padding-left="0.191cm" fo:padding-right="0.191cm" fo:padding-top="0cm" fo:padding-bottom="0cm" fo:border="0.004cm solid #e2e8f0"/>
    </style:style>
    <style:style style:name="Tableau13.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 style:family="table">
      <style:table-properties style:width="15.921cm" fo:margin-left="-0.191cm" fo:margin-top="0cm" fo:margin-bottom="0cm" table:align="left"/>
    </style:style>
    <style:style style:name="Tableau1.A" style:family="table-column">
      <style:table-column-properties style:column-width="5.29cm"/>
    </style:style>
    <style:style style:name="Tableau1.B" style:family="table-column">
      <style:table-column-properties style:column-width="10.629cm"/>
    </style:style>
    <style:style style:name="Tableau1.1" style:family="table-row">
      <style:table-row-properties style:keep-together="true" fo:keep-together="auto"/>
    </style:style>
    <style:style style:name="Tableau1.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1.A2" style:family="table-cell">
      <style:table-cell-properties style:vertical-align="middle" fo:padding-left="0.191cm" fo:padding-right="0.191cm" fo:padding-top="0cm" fo:padding-bottom="0cm" fo:border="0.004cm solid #e2e8f0"/>
    </style:style>
    <style:style style:name="Tableau1.A3" style:family="table-cell">
      <style:table-cell-properties style:vertical-align="middle" fo:background-color="#f8fafc" fo:padding-left="0.191cm" fo:padding-right="0.191cm" fo:padding-top="0cm" fo:padding-bottom="0cm" fo:border="0.004cm solid #e2e8f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master-page-name="Standard">
      <style:paragraph-properties fo:margin-top="0cm" fo:margin-bottom="3.528cm" style:page-number="auto"/>
    </style:style>
    <style:style style:name="P4" style:family="paragraph" style:parent-style-name="Standard">
      <style:paragraph-properties fo:margin-top="0cm" fo:margin-bottom="0.353cm"/>
    </style:style>
    <style:style style:name="P5" style:family="paragraph" style:parent-style-name="Standard">
      <style:paragraph-properties fo:margin-top="0cm" fo:margin-bottom="0.353cm" fo:text-align="center" style:justify-single-word="false"/>
    </style:style>
    <style:style style:name="P6" style:family="paragraph" style:parent-style-name="Standard">
      <style:paragraph-properties fo:margin-top="0cm" fo:margin-bottom="0.353cm" fo:text-align="end" style:justify-single-word="false" fo:padding-left="0cm" fo:padding-right="0cm" fo:padding-top="0cm" fo:padding-bottom="0.212cm" fo:border-left="none" fo:border-right="none" fo:border-top="none" fo:border-bottom="0.009cm solid #7c3aed"/>
    </style:style>
    <style:style style:name="P7" style:family="paragraph" style:parent-style-name="Standard">
      <style:paragraph-properties fo:margin-top="0cm" fo:margin-bottom="0.529cm"/>
    </style:style>
    <style:style style:name="P8" style:family="paragraph" style:parent-style-name="Standard">
      <style:paragraph-properties fo:margin-top="0.353cm" fo:margin-bottom="0.353cm" fo:text-align="center" style:justify-single-word="false" fo:padding-left="0cm" fo:padding-right="0cm" fo:padding-top="0.353cm" fo:padding-bottom="0.353cm" fo:border-left="none" fo:border-right="none" fo:border-top="0.018cm solid #7c3aed" fo:border-bottom="0.018cm solid #7c3aed"/>
    </style:style>
    <style:style style:name="P9" style:family="paragraph" style:parent-style-name="Standard">
      <style:paragraph-properties fo:margin-top="0cm" fo:margin-bottom="0.141cm" fo:text-align="center" style:justify-single-word="false"/>
    </style:style>
    <style:style style:name="P10" style:family="paragraph" style:parent-style-name="Standard">
      <style:paragraph-properties fo:margin-top="0cm" fo:margin-bottom="1.058cm"/>
    </style:style>
    <style:style style:name="P11" style:family="paragraph" style:parent-style-name="Standard">
      <style:paragraph-properties fo:margin-top="0cm" fo:margin-bottom="0.176cm"/>
    </style:style>
    <style:style style:name="P12" style:family="paragraph" style:parent-style-name="Standard">
      <style:paragraph-properties fo:margin-top="0cm" fo:margin-bottom="0.176cm" fo:text-align="center" style:justify-single-word="false"/>
    </style:style>
    <style:style style:name="P13" style:family="paragraph" style:parent-style-name="Standard">
      <style:paragraph-properties fo:margin-top="0cm" fo:margin-bottom="0.212cm" fo:text-align="justify" style:justify-single-word="false"/>
    </style:style>
    <style:style style:name="P14" style:family="paragraph" style:parent-style-name="Standard">
      <style:paragraph-properties fo:margin-top="0cm" fo:margin-bottom="0.106cm"/>
    </style:style>
    <style:style style:name="P15" style:family="paragraph" style:parent-style-name="Standard">
      <style:paragraph-properties fo:margin-left="0.635cm" fo:margin-right="0cm" fo:margin-top="0cm" fo:margin-bottom="0.176cm" fo:text-indent="0cm" style:auto-text-indent="false"/>
    </style:style>
    <style:style style:name="P16" style:family="paragraph" style:parent-style-name="Standard">
      <style:paragraph-properties fo:margin-top="0.529cm" fo:margin-bottom="0.529cm" fo:padding-left="0cm" fo:padding-right="0cm" fo:padding-top="0cm" fo:padding-bottom="0.035cm" fo:border-left="none" fo:border-right="none" fo:border-top="none" fo:border-bottom="0.026cm solid #7c3aed"/>
    </style:style>
    <style:style style:name="P17" style:family="paragraph" style:parent-style-name="Standard">
      <style:paragraph-properties fo:margin-top="0cm" fo:margin-bottom="0.035cm"/>
    </style:style>
    <style:style style:name="P18" style:family="paragraph" style:parent-style-name="Standard">
      <style:paragraph-properties fo:text-align="center" style:justify-single-word="false" fo:padding-left="0cm" fo:padding-right="0cm" fo:padding-top="0.212cm" fo:padding-bottom="0cm" fo:border-left="none" fo:border-right="none" fo:border-top="0.004cm solid #e2e8f0" fo:border-bottom="non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List_20_Paragraph">
      <style:paragraph-properties fo:margin-top="0cm" fo:margin-bottom="0.106cm"/>
    </style:style>
    <style:style style:name="P22" style:family="paragraph" style:parent-style-name="List_20_Paragraph" style:list-style-name="WWNum2">
      <style:paragraph-properties fo:margin-top="0cm" fo:margin-bottom="0.106cm"/>
    </style:style>
    <style:style style:name="P23" style:family="paragraph" style:parent-style-name="Contents_20_2">
      <style:paragraph-properties>
        <style:tab-stops>
          <style:tab-stop style:position="15.921cm" style:type="right" style:leader-style="dotted" style:leader-text="."/>
        </style:tab-stops>
      </style:paragraph-properties>
    </style:style>
    <style:style style:name="P24" style:family="paragraph" style:parent-style-name="Contents_20_1">
      <style:paragraph-properties>
        <style:tab-stops>
          <style:tab-stop style:position="15.921cm" style:type="right" style:leader-style="dotted" style:leader-text="."/>
        </style:tab-stops>
      </style:paragraph-properties>
    </style:style>
    <style:style style:name="P25"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fo:color="#7c3aed" style:font-name="Arial" fo:font-size="36pt" fo:font-weight="bold" style:font-name-asian="Arial2" style:font-size-asian="36pt" style:font-weight-asian="bold" style:font-name-complex="Arial2" style:font-size-complex="36pt" style:font-weight-complex="bold"/>
    </style:style>
    <style:style style:name="T2" style:family="text">
      <style:text-properties fo:color="#7c3aed" style:font-name="Arial"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3" style:family="text">
      <style:text-properties fo:color="#7c3aed" style:font-name="Arial" fo:font-size="9pt" fo:font-weight="bold" style:font-name-asian="Arial2" style:font-size-asian="9pt" style:font-weight-asian="bold" style:font-name-complex="Arial2" style:font-size-complex="9pt" style:font-weight-complex="bold"/>
    </style:style>
    <style:style style:name="T4" style:family="text">
      <style:text-properties fo:color="#7c3aed" style:font-name="Courier New" fo:font-size="10pt" fo:font-weight="bold" style:font-name-asian="Courier New1" style:font-size-asian="10pt" style:font-weight-asian="bold" style:font-name-complex="Courier New1" style:font-size-complex="10pt" style:font-weight-complex="bold"/>
    </style:style>
    <style:style style:name="T5" style:family="text">
      <style:text-properties fo:color="#ec4899" style:font-name="Arial" fo:font-size="14pt" style:font-name-asian="Arial2" style:font-size-asian="14pt" style:font-name-complex="Arial2" style:font-size-complex="14pt"/>
    </style:style>
    <style:style style:name="T6" style:family="text">
      <style:text-properties fo:color="#0f172a" style:font-name="Arial" fo:font-size="18pt" fo:font-weight="bold" style:font-name-asian="Arial2" style:font-size-asian="18pt" style:font-weight-asian="bold" style:font-name-complex="Arial2" style:font-size-complex="18pt" style:font-weight-complex="bold"/>
    </style:style>
    <style:style style:name="T7" style:family="text">
      <style:text-properties fo:color="#0f172a" style:font-name="Arial" fo:font-size="11pt" fo:font-weight="bold" style:font-name-asian="Arial2" style:font-size-asian="11pt" style:font-weight-asian="bold" style:font-name-complex="Arial2" style:font-size-complex="11pt" style:font-weight-complex="bold"/>
    </style:style>
    <style:style style:name="T8" style:family="text">
      <style:text-properties fo:color="#334155" style:font-name="Arial" fo:font-size="12pt" style:font-name-asian="Arial2" style:font-size-asian="12pt" style:font-name-complex="Arial2" style:font-size-complex="12pt"/>
    </style:style>
    <style:style style:name="T9" style:family="text">
      <style:text-properties fo:color="#334155" style:font-name="Arial" fo:font-size="10pt" fo:font-weight="normal" style:font-name-asian="Arial2" style:font-size-asian="10pt" style:font-weight-asian="normal" style:font-name-complex="Arial2" style:font-size-complex="10pt" style:font-weight-complex="normal"/>
    </style:style>
    <style:style style:name="T10" style:family="text">
      <style:text-properties fo:color="#334155" style:font-name="Arial" fo:font-size="10pt" fo:font-style="italic" style:font-name-asian="Arial2" style:font-size-asian="10pt" style:font-style-asian="italic" style:font-name-complex="Arial2" style:font-size-complex="10pt" style:font-style-complex="italic"/>
    </style:style>
    <style:style style:name="T11" style:family="text">
      <style:text-properties fo:color="#334155" style:font-name="Arial" fo:font-size="11pt" style:font-name-asian="Arial2" style:font-size-asian="11pt" style:font-name-complex="Arial2" style:font-size-complex="11pt"/>
    </style:style>
    <style:style style:name="T12" style:family="text">
      <style:text-properties fo:color="#334155" style:font-name="Courier New" fo:font-size="9pt" style:font-name-asian="Courier New1" style:font-size-asian="9pt" style:font-name-complex="Courier New1" style:font-size-complex="9pt"/>
    </style:style>
    <style:style style:name="T13" style:family="text">
      <style:text-properties fo:color="#94a3b8" style:font-name="Arial" fo:font-size="11pt" style:font-name-asian="Arial2" style:font-size-asian="11pt" style:font-name-complex="Arial2" style:font-size-complex="11pt"/>
    </style:style>
    <style:style style:name="T14" style:family="text">
      <style:text-properties fo:color="#94a3b8" style:font-name="Arial" fo:font-size="10pt" fo:font-style="italic" style:font-name-asian="Arial2" style:font-size-asian="10pt" style:font-style-asian="italic" style:font-name-complex="Arial2" style:font-size-complex="10pt" style:font-style-complex="italic"/>
    </style:style>
    <style:style style:name="T15" style:family="text">
      <style:text-properties fo:color="#94a3b8" style:font-name="Arial" fo:font-size="8pt" style:font-name-asian="Arial2" style:font-size-asian="8pt" style:font-name-complex="Arial2" style:font-size-complex="8pt"/>
    </style:style>
    <style:style style:name="T16" style:family="text">
      <style:text-properties fo:color="#ffffff" style:font-name="Arial" fo:font-size="10pt" fo:font-weight="bold" style:font-name-asian="Arial2" style:font-size-asian="10pt" style:font-weight-asian="bold" style:font-name-complex="Arial2" style:font-size-complex="10pt" style:font-weight-complex="bold"/>
    </style:style>
    <style:style style:name="T17" style:family="text">
      <style:text-properties fo:color="#10b981" style:font-name="Arial" fo:font-size="10pt" fo:font-style="italic" style:font-name-asian="Arial2" style:font-size-asian="10pt" style:font-style-asian="italic" style:font-name-complex="Arial2" style:font-size-complex="10pt"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text:span text:style-name="T1">PULSAR</text:span></text:p>
      <text:p text:style-name="P5"><text:span text:style-name="T5">par Neptune</text:span></text:p>
      <text:p text:style-name="P7"/>
      <text:p text:style-name="P8"><text:span text:style-name="T6">Cahier des Charges Fonctionnel et Technique</text:span></text:p>
      <text:p text:style-name="P7"/>
      <text:p text:style-name="P9"><text:span text:style-name="T8">Application mobile cross-platform de billetterie,</text:span></text:p>
      <text:p text:style-name="P9"><text:span text:style-name="T8">de transport bas carbone et d’hébergement événementiel</text:span></text:p>
      <text:p text:style-name="P10"><text:span text:style-name="T13"/></text:p>
      <text:p text:style-name="P12"><text:span text:style-name="T13">Équipe Neptune : Tom Farge, Islem, Manon, Seife</text:span></text:p>
      <text:p text:style-name="P1"><text:span text:style-name="T14">Document confidentiel</text:span></text:p>
      <text:p text:style-name="Standard"/>
      <text:h text:style-name="P19" text:outline-level="1"><text:bookmark-start text:name="__RefHeading__1998_1459372959"/>Fiche documentaire<text:bookmark-end text:name="__RefHeading__1998_1459372959"/></text:h>
      <text:p text:style-name="P11"/>
      <table:table table:name="Tableau1" table:style-name="Tableau1">
        <table:table-column table:style-name="Tableau1.A"/>
        <table:table-column table:style-name="Tableau1.B"/>
        <table:table-row table:style-name="Tableau1.1">
          <table:table-cell table:style-name="Tableau1.A1" office:value-type="string">
            <text:p text:style-name="P2"><text:span text:style-name="T16">Rubrique</text:span></text:p>
          </table:table-cell>
          <table:table-cell table:style-name="Tableau1.A1" office:value-type="string">
            <text:p text:style-name="P2"><text:span text:style-name="T16">Détail</text:span></text:p>
          </table:table-cell>
        </table:table-row>
        <table:table-row table:style-name="Tableau1.1">
          <table:table-cell table:style-name="Tableau1.A2" office:value-type="string">
            <text:p text:style-name="P2"><text:span text:style-name="T9">Projet</text:span></text:p>
          </table:table-cell>
          <table:table-cell table:style-name="Tableau1.A2" office:value-type="string">
            <text:p text:style-name="P2"><text:span text:style-name="T9">Pulsar <text:s text:c="2"/>MyDigitalProject</text:span></text:p>
          </table:table-cell>
        </table:table-row>
        <table:table-row table:style-name="Tableau1.1">
          <table:table-cell table:style-name="Tableau1.A3" office:value-type="string">
            <text:p text:style-name="P2"><text:span text:style-name="T9">Type de document</text:span></text:p>
          </table:table-cell>
          <table:table-cell table:style-name="Tableau1.A3" office:value-type="string">
            <text:p text:style-name="P2"><text:span text:style-name="T9">Cahier des Charges Fonctionnel et Technique (CDCFT)</text:span></text:p>
          </table:table-cell>
        </table:table-row>
        <table:table-row table:style-name="Tableau1.1">
          <table:table-cell table:style-name="Tableau1.A2" office:value-type="string">
            <text:p text:style-name="P2"><text:span text:style-name="T9">Version</text:span></text:p>
          </table:table-cell>
          <table:table-cell table:style-name="Tableau1.A2" office:value-type="string">
            <text:p text:style-name="P2"><text:span text:style-name="T9">1.0</text:span></text:p>
          </table:table-cell>
        </table:table-row>
        <table:table-row table:style-name="Tableau1.1">
          <table:table-cell table:style-name="Tableau1.A3" office:value-type="string">
            <text:p text:style-name="P2"><text:span text:style-name="T9">Date de création</text:span></text:p>
          </table:table-cell>
          <table:table-cell table:style-name="Tableau1.A3" office:value-type="string">
            <text:p text:style-name="P2"><text:span text:style-name="T9">Avril 2026</text:span></text:p>
          </table:table-cell>
        </table:table-row>
        <table:table-row table:style-name="Tableau1.1">
          <table:table-cell table:style-name="Tableau1.A2" office:value-type="string">
            <text:p text:style-name="P2"><text:span text:style-name="T9">Équipe</text:span></text:p>
          </table:table-cell>
          <table:table-cell table:style-name="Tableau1.A2" office:value-type="string">
            <text:p text:style-name="P2"><text:span text:style-name="T9">Neptune (Tom Farge, Islem, Manon, Seife)</text:span></text:p>
          </table:table-cell>
        </table:table-row>
        <table:table-row table:style-name="Tableau1.1">
          <table:table-cell table:style-name="Tableau1.A3" office:value-type="string">
            <text:p text:style-name="P2"><text:span text:style-name="T9">Statut</text:span></text:p>
          </table:table-cell>
          <table:table-cell table:style-name="Tableau1.A3" office:value-type="string">
            <text:p text:style-name="P2"><text:span text:style-name="T9">En cours de rédaction</text:span></text:p>
          </table:table-cell>
        </table:table-row>
        <table:table-row table:style-name="Tableau1.1">
          <table:table-cell table:style-name="Tableau1.A2" office:value-type="string">
            <text:p text:style-name="P2"><text:span text:style-name="T9">Confidentialité</text:span></text:p>
          </table:table-cell>
          <table:table-cell table:style-name="Tableau1.A2" office:value-type="string">
            <text:p text:style-name="P2"><text:span text:style-name="T9">Document interne <text:s text:c="2"/>Diffusion restreinte</text:span></text:p>
          </table:table-cell>
        </table:table-row>
      </table:table>
      <text:p text:style-name="P4"/>
      <text:h text:style-name="Heading_20_2" text:outline-level="2"><text:bookmark-start text:name="__RefHeading__2000_1459372959"/><text:bookmark-end text:name="__RefHeading__2000_1459372959"/></text:h>
      <text:p text:style-name="P11"/>
      <text:h text:style-name="P19" text:outline-level="1"><text:bookmark-start text:name="__RefHeading__2002_1459372959"/>Table des matières<text:bookmark-end text:name="__RefHeading__2002_1459372959"/></text:h>
      <text:p text:style-name="P11"/>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998_1459372959">Fiche documentaire<text:tab/>2</text:a></text:p>
          <text:p text:style-name="P23"><text:a xlink:type="simple" xlink:href="#__RefHeading__2000_1459372959">Historique des versions<text:tab/>2</text:a></text:p>
          <text:p text:style-name="P24"><text:a xlink:type="simple" xlink:href="#__RefHeading__2002_1459372959">Table des matières<text:tab/>3</text:a></text:p>
          <text:p text:style-name="P24"><text:a xlink:type="simple" xlink:href="#__RefHeading__2004_1459372959">Introduction générale<text:tab/>5</text:a></text:p>
          <text:p text:style-name="P23"><text:a xlink:type="simple" xlink:href="#__RefHeading__2006_1459372959">Contexte du projet<text:tab/>5</text:a></text:p>
          <text:p text:style-name="P23"><text:a xlink:type="simple" xlink:href="#__RefHeading__2008_1459372959">Objectifs du projet<text:tab/>5</text:a></text:p>
          <text:p text:style-name="P23"><text:a xlink:type="simple" xlink:href="#__RefHeading__2010_1459372959">Périmètre<text:tab/>5</text:a></text:p>
          <text:p text:style-name="P23"><text:a xlink:type="simple" xlink:href="#__RefHeading__2012_1459372959">Glossaire<text:tab/>6</text:a></text:p>
          <text:p text:style-name="P24"><text:a xlink:type="simple" xlink:href="#__RefHeading__2014_1459372959">Présentation des acteurs<text:tab/>7</text:a></text:p>
          <text:p text:style-name="P23"><text:a xlink:type="simple" xlink:href="#__RefHeading__2016_1459372959">Matrice des droits<text:tab/>7</text:a></text:p>
          <text:p text:style-name="P24"><text:a xlink:type="simple" xlink:href="#__RefHeading__2018_1459372959">Spécifications fonctionnelles<text:tab/>8</text:a></text:p>
          <text:p text:style-name="P23"><text:a xlink:type="simple" xlink:href="#__RefHeading__2020_1459372959">Billetterie intégrée<text:tab/>8</text:a></text:p>
          <text:p text:style-name="P25"><text:a xlink:type="simple" xlink:href="#__RefHeading__2022_1459372959">Achat de billets<text:tab/>8</text:a></text:p>
          <text:p text:style-name="P25"><text:a xlink:type="simple" xlink:href="#__RefHeading__2024_1459372959">Billet dématérialisé (QR Code)<text:tab/>9</text:a></text:p>
          <text:p text:style-name="P25"><text:a xlink:type="simple" xlink:href="#__RefHeading__2026_1459372959">Notifications liées à l’événement<text:tab/>9</text:a></text:p>
          <text:p text:style-name="P23"><text:a xlink:type="simple" xlink:href="#__RefHeading__2028_1459372959">Organisation du trajet<text:tab/>9</text:a></text:p>
          <text:p text:style-name="P25"><text:a xlink:type="simple" xlink:href="#__RefHeading__2030_1459372959">Proposition de trajets bas carbone<text:tab/>10</text:a></text:p>
          <text:p text:style-name="P25"><text:a xlink:type="simple" xlink:href="#__RefHeading__2032_1459372959">Planificateur multimodal<text:tab/>10</text:a></text:p>
          <text:p text:style-name="P25"><text:a xlink:type="simple" xlink:href="#__RefHeading__2034_1459372959">Covoiturage entre participants<text:tab/>10</text:a></text:p>
          <text:p text:style-name="P25"><text:a xlink:type="simple" xlink:href="#__RefHeading__2036_1459372959">Achat intégré des titres de transport<text:tab/>11</text:a></text:p>
          <text:p text:style-name="P23"><text:a xlink:type="simple" xlink:href="#__RefHeading__2038_1459372959">Réservation de logement<text:tab/>11</text:a></text:p>
          <text:p text:style-name="P25"><text:a xlink:type="simple" xlink:href="#__RefHeading__2040_1459372959">Recherche et réservation d’hébergement<text:tab/>11</text:a></text:p>
          <text:p text:style-name="P25"><text:a xlink:type="simple" xlink:href="#__RefHeading__2042_1459372959">Hébergement collaboratif<text:tab/>11</text:a></text:p>
          <text:p text:style-name="P23"><text:a xlink:type="simple" xlink:href="#__RefHeading__2044_1459372959">Calcul et sensibilisation écologique<text:tab/>13</text:a></text:p>
          <text:p text:style-name="P25"><text:a xlink:type="simple" xlink:href="#__RefHeading__2046_1459372959">Estimation de l’empreinte carbone<text:tab/>13</text:a></text:p>
          <text:p text:style-name="P25"><text:a xlink:type="simple" xlink:href="#__RefHeading__2048_1459372959">Recommandations et badges<text:tab/>13</text:a></text:p>
          <text:p text:style-name="P23"><text:a xlink:type="simple" xlink:href="#__RefHeading__2050_1459372959">Fonctionnalités sociales et communautaires<text:tab/>13</text:a></text:p>
          <text:p text:style-name="P25"><text:a xlink:type="simple" xlink:href="#__RefHeading__2052_1459372959">Profils utilisateurs<text:tab/>13</text:a></text:p>
          <text:p text:style-name="P25"><text:a xlink:type="simple" xlink:href="#__RefHeading__2054_1459372959">Liens sociaux et groupes<text:tab/>14</text:a></text:p>
          <text:p text:style-name="P25"><text:a xlink:type="simple" xlink:href="#__RefHeading__2056_1459372959">Fil d’actualité et événements locaux<text:tab/>14</text:a></text:p>
          <text:p text:style-name="P23"><text:a xlink:type="simple" xlink:href="#__RefHeading__2058_1459372959">Expérience sur place<text:tab/>14</text:a></text:p>
          <text:p text:style-name="P25"><text:a xlink:type="simple" xlink:href="#__RefHeading__2060_1459372959">Informations pratiques et programme<text:tab/>14</text:a></text:p>
          <text:p text:style-name="P25"><text:a xlink:type="simple" xlink:href="#__RefHeading__2062_1459372959">Slow tourisme<text:tab/>14</text:a></text:p>
          <text:p text:style-name="P25"><text:a xlink:type="simple" xlink:href="#__RefHeading__2064_1459372959">Accessibilité<text:tab/>15</text:a></text:p>
          <text:p text:style-name="P23"><text:a xlink:type="simple" xlink:href="#__RefHeading__2066_1459372959">Espace organisateur (B2B)<text:tab/>15</text:a></text:p>
          <text:p text:style-name="P25"><text:a xlink:type="simple" xlink:href="#__RefHeading__2068_1459372959">Création et gestion d’événements<text:tab/>15</text:a></text:p>
          <text:p text:style-name="P25"><text:a xlink:type="simple" xlink:href="#__RefHeading__2070_1459372959">Suivi des ventes et participants<text:tab/>15</text:a></text:p>
          <text:p text:style-name="P25"><text:a xlink:type="simple" xlink:href="#__RefHeading__2072_1459372959">Statistiques d’impact écologique<text:tab/>15</text:a></text:p>
          <text:p text:style-name="P23"><text:a xlink:type="simple" xlink:href="#__RefHeading__2074_1459372959">Paiement et gestion financière<text:tab/>16</text:a></text:p>
          <text:p text:style-name="P23"><text:a xlink:type="simple" xlink:href="#__RefHeading__2076_1459372959">Recommandations et assistant de planification<text:tab/>16</text:a></text:p>
          <text:p text:style-name="P25"><text:a xlink:type="simple" xlink:href="#__RefHeading__2078_1459372959">Suggestions d’événements<text:tab/>16</text:a></text:p>
          <text:p text:style-name="P25"><text:a xlink:type="simple" xlink:href="#__RefHeading__2080_1459372959">Assistant de planification intelligent<text:tab/>16</text:a></text:p>
          <text:p text:style-name="P24"><text:a xlink:type="simple" xlink:href="#__RefHeading__2082_1459372959">Spécifications techniques<text:tab/>18</text:a></text:p>
          <text:p text:style-name="P23"><text:a xlink:type="simple" xlink:href="#__RefHeading__2084_1459372959">Architecture générale<text:tab/>18</text:a></text:p>
          <text:p text:style-name="P23"><text:a xlink:type="simple" xlink:href="#__RefHeading__2086_1459372959">Stack technique<text:tab/>18</text:a></text:p>
          <text:p text:style-name="P23"><text:a xlink:type="simple" xlink:href="#__RefHeading__2088_1459372959">Arborescence du projet<text:tab/>19</text:a></text:p>
          <text:p text:style-name="P23"><text:a xlink:type="simple" xlink:href="#__RefHeading__2090_1459372959">Schéma de base de données (Isar)<text:tab/>19</text:a></text:p>
          <text:p text:style-name="P23"><text:a xlink:type="simple" xlink:href="#__RefHeading__2092_1459372959">Sécurité<text:tab/>21</text:a></text:p>
          <text:p text:style-name="P23"><text:a xlink:type="simple" xlink:href="#__RefHeading__2094_1459372959">Performances<text:tab/>21</text:a></text:p>
          <text:p text:style-name="P23"><text:soft-page-break/><text:a xlink:type="simple" xlink:href="#__RefHeading__2096_1459372959">Accessibilité technique<text:tab/>21</text:a></text:p>
          <text:p text:style-name="P23"><text:a xlink:type="simple" xlink:href="#__RefHeading__2098_1459372959">Stratégie de tests<text:tab/>22</text:a></text:p>
          <text:p text:style-name="P24"><text:a xlink:type="simple" xlink:href="#__RefHeading__2100_1459372959">Planning prévisionnel et livrables<text:tab/>23</text:a></text:p>
          <text:p text:style-name="P23"><text:a xlink:type="simple" xlink:href="#__RefHeading__2102_1459372959">Phases du projet<text:tab/>23</text:a></text:p>
          <text:p text:style-name="P23"><text:a xlink:type="simple" xlink:href="#__RefHeading__2104_1459372959">Répartition des rôles<text:tab/>23</text:a></text:p>
          <text:p text:style-name="P23"><text:a xlink:type="simple" xlink:href="#__RefHeading__2106_1459372959">Risques identifiés<text:tab/>23</text:a></text:p>
          <text:p text:style-name="P24"><text:a xlink:type="simple" xlink:href="#__RefHeading__2108_1459372959">Annexes<text:tab/>25</text:a></text:p>
          <text:p text:style-name="P23"><text:a xlink:type="simple" xlink:href="#__RefHeading__2110_1459372959">Références techniques<text:tab/>25</text:a></text:p>
          <text:p text:style-name="P23"><text:a xlink:type="simple" xlink:href="#__RefHeading__2112_1459372959">Récapitulatif des fonctionnalités (MoSCoW)<text:tab/>25</text:a></text:p>
          <text:p text:style-name="P23"><text:a xlink:type="simple" xlink:href="#__RefHeading__2114_1459372959">Contacts équipe Neptune<text:tab/>25</text:a></text:p>
        </text:index-body>
      </text:table-of-content>
      <text:p text:style-name="Standard"/>
      <text:p text:style-name="Standard"/>
      <text:h text:style-name="P19" text:outline-level="1"><text:bookmark-start text:name="__RefHeading__2004_1459372959"/>Introduction générale<text:bookmark-end text:name="__RefHeading__2004_1459372959"/></text:h>
      <text:p text:style-name="P11"/>
      <text:h text:style-name="Heading_20_2" text:outline-level="2"><text:bookmark-start text:name="__RefHeading__2006_1459372959"/>Contexte du projet<text:bookmark-end text:name="__RefHeading__2006_1459372959"/></text:h>
      <text:p text:style-name="P13"><text:span text:style-name="T11">Le secteur de l’événementiel culturel et musical connaît une transformation profonde, accélérée par la numérisation des usages et la prise de conscience environnementale croissante du public. Les festivals, concerts et événements culturels attirent chaque année des millions de spectateurs en France, générant des flux de transport massifs dont l’empreinte carbone est considérable.</text:span></text:p>
      <text:p text:style-name="P13"><text:span text:style-name="T11">Aujourd’hui, l’organisation d’une sortie événementielle implique de jongler entre de multiples plateformes : billetteries en ligne, comparateurs de transport, sites d’hébergement, applications de covoiturage. Cette fragmentation nuit à l’expérience utilisateur, entraîne des surcoûts, et ne propose aucune vision intégrée de l’impact environnemental des déplacements.</text:span></text:p>
      <text:p text:style-name="P13"><text:span text:style-name="T11">C’est dans ce contexte que l’équipe Neptune a imaginé Pulsar : une application mobile cross-platform qui centralise l’intégralité du parcours événementiel <text:s text:c="2"/>de la découverte d’un événement à l’expérience sur place <text:s text:c="2"/>tout en plaçant la mobilité durable au cœur de sa proposition de valeur.</text:span></text:p>
      <text:p text:style-name="P11"/>
      <text:h text:style-name="Heading_20_2" text:outline-level="2"><text:bookmark-start text:name="__RefHeading__2008_1459372959"/>Objectifs du projet<text:bookmark-end text:name="__RefHeading__2008_1459372959"/></text:h>
      <text:p text:style-name="P13"><text:span text:style-name="T7">Objectifs stratégiques :</text:span></text:p>
      <text:list xml:id="list45515998741335397" text:style-name="WWNum2">
        <text:list-item>
          <text:p text:style-name="P22"><text:span text:style-name="T11">Centraliser l’intégralité du parcours événementiel (billetterie, transport, hébergement) dans une seule application fluide et intuitive.</text:span></text:p>
        </text:list-item>
        <text:list-item>
          <text:p text:style-name="P22"><text:span text:style-name="T11">Promouvoir systématiquement les alternatives de transport bas carbone (train, bus, covoiturage) en rendant visible l’impact environnemental de chaque option.</text:span></text:p>
        </text:list-item>
        <text:list-item>
          <text:p text:style-name="P22"><text:span text:style-name="T11">Créer une communauté engagée autour de la mobilité événementielle responsable.</text:span></text:p>
        </text:list-item>
        <text:list-item>
          <text:p text:style-name="P22"><text:span text:style-name="T11">Offrir aux organisateurs un espace B2B complet pour la gestion et le suivi de leurs événements.</text:span></text:p>
        </text:list-item>
      </text:list>
      <text:p text:style-name="P14"/>
      <text:p text:style-name="P13"><text:span text:style-name="T7">Objectifs opérationnels :</text:span></text:p>
      <text:list xml:id="list28592358" text:continue-numbering="true" text:style-name="WWNum2">
        <text:list-item>
          <text:p text:style-name="P22"><text:span text:style-name="T11">Développer une application mobile cross-platform (Android, iOS, Web) avec Flutter.</text:span></text:p>
        </text:list-item>
        <text:list-item>
          <text:p text:style-name="P22"><text:span text:style-name="T11">Implémenter un fonctionnement offline-first grâce à la base de données locale Isar.</text:span></text:p>
        </text:list-item>
        <text:list-item>
          <text:p text:style-name="P22"><text:span text:style-name="T11">Atteindre un temps de réservation complète (billet + transport + hébergement) inférieur à 90 secondes.</text:span></text:p>
        </text:list-item>
        <text:list-item>
          <text:p text:style-name="P22"><text:span text:style-name="T11">Réduire en moyenne de 42% le coût global par rapport aux plateformes séparées.</text:span></text:p>
        </text:list-item>
        <text:list-item>
          <text:p text:style-name="P22"><text:span text:style-name="T11">Réduire de 73% l’empreinte carbone moyenne des déplacements événementiels des utilisateurs.</text:span></text:p>
        </text:list-item>
      </text:list>
      <text:p text:style-name="P21"><text:span text:style-name="T11"/></text:p>
      <text:p text:style-name="P21"><text:span text:style-name="T11"/></text:p>
      <text:p text:style-name="P11"/>
      <text:h text:style-name="Heading_20_2" text:outline-level="2"><text:bookmark-start text:name="__RefHeading__2010_1459372959"/><text:soft-page-break/>Périmètre<text:bookmark-end text:name="__RefHeading__2010_1459372959"/></text:h>
      <text:p text:style-name="P13"><text:span text:style-name="T7">Inclus dans le périmètre :</text:span></text:p>
      <text:list xml:id="list28583059" text:continue-numbering="true" text:style-name="WWNum2">
        <text:list-item>
          <text:p text:style-name="P22"><text:span text:style-name="T11">Application mobile Android et iOS (Flutter).</text:span></text:p>
        </text:list-item>
        <text:list-item>
          <text:p text:style-name="P22"><text:span text:style-name="T11">Application web responsive (Flutter Web).</text:span></text:p>
        </text:list-item>
        <text:list-item>
          <text:p text:style-name="P22"><text:span text:style-name="T11">Billetterie intégrée avec billets dématérialisés (QR codes).</text:span></text:p>
        </text:list-item>
        <text:list-item>
          <text:p text:style-name="P22"><text:span text:style-name="T11">Planification de trajets multimodaux et bas carbone.</text:span></text:p>
        </text:list-item>
        <text:list-item>
          <text:p text:style-name="P22"><text:span text:style-name="T11">Réservation d’hébergement (classique et collaboratif).</text:span></text:p>
        </text:list-item>
        <text:list-item>
          <text:p text:style-name="P22"><text:span text:style-name="T11">Calcul et affichage de l’empreinte carbone.</text:span></text:p>
        </text:list-item>
        <text:list-item>
          <text:p text:style-name="P22"><text:span text:style-name="T11">Fonctionnalités sociales et communautaires.</text:span></text:p>
        </text:list-item>
        <text:list-item>
          <text:p text:style-name="P22"><text:span text:style-name="T11">Espace organisateur (B2B) avec tableau de bord.</text:span></text:p>
        </text:list-item>
        <text:list-item>
          <text:p text:style-name="P22"><text:span text:style-name="T11">Système de notifications intelligentes.</text:span></text:p>
        </text:list-item>
        <text:list-item>
          <text:p text:style-name="P22"><text:span text:style-name="T11">Moteur de recommandations personnalisées.</text:span></text:p>
        </text:list-item>
        <text:list-item>
          <text:p text:style-name="P22"><text:span text:style-name="T11">Assistant de planification automatique.</text:span></text:p>
        </text:list-item>
      </text:list>
      <text:p text:style-name="P14"/>
      <text:p text:style-name="P13"><text:span text:style-name="T7">Hors périmètre (V1) :</text:span></text:p>
      <text:list xml:id="list28568608" text:continue-numbering="true" text:style-name="WWNum2">
        <text:list-item>
          <text:p text:style-name="P22"><text:span text:style-name="T11">Marketplace de produits dérivés.</text:span></text:p>
        </text:list-item>
        <text:list-item>
          <text:p text:style-name="P22"><text:span text:style-name="T11">Streaming de contenu audio/vidéo en direct.</text:span></text:p>
        </text:list-item>
        <text:list-item>
          <text:p text:style-name="P22"><text:span text:style-name="T11">Gestion comptable ou facturation avancée pour les organisateurs.</text:span></text:p>
        </text:list-item>
        <text:list-item>
          <text:p text:style-name="P22"><text:span text:style-name="T11">Intégration avec les systèmes de contrôle d’accès physiques tiers.</text:span></text:p>
        </text:list-item>
      </text:list>
      <text:p text:style-name="P11"/>
      <text:h text:style-name="Heading_20_2" text:outline-level="2"><text:bookmark-start text:name="__RefHeading__2012_1459372959"/>Glossaire<text:bookmark-end text:name="__RefHeading__2012_1459372959"/></text:h>
      <table:table table:name="Tableau3" table:style-name="Tableau3">
        <table:table-column table:style-name="Tableau3.A"/>
        <table:table-column table:style-name="Tableau3.B"/>
        <table:table-row table:style-name="Tableau3.1">
          <table:table-cell table:style-name="Tableau3.A1" office:value-type="string">
            <text:p text:style-name="P2"><text:span text:style-name="T16">Terme</text:span></text:p>
          </table:table-cell>
          <table:table-cell table:style-name="Tableau3.A1" office:value-type="string">
            <text:p text:style-name="P2"><text:span text:style-name="T16">Définition</text:span></text:p>
          </table:table-cell>
        </table:table-row>
        <table:table-row table:style-name="Tableau3.2">
          <table:table-cell table:style-name="Tableau3.A2" office:value-type="string">
            <text:p text:style-name="P2"><text:span text:style-name="T9">Offline-first</text:span></text:p>
          </table:table-cell>
          <table:table-cell table:style-name="Tableau3.A2" office:value-type="string">
            <text:p text:style-name="P2"><text:span text:style-name="T9">Architecture où les données sont d’abord stockées localement, puis synchronisées quand le réseau est disponible</text:span></text:p>
          </table:table-cell>
        </table:table-row>
        <table:table-row table:style-name="Tableau3.2">
          <table:table-cell table:style-name="Tableau3.A3" office:value-type="string">
            <text:p text:style-name="P2"><text:span text:style-name="T9">Éco-score</text:span></text:p>
          </table:table-cell>
          <table:table-cell table:style-name="Tableau3.A3" office:value-type="string">
            <text:p text:style-name="P2"><text:span text:style-name="T9">Score calculé sur 100, reflétant les choix de mobilité durable d’un utilisateur</text:span></text:p>
          </table:table-cell>
        </table:table-row>
        <table:table-row table:style-name="Tableau3.2">
          <table:table-cell table:style-name="Tableau3.A2" office:value-type="string">
            <text:p text:style-name="P2"><text:span text:style-name="T9">Multimodal</text:span></text:p>
          </table:table-cell>
          <table:table-cell table:style-name="Tableau3.A2" office:value-type="string">
            <text:p text:style-name="P2"><text:span text:style-name="T9">Trajet combinant plusieurs modes de transport (train + métro + vélo, etc.)</text:span></text:p>
          </table:table-cell>
        </table:table-row>
        <table:table-row table:style-name="Tableau3.2">
          <table:table-cell table:style-name="Tableau3.A3" office:value-type="string">
            <text:p text:style-name="P2"><text:span text:style-name="T9">B2B</text:span></text:p>
          </table:table-cell>
          <table:table-cell table:style-name="Tableau3.A3" office:value-type="string">
            <text:p text:style-name="P2"><text:span text:style-name="T9">Business-to-Business, désignant l’espace dédié aux organisateurs d’événements</text:span></text:p>
          </table:table-cell>
        </table:table-row>
        <table:table-row table:style-name="Tableau3.2">
          <table:table-cell table:style-name="Tableau3.A2" office:value-type="string">
            <text:p text:style-name="P2"><text:span text:style-name="T9">MVP</text:span></text:p>
          </table:table-cell>
          <table:table-cell table:style-name="Tableau3.A2" office:value-type="string">
            <text:p text:style-name="P2"><text:span text:style-name="T9">Minimum Viable Product, <text:s/>version minimale fonctionnelle de l’application</text:span></text:p>
          </table:table-cell>
        </table:table-row>
        <table:table-row table:style-name="Tableau3.2">
          <table:table-cell table:style-name="Tableau3.A3" office:value-type="string">
            <text:p text:style-name="P2"><text:span text:style-name="T9">QR Code</text:span></text:p>
          </table:table-cell>
          <table:table-cell table:style-name="Tableau3.A3" office:value-type="string">
            <text:p text:style-name="P2"><text:span text:style-name="T9">Code-barres 2D utilisé pour les billets dématérialisés</text:span></text:p>
          </table:table-cell>
        </table:table-row>
        <table:table-row table:style-name="Tableau3.2">
          <table:table-cell table:style-name="Tableau3.A2" office:value-type="string">
            <text:p text:style-name="P2"><text:span text:style-name="T9">ADEME</text:span></text:p>
          </table:table-cell>
          <table:table-cell table:style-name="Tableau3.A2" office:value-type="string">
            <text:p text:style-name="P2"><text:span text:style-name="T9">Agence de la transition écologique, fournissant les référentiels d’émissions CO₂</text:span></text:p>
          </table:table-cell>
        </table:table-row>
        <table:table-row table:style-name="Tableau3.2">
          <table:table-cell table:style-name="Tableau3.A3" office:value-type="string">
            <text:p text:style-name="P2"><text:span text:style-name="T9">Clean Architecture</text:span></text:p>
          </table:table-cell>
          <table:table-cell table:style-name="Tableau3.A3" office:value-type="string">
            <text:p text:style-name="P2"><text:span text:style-name="T9">Patron d’architecture logicielle séparant les couches métier, données et présentation</text:span></text:p>
          </table:table-cell>
        </table:table-row>
        <table:table-row table:style-name="Tableau3.2">
          <table:table-cell table:style-name="Tableau3.A2" office:value-type="string">
            <text:p text:style-name="P2"><text:span text:style-name="T9">Riverpod</text:span></text:p>
          </table:table-cell>
          <table:table-cell table:style-name="Tableau3.A2" office:value-type="string">
            <text:p text:style-name="P2"><text:span text:style-name="T9">Bibliothèque de gestion d’état pour Flutter</text:span></text:p>
          </table:table-cell>
        </table:table-row>
        <table:table-row table:style-name="Tableau3.2">
          <table:table-cell table:style-name="Tableau3.A3" office:value-type="string">
            <text:p text:style-name="P2"><text:span text:style-name="T9">Isar</text:span></text:p>
          </table:table-cell>
          <table:table-cell table:style-name="Tableau3.A3" office:value-type="string">
            <text:p text:style-name="P2"><text:span text:style-name="T9">Base de données NoSQL locale hautes performances pour Flutter</text:span></text:p>
          </table:table-cell>
        </table:table-row>
      </table:table>
      <text:p text:style-name="Standard"/>
      <text:h text:style-name="P19" text:outline-level="1"><text:bookmark-start text:name="__RefHeading__2014_1459372959"/>Présentation des acteurs<text:bookmark-end text:name="__RefHeading__2014_1459372959"/></text:h>
      <text:p text:style-name="P11"/>
      <text:p text:style-name="P13"><text:span text:style-name="T11">Quatre acteurs principaux interagissent avec la plateforme Pulsar. Chacun dispose de droits, de fonctionnalités et d’interfaces spécifiques.</text:span></text:p>
      <text:p text:style-name="P11"/>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text:span text:style-name="T16">Acteur</text:span></text:p>
          </table:table-cell>
          <table:table-cell table:style-name="Tableau4.A1" office:value-type="string">
            <text:p text:style-name="P2"><text:span text:style-name="T16">Rôle</text:span></text:p>
          </table:table-cell>
          <table:table-cell table:style-name="Tableau4.A1" office:value-type="string">
            <text:p text:style-name="P2"><text:span text:style-name="T16">Interface</text:span></text:p>
          </table:table-cell>
          <table:table-cell table:style-name="Tableau4.A1" office:value-type="string">
            <text:p text:style-name="P2"><text:span text:style-name="T16">Exemples d’actions</text:span></text:p>
          </table:table-cell>
        </table:table-row>
        <table:table-row table:style-name="Tableau4.1">
          <table:table-cell table:style-name="Tableau4.A2" office:value-type="string">
            <text:p text:style-name="P2"><text:span text:style-name="T9">Utilisateur</text:span></text:p>
          </table:table-cell>
          <table:table-cell table:style-name="Tableau4.A2" office:value-type="string">
            <text:p text:style-name="P2"><text:span text:style-name="T9">Spectateur / festivalier qui utilise l’application pour acheter, organiser et vivre son événement</text:span></text:p>
          </table:table-cell>
          <table:table-cell table:style-name="Tableau4.A2" office:value-type="string">
            <text:p text:style-name="P2"><text:span text:style-name="T9">Application mobile + web (B2C)</text:span></text:p>
          </table:table-cell>
          <table:table-cell table:style-name="Tableau4.A2" office:value-type="string">
            <text:p text:style-name="P2"><text:span text:style-name="T9">Acheter un billet, planifier un trajet, réserver un hébergement, consulter son éco-score</text:span></text:p>
          </table:table-cell>
        </table:table-row>
        <table:table-row table:style-name="Tableau4.1">
          <table:table-cell table:style-name="Tableau4.A3" office:value-type="string">
            <text:p text:style-name="P2"><text:span text:style-name="T9">Organisateur</text:span></text:p>
          </table:table-cell>
          <table:table-cell table:style-name="Tableau4.A3" office:value-type="string">
            <text:p text:style-name="P2"><text:span text:style-name="T9">Festival, salle, promoteur qui publie et gère ses événements</text:span></text:p>
          </table:table-cell>
          <table:table-cell table:style-name="Tableau4.A3" office:value-type="string">
            <text:p text:style-name="P2"><text:span text:style-name="T9">Back-office B2B (web)</text:span></text:p>
          </table:table-cell>
          <table:table-cell table:style-name="Tableau4.A3" office:value-type="string">
            <text:p text:style-name="P2"><text:span text:style-name="T9">Créer un événement, configurer la billetterie, suivre les ventes, envoyer des notifications</text:span></text:p>
          </table:table-cell>
        </table:table-row>
        <table:table-row table:style-name="Tableau4.1">
          <table:table-cell table:style-name="Tableau4.A2" office:value-type="string">
            <text:p text:style-name="P2"><text:span text:style-name="T9">Hôte</text:span></text:p>
          </table:table-cell>
          <table:table-cell table:style-name="Tableau4.A2" office:value-type="string">
            <text:p text:style-name="P2"><text:span text:style-name="T9">Particulier ou professionnel proposant un hébergement collaboratif</text:span></text:p>
          </table:table-cell>
          <table:table-cell table:style-name="Tableau4.A2" office:value-type="string">
            <text:p text:style-name="P2"><text:span text:style-name="T9">Application mobile + web</text:span></text:p>
          </table:table-cell>
          <table:table-cell table:style-name="Tableau4.A2" office:value-type="string">
            <text:p text:style-name="P2"><text:span text:style-name="T9">Publier une annonce, gérer les réservations, communiquer avec les voyageurs</text:span></text:p>
          </table:table-cell>
        </table:table-row>
        <table:table-row table:style-name="Tableau4.1">
          <table:table-cell table:style-name="Tableau4.A3" office:value-type="string">
            <text:p text:style-name="P2"><text:span text:style-name="T9">Système</text:span></text:p>
          </table:table-cell>
          <table:table-cell table:style-name="Tableau4.A3" office:value-type="string">
            <text:p text:style-name="P2"><text:span text:style-name="T9">Comportements automatisés de la plateforme</text:span></text:p>
          </table:table-cell>
          <table:table-cell table:style-name="Tableau4.A3" office:value-type="string">
            <text:p text:style-name="P2"><text:span text:style-name="T9">Moteur back-end</text:span></text:p>
          </table:table-cell>
          <table:table-cell table:style-name="Tableau4.A3" office:value-type="string">
            <text:p text:style-name="P2"><text:span text:style-name="T9">Calcul de l’empreinte carbone, envoi de notifications, génération de recommandations, mise à jour des parcours</text:span></text:p>
          </table:table-cell>
        </table:table-row>
      </table:table>
      <text:p text:style-name="P4"/>
      <text:h text:style-name="Heading_20_2" text:outline-level="2"><text:bookmark-start text:name="__RefHeading__2016_1459372959"/>Matrice des droits<text:bookmark-end text:name="__RefHeading__2016_1459372959"/></text:h>
      <text:p text:style-name="P11"/>
      <table:table table:name="Tableau5" table:style-name="Tableau5">
        <table:table-column table:style-name="Tableau5.A"/>
        <table:table-column table:style-name="Tableau5.B"/>
        <table:table-column table:style-name="Tableau5.C"/>
        <table:table-column table:style-name="Tableau5.B"/>
        <table:table-column table:style-name="Tableau5.E"/>
        <table:table-row table:style-name="Tableau5.1">
          <table:table-cell table:style-name="Tableau5.A1" office:value-type="string">
            <text:p text:style-name="P2"><text:span text:style-name="T16">Fonctionnalité</text:span></text:p>
          </table:table-cell>
          <table:table-cell table:style-name="Tableau5.A1" office:value-type="string">
            <text:p text:style-name="P2"><text:span text:style-name="T16">Utilisateur</text:span></text:p>
          </table:table-cell>
          <table:table-cell table:style-name="Tableau5.A1" office:value-type="string">
            <text:p text:style-name="P2"><text:span text:style-name="T16">Organisateur</text:span></text:p>
          </table:table-cell>
          <table:table-cell table:style-name="Tableau5.A1" office:value-type="string">
            <text:p text:style-name="P2"><text:span text:style-name="T16">Hôte</text:span></text:p>
          </table:table-cell>
          <table:table-cell table:style-name="Tableau5.A1" office:value-type="string">
            <text:p text:style-name="P2"><text:span text:style-name="T16">Système</text:span></text:p>
          </table:table-cell>
        </table:table-row>
        <table:table-row table:style-name="Tableau5.1">
          <table:table-cell table:style-name="Tableau5.A2" office:value-type="string">
            <text:p text:style-name="P2"><text:span text:style-name="T9">Parcourir le catalogue</text:span></text:p>
          </table:table-cell>
          <table:table-cell table:style-name="Tableau5.A2" office:value-type="string">
            <text:p text:style-name="P2"><text:span text:style-name="T9">✓</text:span></text:p>
          </table:table-cell>
          <table:table-cell table:style-name="Tableau5.A2" office:value-type="string">
            <text:p text:style-name="P2"><text:span text:style-name="T9">✓</text:span></text:p>
          </table:table-cell>
          <table:table-cell table:style-name="Tableau5.A2" office:value-type="string">
            <text:p text:style-name="P2"><text:span text:style-name="T9">✓</text:span></text:p>
          </table:table-cell>
          <table:table-cell table:style-name="Tableau5.A2" office:value-type="string">
            <text:p text:style-name="P2"><text:span text:style-name="T9"><text:s/></text:span></text:p>
          </table:table-cell>
        </table:table-row>
        <table:table-row table:style-name="Tableau5.1">
          <table:table-cell table:style-name="Tableau5.A3" office:value-type="string">
            <text:p text:style-name="P2"><text:span text:style-name="T9">Acheter un billet</text:span></text:p>
          </table:table-cell>
          <table:table-cell table:style-name="Tableau5.A3" office:value-type="string">
            <text:p text:style-name="P2"><text:span text:style-name="T9">✓</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text:span></text:p>
          </table:table-cell>
        </table:table-row>
        <table:table-row table:style-name="Tableau5.1">
          <table:table-cell table:style-name="Tableau5.A2" office:value-type="string">
            <text:p text:style-name="P2"><text:span text:style-name="T9">Accéder au QR code</text:span></text:p>
          </table:table-cell>
          <table:table-cell table:style-name="Tableau5.A2" office:value-type="string">
            <text:p text:style-name="P2"><text:span text:style-name="T9">✓</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text:span></text:p>
          </table:table-cell>
        </table:table-row>
        <table:table-row table:style-name="Tableau5.1">
          <table:table-cell table:style-name="Tableau5.A3" office:value-type="string">
            <text:p text:style-name="P2"><text:span text:style-name="T9">Scanner les billets</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text:span></text:p>
          </table:table-cell>
        </table:table-row>
        <table:table-row table:style-name="Tableau5.1">
          <table:table-cell table:style-name="Tableau5.A2" office:value-type="string">
            <text:p text:style-name="P2"><text:span text:style-name="T9">Créer un événement</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text:span></text:p>
          </table:table-cell>
        </table:table-row>
        <table:table-row table:style-name="Tableau5.1">
          <table:table-cell table:style-name="Tableau5.A3" office:value-type="string">
            <text:p text:style-name="P2"><text:span text:style-name="T9">Proposer un hébergement</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pan></text:p>
          </table:table-cell>
          <table:table-cell table:style-name="Tableau5.A3" office:value-type="string">
            <text:p text:style-name="P2"><text:span text:style-name="T9"><text:s/></text:span></text:p>
          </table:table-cell>
        </table:table-row>
        <table:table-row table:style-name="Tableau5.1">
          <table:table-cell table:style-name="Tableau5.A2" office:value-type="string">
            <text:p text:style-name="P2"><text:span text:style-name="T9">Planifier un trajet</text:span></text:p>
          </table:table-cell>
          <table:table-cell table:style-name="Tableau5.A2" office:value-type="string">
            <text:p text:style-name="P2"><text:span text:style-name="T9">✓</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pan></text:p>
          </table:table-cell>
        </table:table-row>
        <table:table-row table:style-name="Tableau5.1">
          <table:table-cell table:style-name="Tableau5.A3" office:value-type="string">
            <text:p text:style-name="P2"><text:span text:style-name="T9">Proposer un covoiturage</text:span></text:p>
          </table:table-cell>
          <table:table-cell table:style-name="Tableau5.A3" office:value-type="string">
            <text:p text:style-name="P2"><text:span text:style-name="T9">✓</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text:span></text:p>
          </table:table-cell>
        </table:table-row>
        <table:table-row table:style-name="Tableau5.1">
          <table:table-cell table:style-name="Tableau5.A2" office:value-type="string">
            <text:p text:style-name="P2"><text:span text:style-name="T9">Calculer l’empreinte carbone</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pan></text:p>
          </table:table-cell>
        </table:table-row>
        <table:table-row table:style-name="Tableau5.1">
          <table:table-cell table:style-name="Tableau5.A3" office:value-type="string">
            <text:p text:style-name="P2"><text:span text:style-name="T9">Envoyer des notifications</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pan></text:p>
          </table:table-cell>
        </table:table-row>
        <table:table-row table:style-name="Tableau5.1">
          <table:table-cell table:style-name="Tableau5.A2" office:value-type="string">
            <text:p text:style-name="P2"><text:span text:style-name="T9">Générer des recommandations</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pan></text:p>
          </table:table-cell>
        </table:table-row>
        <table:table-row table:style-name="Tableau5.1">
          <table:table-cell table:style-name="Tableau5.A3" office:value-type="string">
            <text:p text:style-name="P2"><text:span text:style-name="T9">Accéder au tableau de bord</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pan></text:p>
          </table:table-cell>
          <table:table-cell table:style-name="Tableau5.A3" office:value-type="string">
            <text:p text:style-name="P2"><text:span text:style-name="T9"><text:s/></text:span></text:p>
          </table:table-cell>
          <table:table-cell table:style-name="Tableau5.A3" office:value-type="string">
            <text:p text:style-name="P2"><text:span text:style-name="T9"><text:s/></text:span></text:p>
          </table:table-cell>
        </table:table-row>
        <table:table-row table:style-name="Tableau5.1">
          <table:table-cell table:style-name="Tableau5.A2" office:value-type="string">
            <text:p text:style-name="P2"><text:span text:style-name="T9">Exporter les données</text:span></text:p>
          </table:table-cell>
          <table:table-cell table:style-name="Tableau5.A2" office:value-type="string">
            <text:p text:style-name="P2"><text:span text:style-name="T9">✓</text:span></text:p>
          </table:table-cell>
          <table:table-cell table:style-name="Tableau5.A2" office:value-type="string">
            <text:p text:style-name="P2"><text:span text:style-name="T9">✓</text:span></text:p>
          </table:table-cell>
          <table:table-cell table:style-name="Tableau5.A2" office:value-type="string">
            <text:p text:style-name="P2"><text:span text:style-name="T9"><text:s/></text:span></text:p>
          </table:table-cell>
          <table:table-cell table:style-name="Tableau5.A2" office:value-type="string">
            <text:p text:style-name="P2"><text:span text:style-name="T9"><text:s/></text:span></text:p>
          </table:table-cell>
        </table:table-row>
      </table:table>
      <text:p text:style-name="Standard"/>
      <text:h text:style-name="P19" text:outline-level="1"><text:bookmark-start text:name="__RefHeading__2018_1459372959"/>Spécifications fonctionnelles<text:bookmark-end text:name="__RefHeading__2018_1459372959"/></text:h>
      <text:p text:style-name="P11"/>
      <text:p text:style-name="P13"><text:span text:style-name="T11">Cette section détaille l’ensemble des fonctionnalités de Pulsar, organisées par module. Chaque fonctionnalité est accompagnée de user stories et de critères d’acceptance.</text:span></text:p>
      <text:p text:style-name="P11"/>
      <text:h text:style-name="Heading_20_2" text:outline-level="2"><text:bookmark-start text:name="__RefHeading__2020_1459372959"/>Billetterie intégrée<text:bookmark-end text:name="__RefHeading__2020_1459372959"/></text:h>
      <text:p text:style-name="P14"/>
      <text:h text:style-name="Heading_20_3" text:outline-level="3"><text:bookmark-start text:name="__RefHeading__2022_1459372959"/>Achat de billets<text:bookmark-end text:name="__RefHeading__2022_1459372959"/></text:h>
      <text:p text:style-name="P13"><text:span text:style-name="T11">L’utilisateur doit pouvoir acheter ses billets directement dans l’application, sans redirection vers un site tiers. Le parcours d’achat doit être fluide, sécurisé et proposer différentes catégories de places.</text:span></text:p>
      <text:p text:style-name="P14"/>
      <text:p text:style-name="P13"><text:span text:style-name="T7">User Stories :</text:span></text:p>
      <text:p text:style-name="P15"><text:span text:style-name="T14">En tant que </text:span><text:span text:style-name="T2">utilisateur</text:span><text:span text:style-name="T14">, je veux </text:span><text:span text:style-name="T10">parcourir le catalogue d’événements (concerts, festivals, spectacles, expositions) avec des filtres par genre, date, lieu et prix</text:span><text:span text:style-name="T14"> afin de </text:span><text:span text:style-name="T17">trouver rapidement l’événement qui correspond à mes envies sans naviguer sur plusieurs plateformes</text:span><text:span text:style-name="T14">.</text:span></text:p>
      <text:p text:style-name="P15"><text:span text:style-name="T14">En tant que </text:span><text:span text:style-name="T2">utilisateur</text:span><text:span text:style-name="T14">, je veux </text:span><text:span text:style-name="T10">sélectionner le type et le nombre de billets souhaités (fosse, assis, VIP, pass jour, pass week-end) avec affichage du détail tarifaire en temps réel</text:span><text:span text:style-name="T14"> afin de </text:span><text:span text:style-name="T17">composer mon expérience selon mon budget et mes préférences</text:span><text:span text:style-name="T14">.</text:span></text:p>
      <text:p text:style-name="P15"><text:span text:style-name="T14">En tant que </text:span><text:span text:style-name="T2">utilisateur</text:span><text:span text:style-name="T14">, je veux </text:span><text:span text:style-name="T10">finaliser mon achat via un paiement sécurisé intégré (carte bancaire, PayPal, Apple Pay, Google Pay) sans quitter l’application</text:span><text:span text:style-name="T14"> afin de </text:span><text:span text:style-name="T17">bénéficier d’une expérience d’achat fluide et rassurante</text:span><text:span text:style-name="T14">.</text:span></text:p>
      <text:p text:style-name="P15"><text:span text:style-name="T14">En tant que </text:span><text:span text:style-name="T2">utilisateur</text:span><text:span text:style-name="T14">, je veux </text:span><text:span text:style-name="T10">recevoir immédiatement une confirmation d’achat par notification push et email, incluant le récapitulatif complet de la commande</text:span><text:span text:style-name="T14"> afin de </text:span><text:span text:style-name="T17">avoir la preuve de mon achat accessible à tout moment</text:span><text:span text:style-name="T14">.</text:span></text:p>
      <text:p text:style-name="P15"><text:span text:style-name="T14">En tant que </text:span><text:span text:style-name="T2">utilisateur</text:span><text:span text:style-name="T14">, je veux </text:span><text:span text:style-name="T10">consulter l’historique de mes réservations et retrouver mes billets passés et à venir dans une section dédiée</text:span><text:span text:style-name="T14"> afin de </text:span><text:span text:style-name="T17">gérer facilement mes engagements événementiels</text:span><text:span text:style-name="T14">.</text:span></text:p>
      <text:p text:style-name="P15"><text:span text:style-name="T14">En tant que </text:span><text:span text:style-name="T2">organisateur</text:span><text:span text:style-name="T14">, je veux </text:span><text:span text:style-name="T10">paramétrer les différentes catégories de billets (type, nombre de places, tarif, date de mise en vente, conditions)</text:span><text:span text:style-name="T14"> afin de </text:span><text:span text:style-name="T17">adapter l’offre à la structure de mon événement et à ma politique tarifaire</text:span><text:span text:style-name="T14">.</text:span></text:p>
      <text:p text:style-name="P14"/>
      <text:p text:style-name="P13"><text:span text:style-name="T7">Critères d’acceptance :</text:span></text:p>
      <text:list xml:id="list28571515" text:continue-numbering="true" text:style-name="WWNum2">
        <text:list-item>
          <text:p text:style-name="P22"><text:span text:style-name="T11">Le catalogue affiche les événements en moins de 2 secondes avec pagination infinie.</text:span></text:p>
        </text:list-item>
        <text:list-item>
          <text:p text:style-name="P22"><text:span text:style-name="T11">Les filtres se combinent et les résultats se mettent à jour en temps réel.</text:span></text:p>
        </text:list-item>
        <text:list-item>
          <text:p text:style-name="P22"><text:span text:style-name="T11">Le paiement est conforme PCI-DSS via un prestataire certifié (Stripe).</text:span></text:p>
        </text:list-item>
        <text:list-item>
          <text:p text:style-name="P22"><text:span text:style-name="T11">La confirmation est reçue dans les 5 secondes suivant le paiement.</text:span></text:p>
        </text:list-item>
      </text:list>
      <text:p text:style-name="P11"/>
      <text:h text:style-name="Heading_20_3" text:outline-level="3"><text:bookmark-start text:name="__RefHeading__2024_1459372959"/><text:soft-page-break/>Billet dématérialisé (QR Code)<text:bookmark-end text:name="__RefHeading__2024_1459372959"/></text:h>
      <text:p text:style-name="P13"><text:span text:style-name="T11">Le billet numérique doit être accessible hors connexion, lisible rapidement à l’entrée, et infalsifiable. Il constitue le point de rencontre entre l’expérience numérique et l’événement physique.</text:span></text:p>
      <text:p text:style-name="P14"/>
      <text:p text:style-name="P13"><text:span text:style-name="T7">User Stories :</text:span></text:p>
      <text:p text:style-name="P15"><text:span text:style-name="T14">En tant que </text:span><text:span text:style-name="T2">utilisateur</text:span><text:span text:style-name="T14">, je veux </text:span><text:span text:style-name="T10">accéder à mon billet dématérialisé sous forme de QR code directement depuis l’application, même sans connexion internet</text:span><text:span text:style-name="T14"> afin de </text:span><text:span text:style-name="T17">pouvoir entrer dans l’événement même si je n’ai pas de réseau sur place</text:span><text:span text:style-name="T14">.</text:span></text:p>
      <text:p text:style-name="P15"><text:span text:style-name="T14">En tant que </text:span><text:span text:style-name="T2">utilisateur</text:span><text:span text:style-name="T14">, je veux </text:span><text:span text:style-name="T10">ajouter mon billet à mon portefeuille mobile (Apple Wallet, Google Wallet) en un geste</text:span><text:span text:style-name="T14"> afin de </text:span><text:span text:style-name="T17">retrouver mon billet facilement depuis l’écran de verrouillage le jour J</text:span><text:span text:style-name="T14">.</text:span></text:p>
      <text:p text:style-name="P15"><text:span text:style-name="T14">En tant que </text:span><text:span text:style-name="T2">utilisateur</text:span><text:span text:style-name="T14">, je veux </text:span><text:span text:style-name="T10">transférer un billet à un ami directement depuis l’application en toute sécurité</text:span><text:span text:style-name="T14"> afin de </text:span><text:span text:style-name="T17">offrir ou revendre mon billet sans passer par des canaux non officiels</text:span><text:span text:style-name="T14">.</text:span></text:p>
      <text:p text:style-name="P15"><text:span text:style-name="T14">En tant que </text:span><text:span text:style-name="T2">organisateur</text:span><text:span text:style-name="T14">, je veux </text:span><text:span text:style-name="T10">scanner les QR codes à l’entrée via l’interface de contrôle et visualiser en temps réel le taux de remplissage</text:span><text:span text:style-name="T14"> afin de </text:span><text:span text:style-name="T17">gérer efficacement les flux d’entrée et détecter les doublons ou fraudes</text:span><text:span text:style-name="T14">.</text:span></text:p>
      <text:p text:style-name="P14"/>
      <text:p text:style-name="P13"><text:span text:style-name="T7">Critères d’acceptance :</text:span></text:p>
      <text:list xml:id="list28580452" text:continue-numbering="true" text:style-name="WWNum2">
        <text:list-item>
          <text:p text:style-name="P22"><text:span text:style-name="T11">Le QR code s’affiche en moins de 500ms, y compris en mode offline.</text:span></text:p>
        </text:list-item>
        <text:list-item>
          <text:p text:style-name="P22"><text:span text:style-name="T11">Chaque QR code est unique, signé cryptographiquement et associé à un seul utilisateur.</text:span></text:p>
        </text:list-item>
        <text:list-item>
          <text:p text:style-name="P22"><text:span text:style-name="T11">Le scan détecte les doublons en temps réel.</text:span></text:p>
        </text:list-item>
      </text:list>
      <text:p text:style-name="P11"/>
      <text:h text:style-name="Heading_20_3" text:outline-level="3"><text:bookmark-start text:name="__RefHeading__2026_1459372959"/>Notifications liées à l’événement<text:bookmark-end text:name="__RefHeading__2026_1459372959"/></text:h>
      <text:p text:style-name="P13"><text:span text:style-name="T11">Les notifications accompagnent l’utilisateur tout au long de son parcours, de l’achat jusqu’à l’après-événement. Elles doivent être pertinentes, personnalisées et contextuelles.</text:span></text:p>
      <text:p text:style-name="P14"/>
      <text:p text:style-name="P13"><text:span text:style-name="T7">User Stories :</text:span></text:p>
      <text:p text:style-name="P15"><text:span text:style-name="T14">En tant que </text:span><text:span text:style-name="T2">utilisateur</text:span><text:span text:style-name="T14">, je veux </text:span><text:span text:style-name="T10">recevoir des rappels automatiques à J-7, J-1 et le jour de l’événement avec les informations essentielles (horaires, accès, météo)</text:span><text:span text:style-name="T14"> afin de </text:span><text:span text:style-name="T17">ne rien oublier et arriver sereinement</text:span><text:span text:style-name="T14">.</text:span></text:p>
      <text:p text:style-name="P15"><text:span text:style-name="T14">En tant que </text:span><text:span text:style-name="T2">utilisateur</text:span><text:span text:style-name="T14">, je veux </text:span><text:span text:style-name="T10">être alerté en temps réel en cas de changement d’horaire, d’annulation ou d’information importante</text:span><text:span text:style-name="T14"> afin de </text:span><text:span text:style-name="T17">adapter mon organisation sans consulter l’application régulièrement</text:span><text:span text:style-name="T14">.</text:span></text:p>
      <text:p text:style-name="P15"><text:span text:style-name="T14">En tant que </text:span><text:span text:style-name="T2">utilisateur</text:span><text:span text:style-name="T14">, je veux </text:span><text:span text:style-name="T10">choisir le type et la fréquence des notifications que je souhaite recevoir</text:span><text:span text:style-name="T14"> afin de </text:span><text:span text:style-name="T17">ne pas être submergé de messages tout en restant informé</text:span><text:span text:style-name="T14">.</text:span></text:p>
      <text:p text:style-name="P15"><text:span text:style-name="T14">En tant que </text:span><text:span text:style-name="T2">organisateur</text:span><text:span text:style-name="T14">, je veux </text:span><text:span text:style-name="T10">envoyer des notifications ciblées à tous les participants ou à un segment spécifique</text:span><text:span text:style-name="T14"> afin de </text:span><text:span text:style-name="T17">communiquer efficacement avant et pendant l’événement</text:span><text:span text:style-name="T14">.</text:span></text:p>
      <text:p text:style-name="P11"/>
      <text:p text:style-name="P16"/>
      <text:h text:style-name="Heading_20_2" text:outline-level="2"><text:bookmark-start text:name="__RefHeading__2028_1459372959"/>Organisation du trajet<text:bookmark-end text:name="__RefHeading__2028_1459372959"/></text:h>
      <text:p text:style-name="P14"/>
      <text:h text:style-name="Heading_20_3" text:outline-level="3"><text:bookmark-start text:name="__RefHeading__2030_1459372959"/><text:soft-page-break/>Proposition de trajets bas carbone<text:bookmark-end text:name="__RefHeading__2030_1459372959"/></text:h>
      <text:p text:style-name="P13"><text:span text:style-name="T11">L’application positionne la mobilité durable comme valeur centrale. La proposition de trajets doit systématiquement valoriser les alternatives bas carbone (train, bus, covoiturage, vélo) par rapport à la voiture individuelle.</text:span></text:p>
      <text:p text:style-name="P14"/>
      <text:p text:style-name="P13"><text:span text:style-name="T7">User Stories :</text:span></text:p>
      <text:p text:style-name="P15"><text:span text:style-name="T14">En tant que </text:span><text:span text:style-name="T2">utilisateur</text:span><text:span text:style-name="T14">, je veux </text:span><text:span text:style-name="T10">obtenir automatiquement des suggestions de trajets bas carbone (train, bus, covoiturage) depuis ma localisation vers le lieu de l’événement, dès l’achat d’un billet</text:span><text:span text:style-name="T14"> afin de </text:span><text:span text:style-name="T17">découvrir des options éco-responsables sans recherche supplémentaire</text:span><text:span text:style-name="T14">.</text:span></text:p>
      <text:p text:style-name="P15"><text:span text:style-name="T14">En tant que </text:span><text:span text:style-name="T2">utilisateur</text:span><text:span text:style-name="T14">, je veux </text:span><text:span text:style-name="T10">comparer côte à côte les options de transport selon leur durée, coût estimé et empreinte carbone</text:span><text:span text:style-name="T14"> afin de </text:span><text:span text:style-name="T17">faire un choix éclairé en accord avec mes valeurs et contraintes</text:span><text:span text:style-name="T14">.</text:span></text:p>
      <text:p text:style-name="P15"><text:span text:style-name="T14">En tant que </text:span><text:span text:style-name="T2">utilisateur</text:span><text:span text:style-name="T14">, je veux </text:span><text:span text:style-name="T10">filtrer les propositions selon mes préférences (sans voiture, budget maximum, durée maximale)</text:span><text:span text:style-name="T14"> afin de </text:span><text:span text:style-name="T17">personnaliser les résultats selon mes contraintes</text:span><text:span text:style-name="T14">.</text:span></text:p>
      <text:p text:style-name="P15"><text:span text:style-name="T14">En tant que </text:span><text:span text:style-name="T2">utilisateur</text:span><text:span text:style-name="T14">, je veux </text:span><text:span text:style-name="T10">sauvegarder un trajet préféré pour un événement récurrent</text:span><text:span text:style-name="T14"> afin de </text:span><text:span text:style-name="T17">éviter de répéter la même recherche</text:span><text:span text:style-name="T14">.</text:span></text:p>
      <text:p text:style-name="P11"/>
      <text:h text:style-name="Heading_20_3" text:outline-level="3"><text:bookmark-start text:name="__RefHeading__2032_1459372959"/>Planificateur multimodal<text:bookmark-end text:name="__RefHeading__2032_1459372959"/></text:h>
      <text:p text:style-name="P13"><text:span text:style-name="T11">De nombreux trajets vers des événements nécessitent de combiner plusieurs modes de transport. L’application orchestre ces combinaisons de façon transparente.</text:span></text:p>
      <text:p text:style-name="P14"/>
      <text:p text:style-name="P13"><text:span text:style-name="T7">User Stories :</text:span></text:p>
      <text:p text:style-name="P15"><text:span text:style-name="T14">En tant que </text:span><text:span text:style-name="T2">utilisateur</text:span><text:span text:style-name="T14">, je veux </text:span><text:span text:style-name="T10">planifier un trajet combinant plusieurs modes de transport (vélo + TER + métro) avec horaires et correspondances détaillés</text:span><text:span text:style-name="T14"> afin de </text:span><text:span text:style-name="T17">arriver à l’heure sans jongler entre plusieurs applications</text:span><text:span text:style-name="T14">.</text:span></text:p>
      <text:p text:style-name="P15"><text:span text:style-name="T14">En tant que </text:span><text:span text:style-name="T2">utilisateur</text:span><text:span text:style-name="T14">, je veux </text:span><text:span text:style-name="T10">visualiser mon trajet complet sur une carte interactive avec les étapes et temps de parcours</text:span><text:span text:style-name="T14"> afin de </text:span><text:span text:style-name="T17">avoir une vue d’ensemble claire de mon déplacement</text:span><text:span text:style-name="T14">.</text:span></text:p>
      <text:p text:style-name="P15"><text:span text:style-name="T14">En tant que </text:span><text:span text:style-name="T2">utilisateur</text:span><text:span text:style-name="T14">, je veux </text:span><text:span text:style-name="T10">recevoir des alertes en temps réel en cas de perturbation avec solution de remplacement</text:span><text:span text:style-name="T14"> afin de </text:span><text:span text:style-name="T17">adapter mon déplacement sans stress</text:span><text:span text:style-name="T14">.</text:span></text:p>
      <text:p text:style-name="P15"><text:span text:style-name="T14">En tant que </text:span><text:span text:style-name="T2">utilisateur</text:span><text:span text:style-name="T14">, je veux </text:span><text:span text:style-name="T10">accéder aux horaires et plans des transports en commun locaux pour le retour</text:span><text:span text:style-name="T14"> afin de </text:span><text:span text:style-name="T17">rentrer facilement même dans une ville inconnue</text:span><text:span text:style-name="T14">.</text:span></text:p>
      <text:p text:style-name="P11"/>
      <text:h text:style-name="Heading_20_3" text:outline-level="3"><text:bookmark-start text:name="__RefHeading__2034_1459372959"/>Covoiturage entre participants<text:bookmark-end text:name="__RefHeading__2034_1459372959"/></text:h>
      <text:p text:style-name="P13"><text:span text:style-name="T11">La mise en relation de participants souhaitant partager un trajet est une fonctionnalité sociale et écologique forte. Elle nécessite un système de confiance, de vérification et de coordination.</text:span></text:p>
      <text:p text:style-name="P14"/>
      <text:p text:style-name="P13"><text:span text:style-name="T7">User Stories :</text:span></text:p>
      <text:p text:style-name="P15"><text:span text:style-name="T14">En tant que </text:span><text:span text:style-name="T2">utilisateur conducteur</text:span><text:span text:style-name="T14">, je veux </text:span><text:span text:style-name="T10">proposer mon trajet vers un événement (départ, heure, places disponibles, contribution financière)</text:span><text:span text:style-name="T14"> afin de </text:span><text:span text:style-name="T17">partager les frais et réduire mon impact carbone</text:span><text:span text:style-name="T14">.</text:span></text:p>
      <text:p text:style-name="P15"><text:span text:style-name="T14">En tant que </text:span><text:span text:style-name="T2">utilisateur passager</text:span><text:span text:style-name="T14">, je veux </text:span><text:span text:style-name="T10">rechercher un conducteur se rendant au même événement depuis une zone proche</text:span><text:span text:style-name="T14"> afin de </text:span><text:span text:style-name="T17">trouver un covoiturage entre festivaliers</text:span><text:span text:style-name="T14">.</text:span></text:p>
      <text:p text:style-name="P15"><text:span text:style-name="T14">En tant que </text:span><text:span text:style-name="T2">utilisateur</text:span><text:span text:style-name="T14">, je veux </text:span><text:span text:style-name="T10">consulter le profil des participants (avis, historique) avant d’accepter un trajet</text:span><text:span text:style-name="T14"> afin de </text:span><text:span text:style-name="T17">voyager en sécurité avec des personnes de confiance</text:span><text:span text:style-name="T14">.</text:span></text:p>
      <text:p text:style-name="P15"><text:soft-page-break/><text:span text:style-name="T14">En tant que </text:span><text:span text:style-name="T2">utilisateur</text:span><text:span text:style-name="T14">, je veux </text:span><text:span text:style-name="T10">communiquer via la messagerie intégrée pour coordonner le trajet</text:span><text:span text:style-name="T14"> afin de </text:span><text:span text:style-name="T17">organiser les modalités sans partager mes coordonnées</text:span><text:span text:style-name="T14">.</text:span></text:p>
      <text:p text:style-name="P11"/>
      <text:h text:style-name="Heading_20_3" text:outline-level="3"><text:bookmark-start text:name="__RefHeading__2036_1459372959"/>Achat intégré des titres de transport<text:bookmark-end text:name="__RefHeading__2036_1459372959"/></text:h>
      <text:p text:style-name="P13"><text:span text:style-name="T7">User Stories :</text:span></text:p>
      <text:p text:style-name="P15"><text:span text:style-name="T14">En tant que </text:span><text:span text:style-name="T2">utilisateur</text:span><text:span text:style-name="T14">, je veux </text:span><text:span text:style-name="T10">acheter mon billet de train ou de bus pour me rendre à l’événement directement dans l’application</text:span><text:span text:style-name="T14"> afin de </text:span><text:span text:style-name="T17">tout centraliser en un seul endroit</text:span><text:span text:style-name="T14">.</text:span></text:p>
      <text:p text:style-name="P15"><text:span text:style-name="T14">En tant que </text:span><text:span text:style-name="T2">utilisateur</text:span><text:span text:style-name="T14">, je veux </text:span><text:span text:style-name="T10">retrouver mes titres de transport dans la même section que mes billets d’événement</text:span><text:span text:style-name="T14"> afin de </text:span><text:span text:style-name="T17">avoir un portefeuille unique pour tous mes documents de voyage</text:span><text:span text:style-name="T14">.</text:span></text:p>
      <text:p text:style-name="P15"><text:span text:style-name="T14">En tant que </text:span><text:span text:style-name="T2">utilisateur</text:span><text:span text:style-name="T14">, je veux </text:span><text:span text:style-name="T10">recevoir un récapitulatif centralisé de mes dépenses (billet + transport + logement)</text:span><text:span text:style-name="T14"> afin de </text:span><text:span text:style-name="T17">suivre mon budget global pour chaque sortie</text:span><text:span text:style-name="T14">.</text:span></text:p>
      <text:p text:style-name="P11"/>
      <text:p text:style-name="P16"/>
      <text:h text:style-name="Heading_20_2" text:outline-level="2"><text:bookmark-start text:name="__RefHeading__2038_1459372959"/>Réservation de logement<text:bookmark-end text:name="__RefHeading__2038_1459372959"/></text:h>
      <text:p text:style-name="P14"/>
      <text:h text:style-name="Heading_20_3" text:outline-level="3"><text:bookmark-start text:name="__RefHeading__2040_1459372959"/>Recherche et réservation d’hébergement<text:bookmark-end text:name="__RefHeading__2040_1459372959"/></text:h>
      <text:p text:style-name="P13"><text:span text:style-name="T11">L’intégration du logement dans l’application permet de couvrir l’intégralité du parcours utilisateur, notamment pour les événements impliquant un déplacement.</text:span></text:p>
      <text:p text:style-name="P14"/>
      <text:p text:style-name="P13"><text:span text:style-name="T7">User Stories :</text:span></text:p>
      <text:p text:style-name="P15"><text:span text:style-name="T14">En tant que </text:span><text:span text:style-name="T2">utilisateur</text:span><text:span text:style-name="T14">, je veux </text:span><text:span text:style-name="T10">rechercher des hébergements proches du lieu avec des filtres par prix, distance, type et disponibilité</text:span><text:span text:style-name="T14"> afin de </text:span><text:span text:style-name="T17">trouver un logement adapté à mes besoins et mon budget</text:span><text:span text:style-name="T14">.</text:span></text:p>
      <text:p text:style-name="P15"><text:span text:style-name="T14">En tant que </text:span><text:span text:style-name="T2">utilisateur</text:span><text:span text:style-name="T14">, je veux </text:span><text:span text:style-name="T10">voir des suggestions d’hébergement adaptées à mon trajet (proche de la gare d’arrivée si je viens en train)</text:span><text:span text:style-name="T14"> afin de </text:span><text:span text:style-name="T17">bénéficier de recommandations cohérentes</text:span><text:span text:style-name="T14">.</text:span></text:p>
      <text:p text:style-name="P15"><text:span text:style-name="T14">En tant que </text:span><text:span text:style-name="T2">utilisateur</text:span><text:span text:style-name="T14">, je veux </text:span><text:span text:style-name="T10">réserver directement dans l’application avec paiement sécurisé</text:span><text:span text:style-name="T14"> afin de </text:span><text:span text:style-name="T17">finaliser toute mon organisation en un seul endroit</text:span><text:span text:style-name="T14">.</text:span></text:p>
      <text:p text:style-name="P15"><text:span text:style-name="T14">En tant que </text:span><text:span text:style-name="T2">utilisateur</text:span><text:span text:style-name="T14">, je veux </text:span><text:span text:style-name="T10">retrouver ma réservation aux côtés de mon billet et trajet</text:span><text:span text:style-name="T14"> afin de </text:span><text:span text:style-name="T17">avoir une vue d’ensemble de mon séjour</text:span><text:span text:style-name="T14">.</text:span></text:p>
      <text:p text:style-name="P11"/>
      <text:h text:style-name="Heading_20_3" text:outline-level="3"><text:bookmark-start text:name="__RefHeading__2042_1459372959"/>Hébergement collaboratif<text:bookmark-end text:name="__RefHeading__2042_1459372959"/></text:h>
      <text:p text:style-name="P13"><text:span text:style-name="T11">En complément des hébergements professionnels, la plateforme permet une mise en relation entre participants et hôtes locaux.</text:span></text:p>
      <text:p text:style-name="P14"/>
      <text:p text:style-name="P13"><text:span text:style-name="T7">User Stories :</text:span></text:p>
      <text:p text:style-name="P15"><text:span text:style-name="T14">En tant que </text:span><text:span text:style-name="T2">utilisateur hôte</text:span><text:span text:style-name="T14">, je veux </text:span><text:span text:style-name="T10">proposer une chambre ou un espace chez moi en précisant les conditions d’accueil (dates, nombre de personnes, tarif ou gratuité)</text:span><text:span text:style-name="T14"> afin de </text:span><text:span text:style-name="T17">contribuer à l’esprit communautaire</text:span><text:span text:style-name="T14">.</text:span></text:p>
      <text:p text:style-name="P15"><text:span text:style-name="T14">En tant que </text:span><text:span text:style-name="T2">utilisateur</text:span><text:span text:style-name="T14">, je veux </text:span><text:span text:style-name="T10">consulter les offres d’hébergement collaboratif proposées par des hôtes locaux</text:span><text:span text:style-name="T14"> afin de </text:span><text:span text:style-name="T17">trouver un logement authentique et économique</text:span><text:span text:style-name="T14">.</text:span></text:p>
      <text:p text:style-name="P15"><text:span text:style-name="T14">En tant que </text:span><text:span text:style-name="T2">utilisateur</text:span><text:span text:style-name="T14">, je veux </text:span><text:span text:style-name="T10">contacter un hôte via la messagerie interne avant de confirmer</text:span><text:span text:style-name="T14"> </text:span><text:soft-page-break/><text:span text:style-name="T14">afin de </text:span><text:span text:style-name="T17">m’assurer que le logement correspond à mes attentes</text:span><text:span text:style-name="T14">.</text:span></text:p>
      <text:p text:style-name="P15"><text:span text:style-name="T14">En tant que </text:span><text:span text:style-name="T2">utilisateur et hôte</text:span><text:span text:style-name="T14">, je veux </text:span><text:span text:style-name="T10">laisser un avis public après un séjour collaboratif</text:span><text:span text:style-name="T14"> afin de </text:span><text:span text:style-name="T17">contribuer à la confiance au sein de la communauté</text:span><text:span text:style-name="T14">.</text:span></text:p>
      <text:p text:style-name="Standard"/>
      <text:h text:style-name="P20" text:outline-level="2"><text:bookmark-start text:name="__RefHeading__2044_1459372959"/>Calcul et sensibilisation écologique<text:bookmark-end text:name="__RefHeading__2044_1459372959"/></text:h>
      <text:p text:style-name="P14"/>
      <text:h text:style-name="Heading_20_3" text:outline-level="3"><text:bookmark-start text:name="__RefHeading__2046_1459372959"/>Estimation de l’empreinte carbone<text:bookmark-end text:name="__RefHeading__2046_1459372959"/></text:h>
      <text:p text:style-name="P13"><text:span text:style-name="T11">La transparence sur l’impact environnemental de chaque option de transport est au cœur de la proposition de valeur. Les données sont basées sur les référentiels ADEME.</text:span></text:p>
      <text:p text:style-name="P14"/>
      <text:p text:style-name="P13"><text:span text:style-name="T7">User Stories :</text:span></text:p>
      <text:p text:style-name="P15"><text:span text:style-name="T14">En tant que </text:span><text:span text:style-name="T2">utilisateur</text:span><text:span text:style-name="T14">, je veux </text:span><text:span text:style-name="T10">voir l’empreinte carbone estimée (en kg CO₂) pour chaque option de transport</text:span><text:span text:style-name="T14"> afin de </text:span><text:span text:style-name="T17">prendre conscience de l’impact de mon déplacement</text:span><text:span text:style-name="T14">.</text:span></text:p>
      <text:p text:style-name="P15"><text:span text:style-name="T14">En tant que </text:span><text:span text:style-name="T2">utilisateur</text:span><text:span text:style-name="T14">, je veux </text:span><text:span text:style-name="T10">comparer les empreintes via un visuel clair (graphique à barres, code couleur)</text:span><text:span text:style-name="T14"> afin de </text:span><text:span text:style-name="T17">comprendre rapidement quelle option est la plus vertueuse</text:span><text:span text:style-name="T14">.</text:span></text:p>
      <text:p text:style-name="P15"><text:span text:style-name="T14">En tant que </text:span><text:span text:style-name="T2">utilisateur</text:span><text:span text:style-name="T14">, je veux </text:span><text:span text:style-name="T10">visualiser mon éco-score cumulé sur l’année</text:span><text:span text:style-name="T14"> afin de </text:span><text:span text:style-name="T17">suivre l’évolution de mon impact et me fixer des objectifs</text:span><text:span text:style-name="T14">.</text:span></text:p>
      <text:p text:style-name="P15"><text:span text:style-name="T14">En tant que </text:span><text:span text:style-name="T2">système</text:span><text:span text:style-name="T14">, je veux </text:span><text:span text:style-name="T10">calculer automatiquement l’empreinte carbone selon les référentiels ADEME</text:span><text:span text:style-name="T14"> afin de </text:span><text:span text:style-name="T17">fournir des données fiables et comparables</text:span><text:span text:style-name="T14">.</text:span></text:p>
      <text:p text:style-name="P11"/>
      <text:h text:style-name="Heading_20_3" text:outline-level="3"><text:bookmark-start text:name="__RefHeading__2048_1459372959"/>Recommandations et badges<text:bookmark-end text:name="__RefHeading__2048_1459372959"/></text:h>
      <text:p text:style-name="P13"><text:span text:style-name="T7">User Stories :</text:span></text:p>
      <text:p text:style-name="P15"><text:span text:style-name="T14">En tant que </text:span><text:span text:style-name="T2">utilisateur</text:span><text:span text:style-name="T14">, je veux </text:span><text:span text:style-name="T10">recevoir des suggestions personnalisées pour réduire l’empreinte de mon trajet</text:span><text:span text:style-name="T14"> afin de </text:span><text:span text:style-name="T17">agir concrètement sur mon impact</text:span><text:span text:style-name="T14">.</text:span></text:p>
      <text:p text:style-name="P15"><text:span text:style-name="T14">En tant que </text:span><text:span text:style-name="T2">utilisateur</text:span><text:span text:style-name="T14">, je veux </text:span><text:span text:style-name="T10">voir un éco-badge valorisant sur mon profil lorsque je choisis le bas carbone</text:span><text:span text:style-name="T14"> afin de </text:span><text:span text:style-name="T17">être reconnu pour mes efforts</text:span><text:span text:style-name="T14">.</text:span></text:p>
      <text:p text:style-name="P15"><text:span text:style-name="T14">En tant que </text:span><text:span text:style-name="T2">organisateur</text:span><text:span text:style-name="T14">, je veux </text:span><text:span text:style-name="T10">accéder aux statistiques agrégées d’impact carbone des participants</text:span><text:span text:style-name="T14"> afin de </text:span><text:span text:style-name="T17">mesurer et communiquer sur l’empreinte environnementale</text:span><text:span text:style-name="T14">.</text:span></text:p>
      <text:p text:style-name="P11"/>
      <text:p text:style-name="P16"/>
      <text:h text:style-name="Heading_20_2" text:outline-level="2"><text:bookmark-start text:name="__RefHeading__2050_1459372959"/>Fonctionnalités sociales et communautaires<text:bookmark-end text:name="__RefHeading__2050_1459372959"/></text:h>
      <text:p text:style-name="P14"/>
      <text:h text:style-name="Heading_20_3" text:outline-level="3"><text:bookmark-start text:name="__RefHeading__2052_1459372959"/>Profils utilisateurs<text:bookmark-end text:name="__RefHeading__2052_1459372959"/></text:h>
      <text:p text:style-name="P13"><text:span text:style-name="T7">User Stories :</text:span></text:p>
      <text:p text:style-name="P15"><text:span text:style-name="T14">En tant que </text:span><text:span text:style-name="T2">utilisateur</text:span><text:span text:style-name="T14">, je veux </text:span><text:span text:style-name="T10">créer et personnaliser mon profil avec mes genres musicaux préférés, types d’événements et artistes favoris</text:span><text:span text:style-name="T14"> afin de </text:span><text:span text:style-name="T17">recevoir des recommandations adaptées à mes goûts</text:span><text:span text:style-name="T14">.</text:span></text:p>
      <text:p text:style-name="P15"><text:span text:style-name="T14">En tant que </text:span><text:span text:style-name="T2">utilisateur</text:span><text:span text:style-name="T14">, je veux </text:span><text:span text:style-name="T10">consulter mon historique complet avec un résumé de mon engagement (concerts, km, CO₂)</text:span><text:span text:style-name="T14"> afin de </text:span><text:span text:style-name="T17">retracer mon parcours de spectateur</text:span><text:span text:style-name="T14">.</text:span></text:p>
      <text:p text:style-name="P15"><text:span text:style-name="T14">En tant que </text:span><text:span text:style-name="T2">utilisateur</text:span><text:span text:style-name="T14">, je veux </text:span><text:span text:style-name="T10">choisir quelles informations sont visibles (public, amis, privé)</text:span><text:span text:style-name="T14"> afin de </text:span><text:span text:style-name="T17">contrôler ma vie privée</text:span><text:span text:style-name="T14">.</text:span></text:p>
      <text:p text:style-name="P11"/>
      <text:h text:style-name="Heading_20_3" text:outline-level="3"><text:bookmark-start text:name="__RefHeading__2054_1459372959"/><text:soft-page-break/>Liens sociaux et groupes<text:bookmark-end text:name="__RefHeading__2054_1459372959"/></text:h>
      <text:p text:style-name="P13"><text:span text:style-name="T7">User Stories :</text:span></text:p>
      <text:p text:style-name="P15"><text:span text:style-name="T14">En tant que </text:span><text:span text:style-name="T2">utilisateur</text:span><text:span text:style-name="T14">, je veux </text:span><text:span text:style-name="T10">créer un groupe privé avec mes amis pour un événement, partager billets, trajet et hébergement</text:span><text:span text:style-name="T14"> afin de </text:span><text:span text:style-name="T17">organiser facilement une sortie à plusieurs</text:span><text:span text:style-name="T14">.</text:span></text:p>
      <text:p text:style-name="P15"><text:span text:style-name="T14">En tant que </text:span><text:span text:style-name="T2">utilisateur</text:span><text:span text:style-name="T14">, je veux </text:span><text:span text:style-name="T10">voir quels amis participent au même événement</text:span><text:span text:style-name="T14"> afin de </text:span><text:span text:style-name="T17">m’organiser spontanément avec mon réseau</text:span><text:span text:style-name="T14">.</text:span></text:p>
      <text:p text:style-name="P15"><text:span text:style-name="T14">En tant que </text:span><text:span text:style-name="T2">utilisateur</text:span><text:span text:style-name="T14">, je veux </text:span><text:span text:style-name="T10">inviter des amis via un lien ou une notification in-app</text:span><text:span text:style-name="T14"> afin de </text:span><text:span text:style-name="T17">coordonner sans passer par des canaux externes</text:span><text:span text:style-name="T14">.</text:span></text:p>
      <text:p text:style-name="P15"><text:span text:style-name="T14">En tant que </text:span><text:span text:style-name="T2">utilisateur</text:span><text:span text:style-name="T14">, je veux </text:span><text:span text:style-name="T10">rejoindre un espace de discussion communautaire dédié à un événement</text:span><text:span text:style-name="T14"> afin de </text:span><text:span text:style-name="T17">prolonger l’expérience avant, pendant et après</text:span><text:span text:style-name="T14">.</text:span></text:p>
      <text:p text:style-name="P11"/>
      <text:h text:style-name="Heading_20_3" text:outline-level="3"><text:bookmark-start text:name="__RefHeading__2056_1459372959"/>Fil d’actualité et événements locaux<text:bookmark-end text:name="__RefHeading__2056_1459372959"/></text:h>
      <text:p text:style-name="P13"><text:span text:style-name="T7">User Stories :</text:span></text:p>
      <text:p text:style-name="P15"><text:span text:style-name="T14">En tant que </text:span><text:span text:style-name="T2">utilisateur</text:span><text:span text:style-name="T14">, je veux </text:span><text:span text:style-name="T10">découvrir des événements locaux recommandés selon ma localisation et mes goûts</text:span><text:span text:style-name="T14"> afin de </text:span><text:span text:style-name="T17">ne pas manquer des événements près de chez moi</text:span><text:span text:style-name="T14">.</text:span></text:p>
      <text:p text:style-name="P15"><text:span text:style-name="T14">En tant que </text:span><text:span text:style-name="T2">utilisateur</text:span><text:span text:style-name="T14">, je veux </text:span><text:span text:style-name="T10">partager un événement ou trajet dans le fil d’actualité</text:span><text:span text:style-name="T14"> afin de </text:span><text:span text:style-name="T17">donner de la visibilité à des événements que j’apprécie</text:span><text:span text:style-name="T14">.</text:span></text:p>
      <text:p text:style-name="P15"><text:span text:style-name="T14">En tant que </text:span><text:span text:style-name="T2">organisateur</text:span><text:span text:style-name="T14">, je veux </text:span><text:span text:style-name="T10">bénéficier d’une mise en avant automatique auprès des utilisateurs locaux</text:span><text:span text:style-name="T14"> afin de </text:span><text:span text:style-name="T17">toucher une audience qualifiée</text:span><text:span text:style-name="T14">.</text:span></text:p>
      <text:p text:style-name="P11"/>
      <text:p text:style-name="P16"/>
      <text:h text:style-name="Heading_20_2" text:outline-level="2"><text:bookmark-start text:name="__RefHeading__2058_1459372959"/>Expérience sur place<text:bookmark-end text:name="__RefHeading__2058_1459372959"/></text:h>
      <text:p text:style-name="P14"/>
      <text:h text:style-name="Heading_20_3" text:outline-level="3"><text:bookmark-start text:name="__RefHeading__2060_1459372959"/>Informations pratiques et programme<text:bookmark-end text:name="__RefHeading__2060_1459372959"/></text:h>
      <text:p text:style-name="P13"><text:span text:style-name="T7">User Stories :</text:span></text:p>
      <text:p text:style-name="P15"><text:span text:style-name="T14">En tant que </text:span><text:span text:style-name="T2">utilisateur</text:span><text:span text:style-name="T14">, je veux </text:span><text:span text:style-name="T10">accéder au plan interactif du site (scènes, sanitaires, restauration, premiers secours)</text:span><text:span text:style-name="T14"> afin de </text:span><text:span text:style-name="T17">me repérer facilement et profiter de l’événement</text:span><text:span text:style-name="T14">.</text:span></text:p>
      <text:p text:style-name="P15"><text:span text:style-name="T14">En tant que </text:span><text:span text:style-name="T2">utilisateur</text:span><text:span text:style-name="T14">, je veux </text:span><text:span text:style-name="T10">consulter le programme détaillé mis à jour en temps réel</text:span><text:span text:style-name="T14"> afin de </text:span><text:span text:style-name="T17">organiser ma journée et ne rater aucun acte</text:span><text:span text:style-name="T14">.</text:span></text:p>
      <text:p text:style-name="P15"><text:span text:style-name="T14">En tant que </text:span><text:span text:style-name="T2">utilisateur</text:span><text:span text:style-name="T14">, je veux </text:span><text:span text:style-name="T10">recevoir des notifications personnalisées sur place (début de set, rappel d’atelier)</text:span><text:span text:style-name="T14"> afin de </text:span><text:span text:style-name="T17">ne pas manquer les moments importants</text:span><text:span text:style-name="T14">.</text:span></text:p>
      <text:p text:style-name="P15"><text:span text:style-name="T14">En tant que </text:span><text:span text:style-name="T2">utilisateur</text:span><text:span text:style-name="T14">, je veux </text:span><text:span text:style-name="T10">accéder aux informations pratiques (parkings, accès PMR, objets interdits)</text:span><text:span text:style-name="T14"> afin de </text:span><text:span text:style-name="T17">arriver préparé</text:span><text:span text:style-name="T14">.</text:span></text:p>
      <text:p text:style-name="P11"/>
      <text:h text:style-name="Heading_20_3" text:outline-level="3"><text:bookmark-start text:name="__RefHeading__2062_1459372959"/>Slow tourisme<text:bookmark-end text:name="__RefHeading__2062_1459372959"/></text:h>
      <text:p text:style-name="P13"><text:span text:style-name="T7">User Stories :</text:span></text:p>
      <text:p text:style-name="P15"><text:span text:style-name="T14">En tant que </text:span><text:span text:style-name="T2">utilisateur</text:span><text:span text:style-name="T14">, je veux </text:span><text:span text:style-name="T10">recevoir des suggestions d’activités locales (restaurants, sites culturels, balades nature)</text:span><text:span text:style-name="T14"> afin de </text:span><text:span text:style-name="T17">profiter de mon déplacement pour découvrir la région</text:span><text:span text:style-name="T14">.</text:span></text:p>
      <text:p text:style-name="P15"><text:span text:style-name="T14">En tant que </text:span><text:span text:style-name="T2">utilisateur</text:span><text:span text:style-name="T14">, je veux </text:span><text:span text:style-name="T10">filtrer les suggestions selon mes centres d’intérêt et ma disponibilité</text:span><text:span text:style-name="T14"> afin de </text:span><text:span text:style-name="T17">recevoir des recommandations pertinentes</text:span><text:span text:style-name="T14">.</text:span></text:p>
      <text:p text:style-name="P15"><text:span text:style-name="T14">En tant que </text:span><text:span text:style-name="T2">organisateur</text:span><text:span text:style-name="T14">, je veux </text:span><text:span text:style-name="T10">enrichir la page événement avec des partenaires locaux</text:span><text:span text:style-name="T14"> afin </text:span><text:soft-page-break/><text:span text:style-name="T14">de </text:span><text:span text:style-name="T17">valoriser le territoire d’accueil</text:span><text:span text:style-name="T14">.</text:span></text:p>
      <text:p text:style-name="P11"/>
      <text:h text:style-name="Heading_20_3" text:outline-level="3"><text:bookmark-start text:name="__RefHeading__2064_1459372959"/>Accessibilité<text:bookmark-end text:name="__RefHeading__2064_1459372959"/></text:h>
      <text:p text:style-name="P13"><text:span text:style-name="T7">User Stories :</text:span></text:p>
      <text:p text:style-name="P15"><text:span text:style-name="T14">En tant que </text:span><text:span text:style-name="T2">utilisateur en situation de handicap</text:span><text:span text:style-name="T14">, je veux </text:span><text:span text:style-name="T10">activer un mode d’interface simplifié avec polices agrandies, contrastes renforcés et grandes zones tactiles</text:span><text:span text:style-name="T14"> afin de </text:span><text:span text:style-name="T17">utiliser l’application confortablement</text:span><text:span text:style-name="T14">.</text:span></text:p>
      <text:p text:style-name="P15"><text:span text:style-name="T14">En tant que </text:span><text:span text:style-name="T2">utilisateur malvoyant</text:span><text:span text:style-name="T14">, je veux </text:span><text:span text:style-name="T10">bénéficier d’une compatibilité complète avec les lecteurs d’écran (VoiceOver, TalkBack)</text:span><text:span text:style-name="T14"> afin de </text:span><text:span text:style-name="T17">accéder à toutes les fonctionnalités de manière autonome</text:span><text:span text:style-name="T14">.</text:span></text:p>
      <text:p text:style-name="P15"><text:span text:style-name="T14">En tant que </text:span><text:span text:style-name="T2">utilisateur</text:span><text:span text:style-name="T14">, je veux </text:span><text:span text:style-name="T10">filtrer hébergements et événements selon leur niveau d’accessibilité PMR</text:span><text:span text:style-name="T14"> afin de </text:span><text:span text:style-name="T17">organiser une sortie adaptée</text:span><text:span text:style-name="T14">.</text:span></text:p>
      <text:p text:style-name="P11"/>
      <text:p text:style-name="P16"/>
      <text:h text:style-name="Heading_20_2" text:outline-level="2"><text:bookmark-start text:name="__RefHeading__2066_1459372959"/>Espace organisateur (B2B)<text:bookmark-end text:name="__RefHeading__2066_1459372959"/></text:h>
      <text:p text:style-name="P14"/>
      <text:h text:style-name="Heading_20_3" text:outline-level="3"><text:bookmark-start text:name="__RefHeading__2068_1459372959"/>Création et gestion d’événements<text:bookmark-end text:name="__RefHeading__2068_1459372959"/></text:h>
      <text:p text:style-name="P13"><text:span text:style-name="T7">User Stories :</text:span></text:p>
      <text:p text:style-name="P15"><text:span text:style-name="T14">En tant que </text:span><text:span text:style-name="T2">organisateur</text:span><text:span text:style-name="T14">, je veux </text:span><text:span text:style-name="T10">créer une fiche événement complète (nom, description, affiche, lieu, dates, programme, artistes) via un formulaire guidé</text:span><text:span text:style-name="T14"> afin de </text:span><text:span text:style-name="T17">publier rapidement un événement professionnel</text:span><text:span text:style-name="T14">.</text:span></text:p>
      <text:p text:style-name="P15"><text:span text:style-name="T14">En tant que </text:span><text:span text:style-name="T2">organisateur</text:span><text:span text:style-name="T14">, je veux </text:span><text:span text:style-name="T10">configurer les catégories de billets (tarif, quota, dates d’ouverture/fermeture, conditions de remboursement)</text:span><text:span text:style-name="T14"> afin de </text:span><text:span text:style-name="T17">adapter mon offre billetterie</text:span><text:span text:style-name="T14">.</text:span></text:p>
      <text:p text:style-name="P15"><text:span text:style-name="T14">En tant que </text:span><text:span text:style-name="T2">organisateur</text:span><text:span text:style-name="T14">, je veux </text:span><text:span text:style-name="T10">gérer les modifications de programmation et notifier automatiquement les participants</text:span><text:span text:style-name="T14"> afin de </text:span><text:span text:style-name="T17">communiquer rapidement en cas d’imprévu</text:span><text:span text:style-name="T14">.</text:span></text:p>
      <text:p text:style-name="P15"><text:span text:style-name="T14">En tant que </text:span><text:span text:style-name="T2">organisateur</text:span><text:span text:style-name="T14">, je veux </text:span><text:span text:style-name="T10">dépublier ou annuler un événement avec déclenchement automatique des remboursements</text:span><text:span text:style-name="T14"> afin de </text:span><text:span text:style-name="T17">gérer les situations de crise de façon transparente</text:span><text:span text:style-name="T14">.</text:span></text:p>
      <text:p text:style-name="P11"/>
      <text:h text:style-name="Heading_20_3" text:outline-level="3"><text:bookmark-start text:name="__RefHeading__2070_1459372959"/>Suivi des ventes et participants<text:bookmark-end text:name="__RefHeading__2070_1459372959"/></text:h>
      <text:p text:style-name="P13"><text:span text:style-name="T7">User Stories :</text:span></text:p>
      <text:p text:style-name="P15"><text:span text:style-name="T14">En tant que </text:span><text:span text:style-name="T2">organisateur</text:span><text:span text:style-name="T14">, je veux </text:span><text:span text:style-name="T10">suivre en temps réel les ventes par catégorie (nombre, revenus, taux de remplissage)</text:span><text:span text:style-name="T14"> afin de </text:span><text:span text:style-name="T17">piloter ma stratégie de vente</text:span><text:span text:style-name="T14">.</text:span></text:p>
      <text:p text:style-name="P15"><text:span text:style-name="T14">En tant que </text:span><text:span text:style-name="T2">organisateur</text:span><text:span text:style-name="T14">, je veux </text:span><text:span text:style-name="T10">visualiser la provenance géographique des participants sur une carte</text:span><text:span text:style-name="T14"> afin de </text:span><text:span text:style-name="T17">anticiper les flux de transport</text:span><text:span text:style-name="T14">.</text:span></text:p>
      <text:p text:style-name="P15"><text:span text:style-name="T14">En tant que </text:span><text:span text:style-name="T2">organisateur</text:span><text:span text:style-name="T14">, je veux </text:span><text:span text:style-name="T10">exporter les données au format CSV ou Excel</text:span><text:span text:style-name="T14"> afin de </text:span><text:span text:style-name="T17">travailler avec mes outils internes</text:span><text:span text:style-name="T14">.</text:span></text:p>
      <text:p text:style-name="P15"><text:span text:style-name="T14">En tant que </text:span><text:span text:style-name="T2">organisateur</text:span><text:span text:style-name="T14">, je veux </text:span><text:span text:style-name="T10">paramétrer des alertes automatiques (seuil de remplissage, pic de vente)</text:span><text:span text:style-name="T14"> afin de </text:span><text:span text:style-name="T17">réagir rapidement aux signaux importants</text:span><text:span text:style-name="T14">.</text:span></text:p>
      <text:p text:style-name="P11"/>
      <text:h text:style-name="Heading_20_3" text:outline-level="3"><text:bookmark-start text:name="__RefHeading__2072_1459372959"/>Statistiques d’impact écologique<text:bookmark-end text:name="__RefHeading__2072_1459372959"/></text:h>
      <text:p text:style-name="P13"><text:span text:style-name="T7">User Stories :</text:span></text:p>
      <text:p text:style-name="P15"><text:soft-page-break/><text:span text:style-name="T14">En tant que </text:span><text:span text:style-name="T2">organisateur</text:span><text:span text:style-name="T14">, je veux </text:span><text:span text:style-name="T10">accéder à un rapport d’impact environnemental (empreinte moyenne, modes de transport, % bas carbone)</text:span><text:span text:style-name="T14"> afin de </text:span><text:span text:style-name="T17">mesurer l’impact de mes actions</text:span><text:span text:style-name="T14">.</text:span></text:p>
      <text:p text:style-name="P15"><text:span text:style-name="T14">En tant que </text:span><text:span text:style-name="T2">organisateur</text:span><text:span text:style-name="T14">, je veux </text:span><text:span text:style-name="T10">télécharger un rapport formalisé pour mes partenaires et labels</text:span><text:span text:style-name="T14"> afin de </text:span><text:span text:style-name="T17">valoriser mon engagement RSE</text:span><text:span text:style-name="T14">.</text:span></text:p>
      <text:p text:style-name="P15"><text:span text:style-name="T14">En tant que </text:span><text:span text:style-name="T2">organisateur</text:span><text:span text:style-name="T14">, je veux </text:span><text:span text:style-name="T10">afficher un badge écologique sur la page de mon événement</text:span><text:span text:style-name="T14"> afin de </text:span><text:span text:style-name="T17">encourager les participants à choisir le bas carbone</text:span><text:span text:style-name="T14">.</text:span></text:p>
      <text:p text:style-name="P11"/>
      <text:p text:style-name="P16"/>
      <text:h text:style-name="Heading_20_2" text:outline-level="2"><text:bookmark-start text:name="__RefHeading__2074_1459372959"/>Paiement et gestion financière<text:bookmark-end text:name="__RefHeading__2074_1459372959"/></text:h>
      <text:p text:style-name="P14"/>
      <text:p text:style-name="P13"><text:span text:style-name="T7">User Stories :</text:span></text:p>
      <text:p text:style-name="P15"><text:span text:style-name="T14">En tant que </text:span><text:span text:style-name="T2">utilisateur</text:span><text:span text:style-name="T14">, je veux </text:span><text:span text:style-name="T10">payer l’ensemble de mon parcours (billet + transport + hébergement) en une seule transaction</text:span><text:span text:style-name="T14"> afin de </text:span><text:span text:style-name="T17">simplifier ma gestion financière</text:span><text:span text:style-name="T14">.</text:span></text:p>
      <text:p text:style-name="P15"><text:span text:style-name="T14">En tant que </text:span><text:span text:style-name="T2">utilisateur</text:span><text:span text:style-name="T14">, je veux </text:span><text:span text:style-name="T10">choisir parmi plusieurs moyens de paiement (CB, PayPal, Apple Pay, Google Pay, virement)</text:span><text:span text:style-name="T14"> afin de </text:span><text:span text:style-name="T17">payer avec le moyen qui me convient</text:span><text:span text:style-name="T14">.</text:span></text:p>
      <text:p text:style-name="P15"><text:span text:style-name="T14">En tant que </text:span><text:span text:style-name="T2">utilisateur</text:span><text:span text:style-name="T14">, je veux </text:span><text:span text:style-name="T10">recevoir une facture récapitulative centralisée pour chaque événement</text:span><text:span text:style-name="T14"> afin de </text:span><text:span text:style-name="T17">garder une trace comptable</text:span><text:span text:style-name="T14">.</text:span></text:p>
      <text:p text:style-name="P15"><text:span text:style-name="T14">En tant que </text:span><text:span text:style-name="T2">utilisateur</text:span><text:span text:style-name="T14">, je veux </text:span><text:span text:style-name="T10">demander un remboursement directement depuis l’historique selon les conditions applicables</text:span><text:span text:style-name="T14"> afin de </text:span><text:span text:style-name="T17">gérer les imprévus facilement</text:span><text:span text:style-name="T14">.</text:span></text:p>
      <text:p text:style-name="P11"/>
      <text:p text:style-name="P16"/>
      <text:h text:style-name="Heading_20_2" text:outline-level="2"><text:bookmark-start text:name="__RefHeading__2076_1459372959"/>Recommandations et assistant de planification<text:bookmark-end text:name="__RefHeading__2076_1459372959"/></text:h>
      <text:p text:style-name="P14"/>
      <text:h text:style-name="Heading_20_3" text:outline-level="3"><text:bookmark-start text:name="__RefHeading__2078_1459372959"/>Suggestions d’événements<text:bookmark-end text:name="__RefHeading__2078_1459372959"/></text:h>
      <text:p text:style-name="P13"><text:span text:style-name="T7">User Stories :</text:span></text:p>
      <text:p text:style-name="P15"><text:span text:style-name="T14">En tant que </text:span><text:span text:style-name="T2">utilisateur</text:span><text:span text:style-name="T14">, je veux </text:span><text:span text:style-name="T10">recevoir des suggestions personnalisées basées sur mes genres, historique et tendances communautaires</text:span><text:span text:style-name="T14"> afin de </text:span><text:span text:style-name="T17">découvrir des événements adaptés sans chercher activement</text:span><text:span text:style-name="T14">.</text:span></text:p>
      <text:p text:style-name="P15"><text:span text:style-name="T14">En tant que </text:span><text:span text:style-name="T2">utilisateur</text:span><text:span text:style-name="T14">, je veux </text:span><text:span text:style-name="T10">voir en priorité les événements locaux ou accessibles en transport bas carbone</text:span><text:span text:style-name="T14"> afin de </text:span><text:span text:style-name="T17">concilier envies culturelles et engagements environnementaux</text:span><text:span text:style-name="T14">.</text:span></text:p>
      <text:p text:style-name="P15"><text:span text:style-name="T14">En tant que </text:span><text:span text:style-name="T2">utilisateur</text:span><text:span text:style-name="T14">, je veux </text:span><text:span text:style-name="T10">exclure des artistes, genres ou lieux de mes recommandations</text:span><text:span text:style-name="T14"> afin de </text:span><text:span text:style-name="T17">affiner mes suggestions</text:span><text:span text:style-name="T14">.</text:span></text:p>
      <text:p text:style-name="P11"/>
      <text:h text:style-name="Heading_20_3" text:outline-level="3"><text:bookmark-start text:name="__RefHeading__2080_1459372959"/>Assistant de planification intelligent<text:bookmark-end text:name="__RefHeading__2080_1459372959"/></text:h>
      <text:p text:style-name="P13"><text:span text:style-name="T11">Important : Il s’agit d’un moteur de génération de parcours basé sur des algorithmes de recommandation et d’optimisation, et non d’un assistant conversationnel de type IA générative.</text:span></text:p>
      <text:p text:style-name="P14"/>
      <text:p text:style-name="P13"><text:span text:style-name="T7">User Stories :</text:span></text:p>
      <text:p text:style-name="P15"><text:span text:style-name="T14">En tant que </text:span><text:span text:style-name="T2">utilisateur</text:span><text:span text:style-name="T14">, je veux </text:span><text:span text:style-name="T10">demander à l’assistant de générer un parcours complet (trajet + </text:span><text:soft-page-break/><text:span text:style-name="T10">hébergement) en renseignant mon point de départ et budget max</text:span><text:span text:style-name="T14"> afin de </text:span><text:span text:style-name="T17">obtenir une proposition clé en main</text:span><text:span text:style-name="T14">.</text:span></text:p>
      <text:p text:style-name="P15"><text:span text:style-name="T14">En tant que </text:span><text:span text:style-name="T2">utilisateur</text:span><text:span text:style-name="T14">, je veux </text:span><text:span text:style-name="T10">modifier un élément du parcours proposé tout en conservant la cohérence d’ensemble</text:span><text:span text:style-name="T14"> afin de </text:span><text:span text:style-name="T17">personnaliser ma proposition sans repartir de zéro</text:span><text:span text:style-name="T14">.</text:span></text:p>
      <text:p text:style-name="P15"><text:span text:style-name="T14">En tant que </text:span><text:span text:style-name="T2">utilisateur</text:span><text:span text:style-name="T14">, je veux </text:span><text:span text:style-name="T10">valider et réserver en un clic l’intégralité du parcours généré</text:span><text:span text:style-name="T14"> afin de </text:span><text:span text:style-name="T17">transformer une proposition en réservation rapidement</text:span><text:span text:style-name="T14">.</text:span></text:p>
      <text:p text:style-name="P15"><text:span text:style-name="T14">En tant que </text:span><text:span text:style-name="T2">utilisateur</text:span><text:span text:style-name="T14">, je veux </text:span><text:span text:style-name="T10">définir un budget max et ne voir que des propositions compatibles</text:span><text:span text:style-name="T14"> afin de </text:span><text:span text:style-name="T17">rester maître de mes dépenses</text:span><text:span text:style-name="T14">.</text:span></text:p>
      <text:p text:style-name="P15"><text:span text:style-name="T14">En tant que </text:span><text:span text:style-name="T2">système</text:span><text:span text:style-name="T14">, je veux </text:span><text:span text:style-name="T10">prendre en compte les habitudes passées pour ordonner ses propositions</text:span><text:span text:style-name="T14"> afin de </text:span><text:span text:style-name="T17">offrir une expérience de plus en plus personnalisée</text:span><text:span text:style-name="T14">.</text:span></text:p>
      <text:p text:style-name="Standard"/>
      <text:h text:style-name="P19" text:outline-level="1"><text:bookmark-start text:name="__RefHeading__2082_1459372959"/>Spécifications techniques<text:bookmark-end text:name="__RefHeading__2082_1459372959"/></text:h>
      <text:p text:style-name="P11"/>
      <text:h text:style-name="Heading_20_2" text:outline-level="2"><text:bookmark-start text:name="__RefHeading__2084_1459372959"/>Architecture générale<text:bookmark-end text:name="__RefHeading__2084_1459372959"/></text:h>
      <text:p text:style-name="P13"><text:span text:style-name="T11">Pulsar adopte une architecture Feature-First Clean Architecture, conçue pour la maintenabilité, la testabilité et la scalabilité. Chaque fonctionnalité métier est isolée dans son propre module, avec une séparation stricte entre les couches Domain (modèles métier), Data (accès aux données) et Presentation (UI, providers, widgets).</text:span></text:p>
      <text:p text:style-name="P14"/>
      <text:p text:style-name="P13"><text:span text:style-name="T7">Couches de l’architecture :</text:span></text:p>
      <text:list xml:id="list28566014" text:continue-numbering="true" text:style-name="WWNum2">
        <text:list-item>
          <text:p text:style-name="P22"><text:span text:style-name="T11">Couche Domain : Modèles Freezed immuables, entités métier pures, sans dépendance externe.</text:span></text:p>
        </text:list-item>
        <text:list-item>
          <text:p text:style-name="P22"><text:span text:style-name="T11">Couche Data : Repositories (accès Isar, API), sources de données locales et distantes.</text:span></text:p>
        </text:list-item>
        <text:list-item>
          <text:p text:style-name="P22"><text:span text:style-name="T11">Couche Presentation : Screens, Widgets, Providers Riverpod (StateNotifier, FutureProvider).</text:span></text:p>
        </text:list-item>
        <text:list-item>
          <text:p text:style-name="P22"><text:span text:style-name="T11">Couche Core : Thème, routeur, base de données, providers globaux, widgets réutilisables.</text:span></text:p>
        </text:list-item>
      </text:list>
      <text:p text:style-name="P11"/>
      <text:h text:style-name="Heading_20_2" text:outline-level="2"><text:bookmark-start text:name="__RefHeading__2086_1459372959"/>Stack technique<text:bookmark-end text:name="__RefHeading__2086_1459372959"/></text:h>
      <text:p text:style-name="P14"/>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text:span text:style-name="T16">Composant</text:span></text:p>
          </table:table-cell>
          <table:table-cell table:style-name="Tableau6.A1" office:value-type="string">
            <text:p text:style-name="P2"><text:span text:style-name="T16">Technologie</text:span></text:p>
          </table:table-cell>
          <table:table-cell table:style-name="Tableau6.A1" office:value-type="string">
            <text:p text:style-name="P2"><text:span text:style-name="T16">Version</text:span></text:p>
          </table:table-cell>
          <table:table-cell table:style-name="Tableau6.A1" office:value-type="string">
            <text:p text:style-name="P2"><text:span text:style-name="T16">Justification</text:span></text:p>
          </table:table-cell>
        </table:table-row>
        <table:table-row table:style-name="Tableau6.1">
          <table:table-cell table:style-name="Tableau6.A2" office:value-type="string">
            <text:p text:style-name="P2"><text:span text:style-name="T9">Framework</text:span></text:p>
          </table:table-cell>
          <table:table-cell table:style-name="Tableau6.A2" office:value-type="string">
            <text:p text:style-name="P2"><text:span text:style-name="T9">Flutter</text:span></text:p>
          </table:table-cell>
          <table:table-cell table:style-name="Tableau6.A2" office:value-type="string">
            <text:p text:style-name="P2"><text:span text:style-name="T9">≥ 3.5.0</text:span></text:p>
          </table:table-cell>
          <table:table-cell table:style-name="Tableau6.A2" office:value-type="string">
            <text:p text:style-name="P2"><text:span text:style-name="T9">Cross-platform Android/iOS/Web depuis un seul codebase, performances natives</text:span></text:p>
          </table:table-cell>
        </table:table-row>
        <table:table-row table:style-name="Tableau6.1">
          <table:table-cell table:style-name="Tableau6.A3" office:value-type="string">
            <text:p text:style-name="P2"><text:span text:style-name="T9">Langage</text:span></text:p>
          </table:table-cell>
          <table:table-cell table:style-name="Tableau6.A3" office:value-type="string">
            <text:p text:style-name="P2"><text:span text:style-name="T9">Dart</text:span></text:p>
          </table:table-cell>
          <table:table-cell table:style-name="Tableau6.A3" office:value-type="string">
            <text:p text:style-name="P2"><text:span text:style-name="T9">≥ 3.5.0</text:span></text:p>
          </table:table-cell>
          <table:table-cell table:style-name="Tableau6.A3" office:value-type="string">
            <text:p text:style-name="P2"><text:span text:style-name="T9">Null-safety stricte, compilation AOT, hot reload</text:span></text:p>
          </table:table-cell>
        </table:table-row>
        <table:table-row table:style-name="Tableau6.1">
          <table:table-cell table:style-name="Tableau6.A2" office:value-type="string">
            <text:p text:style-name="P2"><text:span text:style-name="T9">State Management</text:span></text:p>
          </table:table-cell>
          <table:table-cell table:style-name="Tableau6.A2" office:value-type="string">
            <text:p text:style-name="P2"><text:span text:style-name="T9">Riverpod 2.x</text:span></text:p>
          </table:table-cell>
          <table:table-cell table:style-name="Tableau6.A2" office:value-type="string">
            <text:p text:style-name="P2"><text:span text:style-name="T9">^2.6.1</text:span></text:p>
          </table:table-cell>
          <table:table-cell table:style-name="Tableau6.A2" office:value-type="string">
            <text:p text:style-name="P2"><text:span text:style-name="T9">Injection de dépendances, compile-safe, testable, pas de context required</text:span></text:p>
          </table:table-cell>
        </table:table-row>
        <table:table-row table:style-name="Tableau6.1">
          <table:table-cell table:style-name="Tableau6.A3" office:value-type="string">
            <text:p text:style-name="P2"><text:span text:style-name="T9">Routing</text:span></text:p>
          </table:table-cell>
          <table:table-cell table:style-name="Tableau6.A3" office:value-type="string">
            <text:p text:style-name="P2"><text:span text:style-name="T9">GoRouter</text:span></text:p>
          </table:table-cell>
          <table:table-cell table:style-name="Tableau6.A3" office:value-type="string">
            <text:p text:style-name="P2"><text:span text:style-name="T9">^14.8.1</text:span></text:p>
          </table:table-cell>
          <table:table-cell table:style-name="Tableau6.A3" office:value-type="string">
            <text:p text:style-name="P2"><text:span text:style-name="T9">ShellRoute pour bottom nav, deep linking, guards, typed routes</text:span></text:p>
          </table:table-cell>
        </table:table-row>
        <table:table-row table:style-name="Tableau6.1">
          <table:table-cell table:style-name="Tableau6.A2" office:value-type="string">
            <text:p text:style-name="P2"><text:span text:style-name="T9">Base de données locale</text:span></text:p>
          </table:table-cell>
          <table:table-cell table:style-name="Tableau6.A2" office:value-type="string">
            <text:p text:style-name="P2"><text:span text:style-name="T9">Isar 3.x</text:span></text:p>
          </table:table-cell>
          <table:table-cell table:style-name="Tableau6.A2" office:value-type="string">
            <text:p text:style-name="P2"><text:span text:style-name="T9">^3.1.0+1</text:span></text:p>
          </table:table-cell>
          <table:table-cell table:style-name="Tableau6.A2" office:value-type="string">
            <text:p text:style-name="P2"><text:span text:style-name="T9">NoSQL ultra-rapide, offline-first, indexation, queries typées</text:span></text:p>
          </table:table-cell>
        </table:table-row>
        <table:table-row table:style-name="Tableau6.1">
          <table:table-cell table:style-name="Tableau6.A3" office:value-type="string">
            <text:p text:style-name="P2"><text:span text:style-name="T9">Modèles</text:span></text:p>
          </table:table-cell>
          <table:table-cell table:style-name="Tableau6.A3" office:value-type="string">
            <text:p text:style-name="P2"><text:span text:style-name="T9">Freezed + json_serializable</text:span></text:p>
          </table:table-cell>
          <table:table-cell table:style-name="Tableau6.A3" office:value-type="string">
            <text:p text:style-name="P2"><text:span text:style-name="T9">^2.4.4</text:span></text:p>
          </table:table-cell>
          <table:table-cell table:style-name="Tableau6.A3" office:value-type="string">
            <text:p text:style-name="P2"><text:span text:style-name="T9">Immutabilité, copyWith, égalité structurelle, sérialisation JSON</text:span></text:p>
          </table:table-cell>
        </table:table-row>
        <table:table-row table:style-name="Tableau6.1">
          <table:table-cell table:style-name="Tableau6.A2" office:value-type="string">
            <text:p text:style-name="P2"><text:span text:style-name="T9">Authentification</text:span></text:p>
          </table:table-cell>
          <table:table-cell table:style-name="Tableau6.A2" office:value-type="string">
            <text:p text:style-name="P2"><text:span text:style-name="T9">Firebase Auth</text:span></text:p>
          </table:table-cell>
          <table:table-cell table:style-name="Tableau6.A2" office:value-type="string">
            <text:p text:style-name="P2"><text:span text:style-name="T9">^5.4.0</text:span></text:p>
          </table:table-cell>
          <table:table-cell table:style-name="Tableau6.A2" office:value-type="string">
            <text:p text:style-name="P2"><text:span text:style-name="T9">Email, Google Sign-In, Apple Sign-In, gestion de session</text:span></text:p>
          </table:table-cell>
        </table:table-row>
        <table:table-row table:style-name="Tableau6.1">
          <table:table-cell table:style-name="Tableau6.A3" office:value-type="string">
            <text:p text:style-name="P2"><text:span text:style-name="T9">Notifications push</text:span></text:p>
          </table:table-cell>
          <table:table-cell table:style-name="Tableau6.A3" office:value-type="string">
            <text:p text:style-name="P2"><text:span text:style-name="T9">Firebase Messaging</text:span></text:p>
          </table:table-cell>
          <table:table-cell table:style-name="Tableau6.A3" office:value-type="string">
            <text:p text:style-name="P2"><text:span text:style-name="T9">^15.2.0</text:span></text:p>
          </table:table-cell>
          <table:table-cell table:style-name="Tableau6.A3" office:value-type="string">
            <text:p text:style-name="P2"><text:span text:style-name="T9">Notifications ciblées, segmentation, programmation</text:span></text:p>
          </table:table-cell>
        </table:table-row>
        <table:table-row table:style-name="Tableau6.1">
          <table:table-cell table:style-name="Tableau6.A2" office:value-type="string">
            <text:p text:style-name="P2"><text:span text:style-name="T9">Crash reporting</text:span></text:p>
          </table:table-cell>
          <table:table-cell table:style-name="Tableau6.A2" office:value-type="string">
            <text:p text:style-name="P2"><text:span text:style-name="T9">Firebase Crashlytics</text:span></text:p>
          </table:table-cell>
          <table:table-cell table:style-name="Tableau6.A2" office:value-type="string">
            <text:p text:style-name="P2"><text:span text:style-name="T9">^4.3.0</text:span></text:p>
          </table:table-cell>
          <table:table-cell table:style-name="Tableau6.A2" office:value-type="string">
            <text:p text:style-name="P2"><text:span text:style-name="T9">Monitoring temps réel, stack traces, alertes</text:span></text:p>
          </table:table-cell>
        </table:table-row>
        <table:table-row table:style-name="Tableau6.1">
          <table:table-cell table:style-name="Tableau6.A3" office:value-type="string">
            <text:p text:style-name="P2"><text:span text:style-name="T9">UI / Animations</text:span></text:p>
          </table:table-cell>
          <table:table-cell table:style-name="Tableau6.A3" office:value-type="string">
            <text:p text:style-name="P2"><text:span text:style-name="T9">flutter_animate</text:span></text:p>
          </table:table-cell>
          <table:table-cell table:style-name="Tableau6.A3" office:value-type="string">
            <text:p text:style-name="P2"><text:span text:style-name="T9">^4.5.0</text:span></text:p>
          </table:table-cell>
          <table:table-cell table:style-name="Tableau6.A3" office:value-type="string">
            <text:p text:style-name="P2"><text:span text:style-name="T9">Animations déclaratives, chaînables, performantes</text:span></text:p>
          </table:table-cell>
        </table:table-row>
        <table:table-row table:style-name="Tableau6.1">
          <table:table-cell table:style-name="Tableau6.A2" office:value-type="string">
            <text:p text:style-name="P2"><text:span text:style-name="T9">Images</text:span></text:p>
          </table:table-cell>
          <table:table-cell table:style-name="Tableau6.A2" office:value-type="string">
            <text:p text:style-name="P2"><text:span text:style-name="T9">cached_network_image</text:span></text:p>
          </table:table-cell>
          <table:table-cell table:style-name="Tableau6.A2" office:value-type="string">
            <text:p text:style-name="P2"><text:span text:style-name="T9">^3.4.1</text:span></text:p>
          </table:table-cell>
          <table:table-cell table:style-name="Tableau6.A2" office:value-type="string">
            <text:p text:style-name="P2"><text:span text:style-name="T9">Cache LRU, placeholders, gestion d’erreurs</text:span></text:p>
          </table:table-cell>
        </table:table-row>
        <table:table-row table:style-name="Tableau6.1">
          <table:table-cell table:style-name="Tableau6.A3" office:value-type="string">
            <text:p text:style-name="P2"><text:span text:style-name="T9">QR Codes</text:span></text:p>
          </table:table-cell>
          <table:table-cell table:style-name="Tableau6.A3" office:value-type="string">
            <text:p text:style-name="P2"><text:span text:style-name="T9">qr_flutter + mobile_scanner</text:span></text:p>
          </table:table-cell>
          <table:table-cell table:style-name="Tableau6.A3" office:value-type="string">
            <text:p text:style-name="P2"><text:span text:style-name="T9">^4.1.0 / ^6.0.2</text:span></text:p>
          </table:table-cell>
          <table:table-cell table:style-name="Tableau6.A3" office:value-type="string">
            <text:p text:style-name="P2"><text:span text:style-name="T9">Génération et lecture de QR codes</text:span></text:p>
          </table:table-cell>
        </table:table-row>
        <table:table-row table:style-name="Tableau6.1">
          <table:table-cell table:style-name="Tableau6.A2" office:value-type="string">
            <text:p text:style-name="P2"><text:span text:style-name="T9">Export</text:span></text:p>
          </table:table-cell>
          <table:table-cell table:style-name="Tableau6.A2" office:value-type="string">
            <text:p text:style-name="P2"><text:span text:style-name="T9">pdf + csv</text:span></text:p>
          </table:table-cell>
          <table:table-cell table:style-name="Tableau6.A2" office:value-type="string">
            <text:p text:style-name="P2"><text:span text:style-name="T9">^3.11.3 / </text:span><text:soft-page-break/><text:span text:style-name="T9">^6.0.0</text:span></text:p>
          </table:table-cell>
          <table:table-cell table:style-name="Tableau6.A2" office:value-type="string">
            <text:p text:style-name="P2"><text:span text:style-name="T9">Génération de rapports PDF et </text:span><text:soft-page-break/><text:span text:style-name="T9">exports CSV</text:span></text:p>
          </table:table-cell>
        </table:table-row>
        <table:table-row table:style-name="Tableau6.1">
          <table:table-cell table:style-name="Tableau6.A3" office:value-type="string">
            <text:p text:style-name="P2"><text:span text:style-name="T9">Design System</text:span></text:p>
          </table:table-cell>
          <table:table-cell table:style-name="Tableau6.A3" office:value-type="string">
            <text:p text:style-name="P2"><text:span text:style-name="T9">Material 3 + Google Fonts</text:span></text:p>
          </table:table-cell>
          <table:table-cell table:style-name="Tableau6.A3" office:value-type="string">
            <text:p text:style-name="P2"><text:span text:style-name="T9">built-in</text:span></text:p>
          </table:table-cell>
          <table:table-cell table:style-name="Tableau6.A3" office:value-type="string">
            <text:p text:style-name="P2"><text:span text:style-name="T9">Thème light/dark, composants natifs, typographie SpaceGrotesk + Inter</text:span></text:p>
          </table:table-cell>
        </table:table-row>
        <table:table-row table:style-name="Tableau6.1">
          <table:table-cell table:style-name="Tableau6.A2" office:value-type="string">
            <text:p text:style-name="P2"><text:span text:style-name="T9">Internationalisation</text:span></text:p>
          </table:table-cell>
          <table:table-cell table:style-name="Tableau6.A2" office:value-type="string">
            <text:p text:style-name="P2"><text:span text:style-name="T9">flutter_localizations + intl</text:span></text:p>
          </table:table-cell>
          <table:table-cell table:style-name="Tableau6.A2" office:value-type="string">
            <text:p text:style-name="P2"><text:span text:style-name="T9">built-in</text:span></text:p>
          </table:table-cell>
          <table:table-cell table:style-name="Tableau6.A2" office:value-type="string">
            <text:p text:style-name="P2"><text:span text:style-name="T9">Support FR + EN via fichiers ARB</text:span></text:p>
          </table:table-cell>
        </table:table-row>
      </table:table>
      <text:p text:style-name="P11"/>
      <text:h text:style-name="Heading_20_2" text:outline-level="2"><text:bookmark-start text:name="__RefHeading__2088_1459372959"/>Arborescence du projet<text:bookmark-end text:name="__RefHeading__2088_1459372959"/></text:h>
      <text:p text:style-name="P14"/>
      <text:p text:style-name="P13"><text:span text:style-name="T11">Le projet suit une organisation Feature-First où chaque fonctionnalité est un module autonome :</text:span></text:p>
      <text:p text:style-name="P14"/>
      <text:p text:style-name="P14"><text:span text:style-name="T4">lib/</text:span></text:p>
      <text:p text:style-name="P17"><text:span text:style-name="T12">├── main.dart</text:span></text:p>
      <text:p text:style-name="P17"><text:span text:style-name="T12">├── core/</text:span></text:p>
      <text:p text:style-name="P17"><text:span text:style-name="T12">│ <text:s text:c="2"/>├── theme/ <text:s text:c="9"/>(colors.dart, app_theme.dart)</text:span></text:p>
      <text:p text:style-name="P17"><text:span text:style-name="T12">│ <text:s text:c="2"/>├── router/ <text:s text:c="8"/>(app_router.dart <text:s text:c="2"/>GoRouter + ShellRoute)</text:span></text:p>
      <text:p text:style-name="P17"><text:span text:style-name="T12">│ <text:s text:c="2"/>├── database/ <text:s text:c="6"/>(isar_collections.dart, isar_service.dart, seed_data.dart)</text:span></text:p>
      <text:p text:style-name="P17"><text:span text:style-name="T12">│ <text:s text:c="2"/>├── providers/ <text:s text:c="5"/>(core_providers.dart, theme_provider.dart, locale_provider.dart)</text:span></text:p>
      <text:p text:style-name="P17"><text:span text:style-name="T12">│ <text:s text:c="2"/>└── widgets/ <text:s text:c="7"/>(app_shell.dart, gradient_button.dart)</text:span></text:p>
      <text:p text:style-name="P17"><text:span text:style-name="T12">└── features/</text:span></text:p>
      <text:p text:style-name="P17"><text:span text:style-name="T12"><text:s text:c="4"/>├── auth/ <text:s text:c="10"/>(data/ domain/ presentation/)</text:span></text:p>
      <text:p text:style-name="P17"><text:span text:style-name="T12"><text:s text:c="4"/>├── home/ <text:s text:c="10"/>(presentation/screens/home_screen.dart)</text:span></text:p>
      <text:p text:style-name="P17"><text:span text:style-name="T12"><text:s text:c="4"/>├── events/ <text:s text:c="8"/>(event_model.dart, event_repository.dart, providers, screens, widgets)</text:span></text:p>
      <text:p text:style-name="P17"><text:span text:style-name="T12"><text:s text:c="4"/>├── tickets/ <text:s text:c="7"/>(ticket_model.dart, ticket_repository.dart, tickets_screen.dart)</text:span></text:p>
      <text:p text:style-name="P17"><text:span text:style-name="T12"><text:s text:c="4"/>├── cart/ <text:s text:c="10"/>(cart_model.dart, cart_repository.dart, cart_screen.dart)</text:span></text:p>
      <text:p text:style-name="P17"><text:span text:style-name="T12"><text:s text:c="4"/>├── profile/ <text:s text:c="7"/>(user_model.dart, profile_screen.dart)</text:span></text:p>
      <text:p text:style-name="P17"><text:span text:style-name="T12"><text:s text:c="4"/>├── transport/ <text:s text:c="5"/>(à développer <text:s text:c="2"/>APIs SNCF, BlaBlaCar)</text:span></text:p>
      <text:p text:style-name="P17"><text:span text:style-name="T12"><text:s text:c="4"/>├── accommodation/ <text:s/>(à développer <text:s text:c="2"/>intégration hébergement)</text:span></text:p>
      <text:p text:style-name="P17"><text:span text:style-name="T12"><text:s text:c="4"/>├── eco/ <text:s text:c="11"/>(à développer <text:s text:c="2"/>calcul CO₂ ADEME)</text:span></text:p>
      <text:p text:style-name="P17"><text:span text:style-name="T12"><text:s text:c="4"/>└── settings/ <text:s text:c="6"/>(settings_screen.dart)</text:span></text:p>
      <text:p text:style-name="P11"/>
      <text:h text:style-name="Heading_20_2" text:outline-level="2"><text:bookmark-start text:name="__RefHeading__2090_1459372959"/>Schéma de base de données (Isar)<text:bookmark-end text:name="__RefHeading__2090_1459372959"/></text:h>
      <text:p text:style-name="P13"><text:span text:style-name="T11">Pulsar utilise Isar, une base de données NoSQL locale haute performance optimisée pour Flutter. L’approche offline-first garantit que toutes les données critiques (billets, profil, favoris) sont accessibles sans connexion internet.</text:span></text:p>
      <text:p text:style-name="P14"/>
      <text:p text:style-name="P13"><text:span text:style-name="T7">5 collections Isar :</text:span></text:p>
      <text:p text:style-name="P1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text:span text:style-name="T16">Collection</text:span></text:p>
          </table:table-cell>
          <table:table-cell table:style-name="Tableau7.A1" office:value-type="string">
            <text:p text:style-name="P2"><text:span text:style-name="T16">Description</text:span></text:p>
          </table:table-cell>
          <table:table-cell table:style-name="Tableau7.A1" office:value-type="string">
            <text:p text:style-name="P2"><text:span text:style-name="T16">Index unique</text:span></text:p>
          </table:table-cell>
          <table:table-cell table:style-name="Tableau7.A1" office:value-type="string">
            <text:p text:style-name="P2"><text:span text:style-name="T16">Champs clés</text:span></text:p>
          </table:table-cell>
        </table:table-row>
        <table:table-row table:style-name="Tableau7.1">
          <table:table-cell table:style-name="Tableau7.A2" office:value-type="string">
            <text:p text:style-name="P2"><text:span text:style-name="T9">IsarEvent</text:span></text:p>
          </table:table-cell>
          <table:table-cell table:style-name="Tableau7.A2" office:value-type="string">
            <text:p text:style-name="P2"><text:span text:style-name="T9">Catalogue des événements (festivals, concerts, salons)</text:span></text:p>
          </table:table-cell>
          <table:table-cell table:style-name="Tableau7.A2" office:value-type="string">
            <text:p text:style-name="P2"><text:span text:style-name="T9">eventId</text:span></text:p>
          </table:table-cell>
          <table:table-cell table:style-name="Tableau7.A2" office:value-type="string">
            <text:p text:style-name="P2"><text:span text:style-name="T9">name, category, date, location, pricing, genres, badges, section</text:span></text:p>
          </table:table-cell>
        </table:table-row>
        <table:table-row table:style-name="Tableau7.1">
          <table:table-cell table:style-name="Tableau7.A3" office:value-type="string">
            <text:p text:style-name="P2"><text:span text:style-name="T9">IsarUserProfile</text:span></text:p>
          </table:table-cell>
          <table:table-cell table:style-name="Tableau7.A3" office:value-type="string">
            <text:p text:style-name="P2"><text:span text:style-name="T9">Profil utilisateur unique avec préférences et stats</text:span></text:p>
          </table:table-cell>
          <table:table-cell table:style-name="Tableau7.A3" office:value-type="string">
            <text:p text:style-name="P2"><text:span text:style-name="T9">odentifier</text:span></text:p>
          </table:table-cell>
          <table:table-cell table:style-name="Tableau7.A3" office:value-type="string">
            <text:p text:style-name="P2"><text:span text:style-name="T9">name, email, genres, budgetMax, ecoMode, co2SavedKg, percentile</text:span></text:p>
          </table:table-cell>
        </table:table-row>
        <table:table-row table:style-name="Tableau7.1">
          <table:table-cell table:style-name="Tableau7.A2" office:value-type="string">
            <text:p text:style-name="P2"><text:span text:style-name="T9">IsarTicket</text:span></text:p>
          </table:table-cell>
          <table:table-cell table:style-name="Tableau7.A2" office:value-type="string">
            <text:p text:style-name="P2"><text:span text:style-name="T9">Billets achetés avec QR code et statut</text:span></text:p>
          </table:table-cell>
          <table:table-cell table:style-name="Tableau7.A2" office:value-type="string">
            <text:p text:style-name="P2"><text:span text:style-name="T9">ticketId</text:span></text:p>
          </table:table-cell>
          <table:table-cell table:style-name="Tableau7.A2" office:value-type="string">
            <text:p text:style-name="P2"><text:span text:style-name="T9">eventId (FK), price, ticketType, status, purchaseDate, qrCodeData</text:span></text:p>
          </table:table-cell>
        </table:table-row>
        <text:soft-page-break/>
        <table:table-row table:style-name="Tableau7.1">
          <table:table-cell table:style-name="Tableau7.A3" office:value-type="string">
            <text:p text:style-name="P2"><text:span text:style-name="T9">IsarCartItem</text:span></text:p>
          </table:table-cell>
          <table:table-cell table:style-name="Tableau7.A3" office:value-type="string">
            <text:p text:style-name="P2"><text:span text:style-name="T9">Items du panier avant checkout</text:span></text:p>
          </table:table-cell>
          <table:table-cell table:style-name="Tableau7.A3" office:value-type="string">
            <text:p text:style-name="P2"><text:span text:style-name="T9">eventId</text:span></text:p>
          </table:table-cell>
          <table:table-cell table:style-name="Tableau7.A3" office:value-type="string">
            <text:p text:style-name="P2"><text:span text:style-name="T9">unitPrice, quantity, ticketType, transportPrice, accommodationPrice</text:span></text:p>
          </table:table-cell>
        </table:table-row>
        <table:table-row table:style-name="Tableau7.1">
          <table:table-cell table:style-name="Tableau7.A2" office:value-type="string">
            <text:p text:style-name="P2"><text:span text:style-name="T9">IsarFavorite</text:span></text:p>
          </table:table-cell>
          <table:table-cell table:style-name="Tableau7.A2" office:value-type="string">
            <text:p text:style-name="P2"><text:span text:style-name="T9">Table de jonction user/événement pour les favoris</text:span></text:p>
          </table:table-cell>
          <table:table-cell table:style-name="Tableau7.A2" office:value-type="string">
            <text:p text:style-name="P2"><text:span text:style-name="T9">eventId</text:span></text:p>
          </table:table-cell>
          <table:table-cell table:style-name="Tableau7.A2" office:value-type="string">
            <text:p text:style-name="P2"><text:span text:style-name="T9">addedAt</text:span></text:p>
          </table:table-cell>
        </table:table-row>
      </table:table>
      <text:p text:style-name="P14"/>
      <text:p text:style-name="P13"><text:span text:style-name="T7">Relations entre collections :</text:span></text:p>
      <text:list xml:id="list28589259" text:continue-numbering="true" text:style-name="WWNum2">
        <text:list-item>
          <text:p text:style-name="P22"><text:span text:style-name="T11">IsarUserProfile → IsarTicket : un utilisateur possède plusieurs billets (1:N via eventId).</text:span></text:p>
        </text:list-item>
        <text:list-item>
          <text:p text:style-name="P22"><text:span text:style-name="T11">IsarUserProfile → IsarCartItem : un utilisateur remplit son panier (1:N).</text:span></text:p>
        </text:list-item>
        <text:list-item>
          <text:p text:style-name="P22"><text:span text:style-name="T11">IsarUserProfile → IsarFavorite : un utilisateur ajoute des favoris (1:N).</text:span></text:p>
        </text:list-item>
        <text:list-item>
          <text:p text:style-name="P22"><text:span text:style-name="T11">IsarEvent → IsarTicket : un événement génère plusieurs billets (1:N).</text:span></text:p>
        </text:list-item>
        <text:list-item>
          <text:p text:style-name="P22"><text:span text:style-name="T11">IsarEvent → IsarCartItem : un événement peut être dans plusieurs paniers (1:N).</text:span></text:p>
        </text:list-item>
        <text:list-item>
          <text:p text:style-name="P22"><text:span text:style-name="T11">IsarEvent → IsarFavorite : un événement peut être favori de plusieurs utilisateurs (1:N).</text:span></text:p>
        </text:list-item>
        <text:list-item>
          <text:p text:style-name="P22"><text:span text:style-name="T11">IsarCartItem → IsarTicket : un item du panier devient un billet après checkout (transition).</text:span></text:p>
        </text:list-item>
      </text:list>
      <text:p text:style-name="P14"/>
      <text:p text:style-name="P13"><text:span text:style-name="T11">Note : Isar étant NoSQL, les relations sont gérées par références logiques (eventId) et non par des contraintes de clés étrangères SQL. La dénormalisation (duplication de eventName, eventDate dans IsarTicket et IsarCartItem) est intentionnelle pour un affichage offline rapide sans jointures.</text:span></text:p>
      <text:p text:style-name="Standard"/>
      <text:h text:style-name="P20" text:outline-level="2"><text:bookmark-start text:name="__RefHeading__2092_1459372959"/>Sécurité<text:bookmark-end text:name="__RefHeading__2092_1459372959"/></text:h>
      <text:p text:style-name="P14"/>
      <text:p text:style-name="P13"><text:span text:style-name="T7">Authentification et gestion des accès :</text:span></text:p>
      <text:list xml:id="list28577928" text:continue-numbering="true" text:style-name="WWNum2">
        <text:list-item>
          <text:p text:style-name="P22"><text:span text:style-name="T11">Authentification via Firebase Auth (email/mot de passe, Google Sign-In, Apple Sign-In).</text:span></text:p>
        </text:list-item>
        <text:list-item>
          <text:p text:style-name="P22"><text:span text:style-name="T11">Tokens JWT signés et refreshés automatiquement.</text:span></text:p>
        </text:list-item>
        <text:list-item>
          <text:p text:style-name="P22"><text:span text:style-name="T11">Gestion des rôles (utilisateur, organisateur, hôte, admin) côté serveur via Firebase Custom Claims.</text:span></text:p>
        </text:list-item>
      </text:list>
      <text:p text:style-name="P14"/>
      <text:p text:style-name="P13"><text:span text:style-name="T7">Protection des données :</text:span></text:p>
      <text:list xml:id="list28589802" text:continue-numbering="true" text:style-name="WWNum2">
        <text:list-item>
          <text:p text:style-name="P22"><text:span text:style-name="T11">Paiements délégués à Stripe (conforme PCI-DSS), aucune donnée bancaire stockée côté client.</text:span></text:p>
        </text:list-item>
        <text:list-item>
          <text:p text:style-name="P22"><text:span text:style-name="T11">QR codes signés cryptographiquement (HMAC-SHA256) pour éviter la falsification.</text:span></text:p>
        </text:list-item>
        <text:list-item>
          <text:p text:style-name="P22"><text:span text:style-name="T11">Chiffrement des données sensibles au repos (Isar encrypté avec AES-256).</text:span></text:p>
        </text:list-item>
        <text:list-item>
          <text:p text:style-name="P22"><text:span text:style-name="T11">Communications HTTPS/TLS 1.3 obligatoires.</text:span></text:p>
        </text:list-item>
        <text:list-item>
          <text:p text:style-name="P22"><text:span text:style-name="T11">Conformité RGPD : droit d’accès, de rectification, de suppression, et export des données.</text:span></text:p>
        </text:list-item>
      </text:list>
      <text:p text:style-name="P11"/>
      <text:h text:style-name="Heading_20_2" text:outline-level="2"><text:bookmark-start text:name="__RefHeading__2094_1459372959"/>Performances<text:bookmark-end text:name="__RefHeading__2094_1459372959"/></text:h>
      <text:p text:style-name="P14"/>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text:span text:style-name="T16">Métrique</text:span></text:p>
          </table:table-cell>
          <table:table-cell table:style-name="Tableau8.A1" office:value-type="string">
            <text:p text:style-name="P2"><text:span text:style-name="T16">Objectif</text:span></text:p>
          </table:table-cell>
          <table:table-cell table:style-name="Tableau8.A1" office:value-type="string">
            <text:p text:style-name="P2"><text:span text:style-name="T16">Mesure</text:span></text:p>
          </table:table-cell>
        </table:table-row>
        <table:table-row table:style-name="Tableau8.1">
          <table:table-cell table:style-name="Tableau8.A2" office:value-type="string">
            <text:p text:style-name="P2"><text:span text:style-name="T9">Temps de démarrage à froid</text:span></text:p>
          </table:table-cell>
          <table:table-cell table:style-name="Tableau8.A2" office:value-type="string">
            <text:p text:style-name="P2"><text:span text:style-name="T9">&lt; 2 secondes</text:span></text:p>
          </table:table-cell>
          <table:table-cell table:style-name="Tableau8.A2" office:value-type="string">
            <text:p text:style-name="P2"><text:span text:style-name="T9">Time to interactive (TTI)</text:span></text:p>
          </table:table-cell>
        </table:table-row>
        <table:table-row table:style-name="Tableau8.1">
          <table:table-cell table:style-name="Tableau8.A3" office:value-type="string">
            <text:p text:style-name="P2"><text:span text:style-name="T9">Chargement du catalogue</text:span></text:p>
          </table:table-cell>
          <table:table-cell table:style-name="Tableau8.A3" office:value-type="string">
            <text:p text:style-name="P2"><text:span text:style-name="T9">&lt; 1 seconde</text:span></text:p>
          </table:table-cell>
          <table:table-cell table:style-name="Tableau8.A3" office:value-type="string">
            <text:p text:style-name="P2"><text:span text:style-name="T9">First contentful paint + data</text:span></text:p>
          </table:table-cell>
        </table:table-row>
        <table:table-row table:style-name="Tableau8.1">
          <table:table-cell table:style-name="Tableau8.A2" office:value-type="string">
            <text:p text:style-name="P2"><text:span text:style-name="T9">Affichage QR code offline</text:span></text:p>
          </table:table-cell>
          <table:table-cell table:style-name="Tableau8.A2" office:value-type="string">
            <text:p text:style-name="P2"><text:span text:style-name="T9">&lt; 500ms</text:span></text:p>
          </table:table-cell>
          <table:table-cell table:style-name="Tableau8.A2" office:value-type="string">
            <text:p text:style-name="P2"><text:span text:style-name="T9">Depuis l’écran billets</text:span></text:p>
          </table:table-cell>
        </table:table-row>
        <table:table-row table:style-name="Tableau8.1">
          <table:table-cell table:style-name="Tableau8.A3" office:value-type="string">
            <text:p text:style-name="P2"><text:span text:style-name="T9">Checkout complet</text:span></text:p>
          </table:table-cell>
          <table:table-cell table:style-name="Tableau8.A3" office:value-type="string">
            <text:p text:style-name="P2"><text:span text:style-name="T9">&lt; 90 secondes</text:span></text:p>
          </table:table-cell>
          <table:table-cell table:style-name="Tableau8.A3" office:value-type="string">
            <text:p text:style-name="P2"><text:span text:style-name="T9">De la sélection au paiement validé</text:span></text:p>
          </table:table-cell>
        </table:table-row>
        <table:table-row table:style-name="Tableau8.1">
          <table:table-cell table:style-name="Tableau8.A2" office:value-type="string">
            <text:p text:style-name="P2"><text:span text:style-name="T9">Recherche d’événements</text:span></text:p>
          </table:table-cell>
          <table:table-cell table:style-name="Tableau8.A2" office:value-type="string">
            <text:p text:style-name="P2"><text:span text:style-name="T9">&lt; 300ms</text:span></text:p>
          </table:table-cell>
          <table:table-cell table:style-name="Tableau8.A2" office:value-type="string">
            <text:p text:style-name="P2"><text:span text:style-name="T9">Query Isar avec index</text:span></text:p>
          </table:table-cell>
        </table:table-row>
        <table:table-row table:style-name="Tableau8.1">
          <table:table-cell table:style-name="Tableau8.A3" office:value-type="string">
            <text:p text:style-name="P2"><text:span text:style-name="T9">Taille de l’APK</text:span></text:p>
          </table:table-cell>
          <table:table-cell table:style-name="Tableau8.A3" office:value-type="string">
            <text:p text:style-name="P2"><text:span text:style-name="T9">&lt; 30 MB</text:span></text:p>
          </table:table-cell>
          <table:table-cell table:style-name="Tableau8.A3" office:value-type="string">
            <text:p text:style-name="P2"><text:span text:style-name="T9">Bundle optimisé (tree shaking, split)</text:span></text:p>
          </table:table-cell>
        </table:table-row>
        <table:table-row table:style-name="Tableau8.1">
          <table:table-cell table:style-name="Tableau8.A2" office:value-type="string">
            <text:p text:style-name="P2"><text:span text:style-name="T9">Score Lighthouse (web)</text:span></text:p>
          </table:table-cell>
          <table:table-cell table:style-name="Tableau8.A2" office:value-type="string">
            <text:p text:style-name="P2"><text:span text:style-name="T9">&gt; 90</text:span></text:p>
          </table:table-cell>
          <table:table-cell table:style-name="Tableau8.A2" office:value-type="string">
            <text:p text:style-name="P2"><text:span text:style-name="T9">Performance, a11y, best practices</text:span></text:p>
          </table:table-cell>
        </table:table-row>
        <table:table-row table:style-name="Tableau8.1">
          <table:table-cell table:style-name="Tableau8.A3" office:value-type="string">
            <text:p text:style-name="P2"><text:span text:style-name="T9">FPS animations</text:span></text:p>
          </table:table-cell>
          <table:table-cell table:style-name="Tableau8.A3" office:value-type="string">
            <text:p text:style-name="P2"><text:span text:style-name="T9">≥ 60 FPS</text:span></text:p>
          </table:table-cell>
          <table:table-cell table:style-name="Tableau8.A3" office:value-type="string">
            <text:p text:style-name="P2"><text:span text:style-name="T9">Flutter DevTools, profiling</text:span></text:p>
          </table:table-cell>
        </table:table-row>
      </table:table>
      <text:p text:style-name="P11"/>
      <text:h text:style-name="Heading_20_2" text:outline-level="2"><text:bookmark-start text:name="__RefHeading__2096_1459372959"/>Accessibilité technique<text:bookmark-end text:name="__RefHeading__2096_1459372959"/></text:h>
      <text:p text:style-name="P14"/>
      <text:list xml:id="list28570918" text:continue-numbering="true" text:style-name="WWNum2">
        <text:list-item>
          <text:p text:style-name="P22"><text:span text:style-name="T11">Compatibilité complète avec VoiceOver (iOS) et TalkBack (Android) sur tous les écrans critiques.</text:span></text:p>
        </text:list-item>
        <text:list-item>
          <text:p text:style-name="P22"><text:span text:style-name="T11">Semantics labels sur tous les widgets interactifs.</text:span></text:p>
        </text:list-item>
        <text:list-item>
          <text:p text:style-name="P22"><text:span text:style-name="T11">Contraste minimum WCAG 2.1 AA (ratio 4.5:1 pour le texte, 3:1 pour les grands textes).</text:span></text:p>
        </text:list-item>
        <text:list-item>
          <text:p text:style-name="P22"><text:span text:style-name="T11">Navigation au clavier complète sur la version web.</text:span></text:p>
        </text:list-item>
        <text:list-item>
          <text:p text:style-name="P22"><text:span text:style-name="T11">Mode interface simplifié (polices agrandies, contrastes renforcés, zones tactiles élargies).</text:span></text:p>
        </text:list-item>
        <text:list-item>
          <text:p text:style-name="P22"><text:span text:style-name="T11">Textes alternatifs sur toutes les images significatives.</text:span></text:p>
        </text:list-item>
      </text:list>
      <text:p text:style-name="P11"/>
      <text:h text:style-name="Heading_20_2" text:outline-level="2"><text:bookmark-start text:name="__RefHeading__2098_1459372959"/><text:soft-page-break/>Stratégie de tests<text:bookmark-end text:name="__RefHeading__2098_1459372959"/></text:h>
      <text:p text:style-name="P14"/>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text:span text:style-name="T16">Type de test</text:span></text:p>
          </table:table-cell>
          <table:table-cell table:style-name="Tableau9.A1" office:value-type="string">
            <text:p text:style-name="P2"><text:span text:style-name="T16">Couverture cible</text:span></text:p>
          </table:table-cell>
          <table:table-cell table:style-name="Tableau9.A1" office:value-type="string">
            <text:p text:style-name="P2"><text:span text:style-name="T16">Outils</text:span></text:p>
          </table:table-cell>
          <table:table-cell table:style-name="Tableau9.A1" office:value-type="string">
            <text:p text:style-name="P2"><text:span text:style-name="T16">Responsabilité</text:span></text:p>
          </table:table-cell>
        </table:table-row>
        <table:table-row table:style-name="Tableau9.1">
          <table:table-cell table:style-name="Tableau9.A2" office:value-type="string">
            <text:p text:style-name="P2"><text:span text:style-name="T9">Tests unitaires</text:span></text:p>
          </table:table-cell>
          <table:table-cell table:style-name="Tableau9.A2" office:value-type="string">
            <text:p text:style-name="P2"><text:span text:style-name="T9">&gt; 80% (domain + data)</text:span></text:p>
          </table:table-cell>
          <table:table-cell table:style-name="Tableau9.A2" office:value-type="string">
            <text:p text:style-name="P2"><text:span text:style-name="T9">flutter_test, mockito</text:span></text:p>
          </table:table-cell>
          <table:table-cell table:style-name="Tableau9.A2" office:value-type="string">
            <text:p text:style-name="P2"><text:span text:style-name="T9">Équipe développement</text:span></text:p>
          </table:table-cell>
        </table:table-row>
        <table:table-row table:style-name="Tableau9.1">
          <table:table-cell table:style-name="Tableau9.A3" office:value-type="string">
            <text:p text:style-name="P2"><text:span text:style-name="T9">Tests de widgets</text:span></text:p>
          </table:table-cell>
          <table:table-cell table:style-name="Tableau9.A3" office:value-type="string">
            <text:p text:style-name="P2"><text:span text:style-name="T9">&gt; 60% (écrans critiques)</text:span></text:p>
          </table:table-cell>
          <table:table-cell table:style-name="Tableau9.A3" office:value-type="string">
            <text:p text:style-name="P2"><text:span text:style-name="T9">flutter_test, WidgetTester</text:span></text:p>
          </table:table-cell>
          <table:table-cell table:style-name="Tableau9.A3" office:value-type="string">
            <text:p text:style-name="P2"><text:span text:style-name="T9">Équipe développement</text:span></text:p>
          </table:table-cell>
        </table:table-row>
        <table:table-row table:style-name="Tableau9.1">
          <table:table-cell table:style-name="Tableau9.A2" office:value-type="string">
            <text:p text:style-name="P2"><text:span text:style-name="T9">Tests d’intégration</text:span></text:p>
          </table:table-cell>
          <table:table-cell table:style-name="Tableau9.A2" office:value-type="string">
            <text:p text:style-name="P2"><text:span text:style-name="T9">Parcours utilisateur clés</text:span></text:p>
          </table:table-cell>
          <table:table-cell table:style-name="Tableau9.A2" office:value-type="string">
            <text:p text:style-name="P2"><text:span text:style-name="T9">integration_test</text:span></text:p>
          </table:table-cell>
          <table:table-cell table:style-name="Tableau9.A2" office:value-type="string">
            <text:p text:style-name="P2"><text:span text:style-name="T9">Équipe QA</text:span></text:p>
          </table:table-cell>
        </table:table-row>
        <table:table-row table:style-name="Tableau9.1">
          <table:table-cell table:style-name="Tableau9.A3" office:value-type="string">
            <text:p text:style-name="P2"><text:span text:style-name="T9">Tests E2E</text:span></text:p>
          </table:table-cell>
          <table:table-cell table:style-name="Tableau9.A3" office:value-type="string">
            <text:p text:style-name="P2"><text:span text:style-name="T9">Smoke tests sur chaque build</text:span></text:p>
          </table:table-cell>
          <table:table-cell table:style-name="Tableau9.A3" office:value-type="string">
            <text:p text:style-name="P2"><text:span text:style-name="T9">patrol, appium</text:span></text:p>
          </table:table-cell>
          <table:table-cell table:style-name="Tableau9.A3" office:value-type="string">
            <text:p text:style-name="P2"><text:span text:style-name="T9">Équipe QA</text:span></text:p>
          </table:table-cell>
        </table:table-row>
        <table:table-row table:style-name="Tableau9.1">
          <table:table-cell table:style-name="Tableau9.A2" office:value-type="string">
            <text:p text:style-name="P2"><text:span text:style-name="T9">Tests de performance</text:span></text:p>
          </table:table-cell>
          <table:table-cell table:style-name="Tableau9.A2" office:value-type="string">
            <text:p text:style-name="P2"><text:span text:style-name="T9">FPS, temps de chargement</text:span></text:p>
          </table:table-cell>
          <table:table-cell table:style-name="Tableau9.A2" office:value-type="string">
            <text:p text:style-name="P2"><text:span text:style-name="T9">Flutter DevTools</text:span></text:p>
          </table:table-cell>
          <table:table-cell table:style-name="Tableau9.A2" office:value-type="string">
            <text:p text:style-name="P2"><text:span text:style-name="T9">Équipe développement</text:span></text:p>
          </table:table-cell>
        </table:table-row>
        <table:table-row table:style-name="Tableau9.1">
          <table:table-cell table:style-name="Tableau9.A3" office:value-type="string">
            <text:p text:style-name="P2"><text:span text:style-name="T9">Tests d’accessibilité</text:span></text:p>
          </table:table-cell>
          <table:table-cell table:style-name="Tableau9.A3" office:value-type="string">
            <text:p text:style-name="P2"><text:span text:style-name="T9">WCAG 2.1 AA</text:span></text:p>
          </table:table-cell>
          <table:table-cell table:style-name="Tableau9.A3" office:value-type="string">
            <text:p text:style-name="P2"><text:span text:style-name="T9">Accessibility Inspector, axe</text:span></text:p>
          </table:table-cell>
          <table:table-cell table:style-name="Tableau9.A3" office:value-type="string">
            <text:p text:style-name="P2"><text:span text:style-name="T9">Équipe QA</text:span></text:p>
          </table:table-cell>
        </table:table-row>
      </table:table>
      <text:p text:style-name="Standard"/>
      <text:h text:style-name="P19" text:outline-level="1"><text:bookmark-start text:name="__RefHeading__2100_1459372959"/>Planning prévisionnel et livrables<text:bookmark-end text:name="__RefHeading__2100_1459372959"/></text:h>
      <text:p text:style-name="P11"/>
      <text:h text:style-name="Heading_20_2" text:outline-level="2"><text:bookmark-start text:name="__RefHeading__2102_1459372959"/>Phases du projet<text:bookmark-end text:name="__RefHeading__2102_1459372959"/></text:h>
      <text:p text:style-name="P14"/>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2"><text:span text:style-name="T16">Phase</text:span></text:p>
          </table:table-cell>
          <table:table-cell table:style-name="Tableau10.A1" office:value-type="string">
            <text:p text:style-name="P2"><text:span text:style-name="T16">Période</text:span></text:p>
          </table:table-cell>
          <table:table-cell table:style-name="Tableau10.A1" office:value-type="string">
            <text:p text:style-name="P2"><text:span text:style-name="T16">Durée</text:span></text:p>
          </table:table-cell>
          <table:table-cell table:style-name="Tableau10.A1" office:value-type="string">
            <text:p text:style-name="P2"><text:span text:style-name="T16">Livrables</text:span></text:p>
          </table:table-cell>
        </table:table-row>
        <table:table-row table:style-name="Tableau10.1">
          <table:table-cell table:style-name="Tableau10.A2" office:value-type="string">
            <text:p text:style-name="P2"><text:span text:style-name="T9">Phase 1 <text:s text:c="2"/>Cadrage</text:span></text:p>
          </table:table-cell>
          <table:table-cell table:style-name="Tableau10.A2" office:value-type="string">
            <text:p text:style-name="P2"><text:span text:style-name="T9">Janvier - Février 2026</text:span></text:p>
          </table:table-cell>
          <table:table-cell table:style-name="Tableau10.A2" office:value-type="string">
            <text:p text:style-name="P2"><text:span text:style-name="T9">8 semaines</text:span></text:p>
          </table:table-cell>
          <table:table-cell table:style-name="Tableau10.A2" office:value-type="string">
            <text:p text:style-name="P2"><text:span text:style-name="T9">Cahier des charges, maquettes UI/UX, schéma BDD, architecture technique</text:span></text:p>
          </table:table-cell>
        </table:table-row>
        <table:table-row table:style-name="Tableau10.1">
          <table:table-cell table:style-name="Tableau10.A3" office:value-type="string">
            <text:p text:style-name="P2"><text:span text:style-name="T9">Phase 2 <text:s text:c="2"/>MVP Core</text:span></text:p>
          </table:table-cell>
          <table:table-cell table:style-name="Tableau10.A3" office:value-type="string">
            <text:p text:style-name="P2"><text:span text:style-name="T9">Mars - Avril 2026</text:span></text:p>
          </table:table-cell>
          <table:table-cell table:style-name="Tableau10.A3" office:value-type="string">
            <text:p text:style-name="P2"><text:span text:style-name="T9">8 semaines</text:span></text:p>
          </table:table-cell>
          <table:table-cell table:style-name="Tableau10.A3" office:value-type="string">
            <text:p text:style-name="P2"><text:span text:style-name="T9">Billetterie, catalogue, profil, panier, QR codes, thème light/dark, i18n</text:span></text:p>
          </table:table-cell>
        </table:table-row>
        <table:table-row table:style-name="Tableau10.1">
          <table:table-cell table:style-name="Tableau10.A2" office:value-type="string">
            <text:p text:style-name="P2"><text:span text:style-name="T9">Phase 3 <text:s text:c="2"/>Transport et éco</text:span></text:p>
          </table:table-cell>
          <table:table-cell table:style-name="Tableau10.A2" office:value-type="string">
            <text:p text:style-name="P2"><text:span text:style-name="T9">Mai - Juin 2026</text:span></text:p>
          </table:table-cell>
          <table:table-cell table:style-name="Tableau10.A2" office:value-type="string">
            <text:p text:style-name="P2"><text:span text:style-name="T9">8 semaines</text:span></text:p>
          </table:table-cell>
          <table:table-cell table:style-name="Tableau10.A2" office:value-type="string">
            <text:p text:style-name="P2"><text:span text:style-name="T9">Planificateur multimodal, covoiturage, calcul CO₂, éco-score, badges</text:span></text:p>
          </table:table-cell>
        </table:table-row>
        <table:table-row table:style-name="Tableau10.1">
          <table:table-cell table:style-name="Tableau10.A3" office:value-type="string">
            <text:p text:style-name="P2"><text:span text:style-name="T9">Phase 4 <text:s text:c="2"/>Hébergement et social</text:span></text:p>
          </table:table-cell>
          <table:table-cell table:style-name="Tableau10.A3" office:value-type="string">
            <text:p text:style-name="P2"><text:span text:style-name="T9">Juillet - Août 2026</text:span></text:p>
          </table:table-cell>
          <table:table-cell table:style-name="Tableau10.A3" office:value-type="string">
            <text:p text:style-name="P2"><text:span text:style-name="T9">8 semaines</text:span></text:p>
          </table:table-cell>
          <table:table-cell table:style-name="Tableau10.A3" office:value-type="string">
            <text:p text:style-name="P2"><text:span text:style-name="T9">Réservation logement, hébergement collaboratif, groupes, messagerie, fil d’actu</text:span></text:p>
          </table:table-cell>
        </table:table-row>
        <table:table-row table:style-name="Tableau10.1">
          <table:table-cell table:style-name="Tableau10.A2" office:value-type="string">
            <text:p text:style-name="P2"><text:span text:style-name="T9">Phase 5 <text:s text:c="2"/>B2B et assistant</text:span></text:p>
          </table:table-cell>
          <table:table-cell table:style-name="Tableau10.A2" office:value-type="string">
            <text:p text:style-name="P2"><text:span text:style-name="T9">Septembre - Octobre 2026</text:span></text:p>
          </table:table-cell>
          <table:table-cell table:style-name="Tableau10.A2" office:value-type="string">
            <text:p text:style-name="P2"><text:span text:style-name="T9">8 semaines</text:span></text:p>
          </table:table-cell>
          <table:table-cell table:style-name="Tableau10.A2" office:value-type="string">
            <text:p text:style-name="P2"><text:span text:style-name="T9">Espace organisateur, tableau de bord, assistant de planification, export</text:span></text:p>
          </table:table-cell>
        </table:table-row>
        <table:table-row table:style-name="Tableau10.1">
          <table:table-cell table:style-name="Tableau10.A3" office:value-type="string">
            <text:p text:style-name="P2"><text:span text:style-name="T9">Phase 6 <text:s text:c="2"/>Tests et lancement</text:span></text:p>
          </table:table-cell>
          <table:table-cell table:style-name="Tableau10.A3" office:value-type="string">
            <text:p text:style-name="P2"><text:span text:style-name="T9">Novembre - Décembre 2026</text:span></text:p>
          </table:table-cell>
          <table:table-cell table:style-name="Tableau10.A3" office:value-type="string">
            <text:p text:style-name="P2"><text:span text:style-name="T9">8 semaines</text:span></text:p>
          </table:table-cell>
          <table:table-cell table:style-name="Tableau10.A3" office:value-type="string">
            <text:p text:style-name="P2"><text:span text:style-name="T9">Bêta test, corrections, optimisation, déploiement stores</text:span></text:p>
          </table:table-cell>
        </table:table-row>
      </table:table>
      <text:p text:style-name="P4"/>
      <text:h text:style-name="Heading_20_2" text:outline-level="2"><text:bookmark-start text:name="__RefHeading__2104_1459372959"/>Répartition des rôles<text:bookmark-end text:name="__RefHeading__2104_1459372959"/></text:h>
      <text:p text:style-name="P14"/>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text:span text:style-name="T16">Membre</text:span></text:p>
          </table:table-cell>
          <table:table-cell table:style-name="Tableau11.A1" office:value-type="string">
            <text:p text:style-name="P2"><text:span text:style-name="T16">Rôle principal</text:span></text:p>
          </table:table-cell>
          <table:table-cell table:style-name="Tableau11.A1" office:value-type="string">
            <text:p text:style-name="P2"><text:span text:style-name="T16">Responsabilités</text:span></text:p>
          </table:table-cell>
        </table:table-row>
        <table:table-row table:style-name="Tableau11.1">
          <table:table-cell table:style-name="Tableau11.A2" office:value-type="string">
            <text:p text:style-name="P2"><text:span text:style-name="T9">Tom Farge</text:span></text:p>
          </table:table-cell>
          <table:table-cell table:style-name="Tableau11.A2" office:value-type="string">
            <text:p text:style-name="P2"><text:span text:style-name="T9">Lead Développeur / Chef de projet</text:span></text:p>
          </table:table-cell>
          <table:table-cell table:style-name="Tableau11.A2" office:value-type="string">
            <text:p text:style-name="P2"><text:span text:style-name="T9">Architecture technique, développement Flutter, intégration Isar/Riverpod, coordination équipe</text:span></text:p>
          </table:table-cell>
        </table:table-row>
        <table:table-row table:style-name="Tableau11.1">
          <table:table-cell table:style-name="Tableau11.A3" office:value-type="string">
            <text:p text:style-name="P2"><text:span text:style-name="T9">Islem</text:span></text:p>
          </table:table-cell>
          <table:table-cell table:style-name="Tableau11.A3" office:value-type="string">
            <text:p text:style-name="P2"><text:span text:style-name="T9">Développeur Back-end / Mobile</text:span></text:p>
          </table:table-cell>
          <table:table-cell table:style-name="Tableau11.A3" office:value-type="string">
            <text:p text:style-name="P2"><text:span text:style-name="T9">Firebase, API transport, système de paiement, notifications push</text:span></text:p>
          </table:table-cell>
        </table:table-row>
        <table:table-row table:style-name="Tableau11.1">
          <table:table-cell table:style-name="Tableau11.A2" office:value-type="string">
            <text:p text:style-name="P2"><text:span text:style-name="T9">Manon</text:span></text:p>
          </table:table-cell>
          <table:table-cell table:style-name="Tableau11.A2" office:value-type="string">
            <text:p text:style-name="P2"><text:span text:style-name="T9">UX/UI Designer / Front-end</text:span></text:p>
          </table:table-cell>
          <table:table-cell table:style-name="Tableau11.A2" office:value-type="string">
            <text:p text:style-name="P2"><text:span text:style-name="T9">Maquettes Figma, design system, intégration UI, accessibilité, animations</text:span></text:p>
          </table:table-cell>
        </table:table-row>
        <table:table-row table:style-name="Tableau11.1">
          <table:table-cell table:style-name="Tableau11.A3" office:value-type="string">
            <text:p text:style-name="P2"><text:span text:style-name="T9">Seife</text:span></text:p>
          </table:table-cell>
          <table:table-cell table:style-name="Tableau11.A3" office:value-type="string">
            <text:p text:style-name="P2"><text:span text:style-name="T9">Développeur Full-stack / QA</text:span></text:p>
          </table:table-cell>
          <table:table-cell table:style-name="Tableau11.A3" office:value-type="string">
            <text:p text:style-name="P2"><text:span text:style-name="T9">Fonctionnalités sociales, B2B, tests, assurance qualité, documentation</text:span></text:p>
          </table:table-cell>
        </table:table-row>
      </table:table>
      <text:p text:style-name="P4"/>
      <text:h text:style-name="Heading_20_2" text:outline-level="2"><text:bookmark-start text:name="__RefHeading__2106_1459372959"/>Risques identifiés<text:bookmark-end text:name="__RefHeading__2106_1459372959"/></text:h>
      <text:p text:style-name="P14"/>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2"><text:span text:style-name="T16">Risque</text:span></text:p>
          </table:table-cell>
          <table:table-cell table:style-name="Tableau12.A1" office:value-type="string">
            <text:p text:style-name="P2"><text:span text:style-name="T16">Probabilité</text:span></text:p>
          </table:table-cell>
          <table:table-cell table:style-name="Tableau12.A1" office:value-type="string">
            <text:p text:style-name="P2"><text:span text:style-name="T16">Impact</text:span></text:p>
          </table:table-cell>
          <table:table-cell table:style-name="Tableau12.A1" office:value-type="string">
            <text:p text:style-name="P2"><text:span text:style-name="T16">Mitigation</text:span></text:p>
          </table:table-cell>
        </table:table-row>
        <table:table-row table:style-name="Tableau12.1">
          <table:table-cell table:style-name="Tableau12.A2" office:value-type="string">
            <text:p text:style-name="P2"><text:span text:style-name="T9">Compatibilité Isar sur Web/Desktop</text:span></text:p>
          </table:table-cell>
          <table:table-cell table:style-name="Tableau12.A2" office:value-type="string">
            <text:p text:style-name="P2"><text:span text:style-name="T9">Moyenne</text:span></text:p>
          </table:table-cell>
          <table:table-cell table:style-name="Tableau12.A2" office:value-type="string">
            <text:p text:style-name="P2"><text:span text:style-name="T9">Élevé</text:span></text:p>
          </table:table-cell>
          <table:table-cell table:style-name="Tableau12.A2" office:value-type="string">
            <text:p text:style-name="P2"><text:span text:style-name="T9">Prévoir une migration vers Hive CE ou SQLite si nécessaire</text:span></text:p>
          </table:table-cell>
        </table:table-row>
        <table:table-row table:style-name="Tableau12.1">
          <table:table-cell table:style-name="Tableau12.A3" office:value-type="string">
            <text:p text:style-name="P2"><text:span text:style-name="T9">Complexité des APIs transport (SNCF, BlaBlaCar)</text:span></text:p>
          </table:table-cell>
          <table:table-cell table:style-name="Tableau12.A3" office:value-type="string">
            <text:p text:style-name="P2"><text:span text:style-name="T9">Élevée</text:span></text:p>
          </table:table-cell>
          <table:table-cell table:style-name="Tableau12.A3" office:value-type="string">
            <text:p text:style-name="P2"><text:span text:style-name="T9">Moyen</text:span></text:p>
          </table:table-cell>
          <table:table-cell table:style-name="Tableau12.A3" office:value-type="string">
            <text:p text:style-name="P2"><text:span text:style-name="T9">Développer un layer d’abstraction, données mock pour le MVP</text:span></text:p>
          </table:table-cell>
        </table:table-row>
        <table:table-row table:style-name="Tableau12.1">
          <table:table-cell table:style-name="Tableau12.A2" office:value-type="string">
            <text:p text:style-name="P2"><text:span text:style-name="T9">Performance de l’assistant de planification</text:span></text:p>
          </table:table-cell>
          <table:table-cell table:style-name="Tableau12.A2" office:value-type="string">
            <text:p text:style-name="P2"><text:span text:style-name="T9">Moyenne</text:span></text:p>
          </table:table-cell>
          <table:table-cell table:style-name="Tableau12.A2" office:value-type="string">
            <text:p text:style-name="P2"><text:span text:style-name="T9">Moyen</text:span></text:p>
          </table:table-cell>
          <table:table-cell table:style-name="Tableau12.A2" office:value-type="string">
            <text:p text:style-name="P2"><text:span text:style-name="T9">Algorithme incrémental, cache des résultats, limit budgétaire</text:span></text:p>
          </table:table-cell>
        </table:table-row>
        <table:table-row table:style-name="Tableau12.1">
          <table:table-cell table:style-name="Tableau12.A3" office:value-type="string">
            <text:p text:style-name="P2"><text:span text:style-name="T9">Retards de développement</text:span></text:p>
          </table:table-cell>
          <table:table-cell table:style-name="Tableau12.A3" office:value-type="string">
            <text:p text:style-name="P2"><text:span text:style-name="T9">Moyenne</text:span></text:p>
          </table:table-cell>
          <table:table-cell table:style-name="Tableau12.A3" office:value-type="string">
            <text:p text:style-name="P2"><text:span text:style-name="T9">Élevé</text:span></text:p>
          </table:table-cell>
          <table:table-cell table:style-name="Tableau12.A3" office:value-type="string">
            <text:p text:style-name="P2"><text:span text:style-name="T9">Sprints de 2 semaines, revue bi-hebdomadaire, backlog priorisé</text:span></text:p>
          </table:table-cell>
        </table:table-row>
        <table:table-row table:style-name="Tableau12.1">
          <table:table-cell table:style-name="Tableau12.A2" office:value-type="string">
            <text:p text:style-name="P2"><text:span text:style-name="T9">Non-conformité RGPD</text:span></text:p>
          </table:table-cell>
          <table:table-cell table:style-name="Tableau12.A2" office:value-type="string">
            <text:p text:style-name="P2"><text:span text:style-name="T9">Faible</text:span></text:p>
          </table:table-cell>
          <table:table-cell table:style-name="Tableau12.A2" office:value-type="string">
            <text:p text:style-name="P2"><text:span text:style-name="T9">Élevé</text:span></text:p>
          </table:table-cell>
          <table:table-cell table:style-name="Tableau12.A2" office:value-type="string">
            <text:p text:style-name="P2"><text:span text:style-name="T9">Audit RGPD dès la phase de cadrage, </text:span><text:soft-page-break/><text:span text:style-name="T9">Privacy by Design</text:span></text:p>
          </table:table-cell>
        </table:table-row>
        <table:table-row table:style-name="Tableau12.1">
          <table:table-cell table:style-name="Tableau12.A3" office:value-type="string">
            <text:p text:style-name="P2"><text:span text:style-name="T9">Scalabilité Firebase (coûts)</text:span></text:p>
          </table:table-cell>
          <table:table-cell table:style-name="Tableau12.A3" office:value-type="string">
            <text:p text:style-name="P2"><text:span text:style-name="T9">Faible</text:span></text:p>
          </table:table-cell>
          <table:table-cell table:style-name="Tableau12.A3" office:value-type="string">
            <text:p text:style-name="P2"><text:span text:style-name="T9">Moyen</text:span></text:p>
          </table:table-cell>
          <table:table-cell table:style-name="Tableau12.A3" office:value-type="string">
            <text:p text:style-name="P2"><text:span text:style-name="T9">Monitoring Firebase quotidien, plan de migration si &gt;50k MAU</text:span></text:p>
          </table:table-cell>
        </table:table-row>
      </table:table>
      <text:p text:style-name="Standard"/>
      <text:h text:style-name="P19" text:outline-level="1"><text:bookmark-start text:name="__RefHeading__2108_1459372959"/>Annexes<text:bookmark-end text:name="__RefHeading__2108_1459372959"/></text:h>
      <text:p text:style-name="P11"/>
      <text:h text:style-name="Heading_20_2" text:outline-level="2"><text:bookmark-start text:name="__RefHeading__2110_1459372959"/>Références techniques<text:bookmark-end text:name="__RefHeading__2110_1459372959"/></text:h>
      <text:p text:style-name="P14"/>
      <text:list xml:id="list28578749" text:continue-numbering="true" text:style-name="WWNum2">
        <text:list-item>
          <text:p text:style-name="P22"><text:span text:style-name="T11">Flutter : https://flutter.dev</text:span></text:p>
        </text:list-item>
        <text:list-item>
          <text:p text:style-name="P22"><text:span text:style-name="T11">Riverpod : https://riverpod.dev</text:span></text:p>
        </text:list-item>
        <text:list-item>
          <text:p text:style-name="P22"><text:span text:style-name="T11">Isar Database : https://isar.dev</text:span></text:p>
        </text:list-item>
        <text:list-item>
          <text:p text:style-name="P22"><text:span text:style-name="T11">GoRouter : https://pub.dev/packages/go_router</text:span></text:p>
        </text:list-item>
        <text:list-item>
          <text:p text:style-name="P22"><text:span text:style-name="T11">Firebase : https://firebase.google.com</text:span></text:p>
        </text:list-item>
        <text:list-item>
          <text:p text:style-name="P22"><text:span text:style-name="T11">ADEME (facteurs d’émissions) : https://www.ademe.fr</text:span></text:p>
        </text:list-item>
        <text:list-item>
          <text:p text:style-name="P22"><text:span text:style-name="T11">Stripe (paiement) : https://stripe.com</text:span></text:p>
        </text:list-item>
        <text:list-item>
          <text:p text:style-name="P22"><text:span text:style-name="T11">WCAG 2.1 (accessibilité) : https://www.w3.org/WAI/WCAG21/quickref</text:span></text:p>
        </text:list-item>
      </text:list>
      <text:p text:style-name="P4"/>
      <text:h text:style-name="Heading_20_2" text:outline-level="2"><text:bookmark-start text:name="__RefHeading__2112_1459372959"/>Récapitulatif des fonctionnalités (MoSCoW)<text:bookmark-end text:name="__RefHeading__2112_1459372959"/></text:h>
      <text:p text:style-name="P14"/>
      <table:table table:name="Tableau13" table:style-name="Tableau13">
        <table:table-column table:style-name="Tableau13.A"/>
        <table:table-column table:style-name="Tableau13.B"/>
        <table:table-row table:style-name="Tableau13.1">
          <table:table-cell table:style-name="Tableau13.A1" office:value-type="string">
            <text:p text:style-name="P2"><text:span text:style-name="T16">Priorité</text:span></text:p>
          </table:table-cell>
          <table:table-cell table:style-name="Tableau13.A1" office:value-type="string">
            <text:p text:style-name="P2"><text:span text:style-name="T16">Fonctionnalités</text:span></text:p>
          </table:table-cell>
        </table:table-row>
        <table:table-row table:style-name="Tableau13.1">
          <table:table-cell table:style-name="Tableau13.A2" office:value-type="string">
            <text:p text:style-name="P2"><text:span text:style-name="T9">Must Have (MVP)</text:span></text:p>
          </table:table-cell>
          <table:table-cell table:style-name="Tableau13.A2" office:value-type="string">
            <text:p text:style-name="P2"><text:span text:style-name="T9">Billetterie intégrée, QR codes, catalogue avec filtres, recherche, panier, paiement sécurisé, profil utilisateur, mode offline, thème light/dark, i18n FR/EN</text:span></text:p>
          </table:table-cell>
        </table:table-row>
        <table:table-row table:style-name="Tableau13.1">
          <table:table-cell table:style-name="Tableau13.A3" office:value-type="string">
            <text:p text:style-name="P2"><text:span text:style-name="T9">Should Have</text:span></text:p>
          </table:table-cell>
          <table:table-cell table:style-name="Tableau13.A3" office:value-type="string">
            <text:p text:style-name="P2"><text:span text:style-name="T9">Planificateur multimodal, calcul empreinte carbone, éco-score, covoiturage, notifications push, favoris, historique</text:span></text:p>
          </table:table-cell>
        </table:table-row>
        <table:table-row table:style-name="Tableau13.1">
          <table:table-cell table:style-name="Tableau13.A2" office:value-type="string">
            <text:p text:style-name="P2"><text:span text:style-name="T9">Could Have</text:span></text:p>
          </table:table-cell>
          <table:table-cell table:style-name="Tableau13.A2" office:value-type="string">
            <text:p text:style-name="P2"><text:span text:style-name="T9">Hébergement collaboratif, messagerie interne, groupes, fil d’actualité, export PDF/CSV, slow tourisme, badges écologiques</text:span></text:p>
          </table:table-cell>
        </table:table-row>
        <table:table-row table:style-name="Tableau13.1">
          <table:table-cell table:style-name="Tableau13.A3" office:value-type="string">
            <text:p text:style-name="P2"><text:span text:style-name="T9">Won’t Have (V1)</text:span></text:p>
          </table:table-cell>
          <table:table-cell table:style-name="Tableau13.A3" office:value-type="string">
            <text:p text:style-name="P2"><text:span text:style-name="T9">Streaming live, marketplace produits dérivés, comptabilité avancée, intégration contrôle d’accès physique</text:span></text:p>
          </table:table-cell>
        </table:table-row>
      </table:table>
      <text:p text:style-name="P4"/>
      <text:h text:style-name="Heading_20_2" text:outline-level="2"><text:bookmark-start text:name="__RefHeading__2114_1459372959"/>Contacts équipe Neptune<text:bookmark-end text:name="__RefHeading__2114_1459372959"/></text:h>
      <text:p text:style-name="P14"/>
      <text:p text:style-name="P2"><text:span text:style-name="T16">Membre</text:span></text:p>
      <text:p text:style-name="P2"><text:span text:style-name="T16">Rôle</text:span></text:p>
      <text:p text:style-name="P2"><text:span text:style-name="T16">Contact</text:span></text:p>
      <text:p text:style-name="P2"><text:span text:style-name="T9">Tom Farge</text:span></text:p>
      <text:p text:style-name="P2"><text:span text:style-name="T9"/></text:p>
      <text:p text:style-name="P2"><text:span text:style-name="T9">Islem</text:span></text:p>
      <text:p text:style-name="P2"><text:span text:style-name="T9"/></text:p>
      <text:p text:style-name="P2"><text:span text:style-name="T9">Manon</text:span></text:p>
      <text:p text:style-name="P2"><text:span text:style-name="T9"/></text:p>
      <text:p text:style-name="P2"><text:span text:style-name="T9">Seife</text:span></text:p>
      <text:p text:style-name="P2"><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635cm" fo:margin-bottom="0.353cm"/>
      <style:text-properties fo:color="#7c3aed" style:font-name="Arial1" fo:font-size="18pt" fo:font-weight="bold" style:font-name-asian="Arial2" style:font-size-asian="18pt" style:font-weight-asian="bold" style:font-name-complex="Arial2"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494cm" fo:margin-bottom="0.282cm"/>
      <style:text-properties fo:color="#0f172a" style:font-name="Arial1" fo:font-size="15pt" fo:font-weight="bold" style:font-name-asian="Arial2" style:font-size-asian="15pt" style:font-weight-asian="bold" style:font-name-complex="Arial2" style:font-size-complex="15pt" style:font-weight-complex="bold"/>
    </style:style>
    <style:style style:name="Heading_20_3" style:display-name="Heading 3" style:family="paragraph" style:parent-style-name="Heading" style:next-style-name="Text_20_body" style:default-outline-level="3" style:list-style-name="" style:class="text">
      <style:paragraph-properties fo:margin-top="0.423cm" fo:margin-bottom="0.212cm"/>
      <style:text-properties fo:color="#ec4899" style:font-name="Arial1" fo:font-size="13pt" fo:font-weight="bold" style:font-name-asian="Arial2" style:font-size-asian="13pt" style:font-weight-asian="bold" style:font-name-complex="Arial2" style:font-size-complex="13pt" style:font-weight-complex="bold"/>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default-outline-level="" style:list-style-name="">
      <style:paragraph-properties fo:margin-top="0cm" fo:margin-bottom="0cm" fo:line-height="10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353cm" fo:text-align="end" style:justify-single-word="false" fo:padding-left="0cm" fo:padding-right="0cm" fo:padding-top="0cm" fo:padding-bottom="0.212cm" fo:border-left="none" fo:border-right="none" fo:border-top="none" fo:border-bottom="0.009cm solid #7c3aed"/>
    </style:style>
    <style:style style:name="MP2" style:family="paragraph" style:parent-style-name="Standard">
      <style:paragraph-properties fo:text-align="center" style:justify-single-word="false" fo:padding-left="0cm" fo:padding-right="0cm" fo:padding-top="0.212cm" fo:padding-bottom="0cm" fo:border-left="none" fo:border-right="none" fo:border-top="0.004cm solid #e2e8f0" fo:border-bottom="none"/>
    </style:style>
    <style:style style:name="MT1" style:family="text">
      <style:text-properties fo:color="#7c3aed" style:font-name="Arial" fo:font-size="9pt" fo:font-weight="bold" style:font-name-asian="Arial2" style:font-size-asian="9pt" style:font-weight-asian="bold" style:font-name-complex="Arial2" style:font-size-complex="9pt" style:font-weight-complex="bold"/>
    </style:style>
    <style:style style:name="MT2" style:family="text">
      <style:text-properties fo:color="#94a3b8" style:font-name="Arial" fo:font-size="8pt" style:font-name-asian="Arial2" style:font-size-asian="8pt" style:font-name-complex="Arial2" style:font-size-complex="8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text:span text:style-name="MT1">PULSAR</text:span><text:span text:style-name="MT2"> <text:s text:c="2"/>Cahier des Charges Fonctionnel et Technique</text:span></text:p>
      </style:header>
      <style:footer>
        <text:p text:style-name="MP2"><text:span text:style-name="MT2">Équipe Neptune <text:s text:c="2"/>Document confidentiel <text:s text:c="2"/>Page </text:span><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meta:editing-cycles>1</meta:editing-cycles>
    <meta:creation-date>2026-05-20T20:21:28.70</meta:creation-date>
    <dc:date>2026-05-26T08:30:02.78</dc:date>
    <meta:document-statistic meta:table-count="12" meta:image-count="0" meta:object-count="0" meta:page-count="25" meta:paragraph-count="708" meta:word-count="5291" meta:character-count="36576"/>
    <meta:generator>OpenOffice/4.1.14$Win32 OpenOffice.org_project/4114m1$Build-9811</meta:generator>
  </office:meta>
</office:document-meta>
</file>