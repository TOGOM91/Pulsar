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60000006DA72FBD4DF.png"/>
  <manifest:file-entry manifest:media-type="image/png" manifest:full-path="Pictures/1000020100000960000007085420D367.png"/>
  <manifest:file-entry manifest:media-type="image/png" manifest:full-path="Pictures/100002010000096000000C8072C9976B.png"/>
  <manifest:file-entry manifest:media-type="image/png" manifest:full-path="Pictures/100000000000096000000708F0843942.png"/>
  <manifest:file-entry manifest:media-type="image/png" manifest:full-path="Pictures/100002010000096000000D201C0A9194.png"/>
  <manifest:file-entry manifest:media-type="image/png" manifest:full-path="Pictures/1000020100000960000006A4278DD49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f172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solid" svg:stroke-width="0.035cm" svg:stroke-color="#7c3aed" draw:fill="solid" draw:fill-color="#7c3aed"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3" style:family="graphic" style:parent-style-name="standard">
      <style:graphic-properties draw:stroke="solid" svg:stroke-width="0.035cm" svg:stroke-color="#ede9fe" draw:fill="solid" draw:fill-color="#1e293b"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solid" svg:stroke-width="0.053cm" svg:stroke-color="#ef4444" draw:fill="solid" draw:fill-color="#fff1f2"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ef4444" draw:fill="solid" draw:fill-color="#ef4444"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10b981" draw:fill="solid" draw:fill-color="#f0fdf4"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10b981" draw:fill="solid" draw:fill-color="#10b981"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ede9fe" draw:fill="solid" draw:fill-color="#ede9fe"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004586" draw:fill="solid" draw:fill-color="#ffffff"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004586" draw:fill="solid" draw:fill-color="#004586" draw:auto-grow-height="false" fo:min-height="0cm" fo:min-width="0cm" fo:padding-top="0.125cm" fo:padding-bottom="0.125cm" fo:padding-left="0.25cm" fo:padding-right="0.25cm" fo:wrap-option="wrap"/>
    </style:style>
    <style:style style:name="gr12"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53cm" svg:stroke-color="#7c3aed" draw:fill="solid" draw:fill-color="#ffffff"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ec4899" draw:fill="solid" draw:fill-color="#ffffff"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ec4899" draw:fill="solid" draw:fill-color="#ec4899"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10b981" draw:fill="solid" draw:fill-color="#ffffff"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3b82f6" draw:fill="solid" draw:fill-color="#ffffff"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3b82f6" draw:fill="solid" draw:fill-color="#3b82f6"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53cm" svg:stroke-color="#f59e0b" draw:fill="solid" draw:fill-color="#ffffff"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f59e0b" draw:fill="solid" draw:fill-color="#f59e0b"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7c3aed" draw:fill="solid" draw:fill-color="#ede9fe"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f59e0b" draw:fill="solid" draw:fill-color="#fef3c7"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e2e8f0" draw:fill="solid" draw:fill-color="#e2e8f0"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53cm" svg:stroke-color="#0f172a" draw:fill="solid" draw:fill-color="#ffffff"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0f172a" draw:fill="solid" draw:fill-color="#0f172a"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10b981" draw:fill="solid" draw:fill-color="#d1fae5"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10b981" draw:fill="solid" draw:fill-color="#1e293b" draw:auto-grow-height="false" fo:min-height="0cm" fo:min-width="0cm" fo:padding-top="0.125cm" fo:padding-bottom="0.125cm" fo:padding-left="0.25cm" fo:padding-right="0.25cm" fo:wrap-option="wrap"/>
    </style:style>
    <style:style style:name="pr1"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text-align="center"/>
      <style:text-properties fo:font-size="18pt"/>
    </style:style>
    <style:style style:name="T1" style:family="text">
      <style:text-properties fo:color="#000000" style:text-line-through-style="none" fo:font-family="Calibri" fo:font-size="68pt" fo:letter-spacing="normal" fo:font-style="normal" style:text-underline-style="none" fo:font-weight="bold" style:font-size-asian="68pt" style:font-style-asian="normal" style:font-weight-asian="bold" style:font-size-complex="68pt" style:font-style-complex="normal" style:font-weight-complex="bold"/>
    </style:style>
    <style:style style:name="T2"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000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0"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12"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color="#000000" style:text-line-through-style="none" fo:font-family="Calibri"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5" style:family="text">
      <style:text-properties fo:color="#000000" style:text-line-through-style="none" fo:font-family="Calibri" fo:font-size="9.5pt" fo:letter-spacing="normal" fo:font-style="normal" style:text-underline-style="none" fo:font-weight="normal" style:font-size-asian="9.5pt" style:font-style-asian="normal" style:font-weight-asian="normal" style:font-size-complex="9.5pt" style:font-style-complex="normal" style:font-weight-complex="normal"/>
    </style:style>
    <style:style style:name="T16"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7"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1" style:family="text">
      <style:text-properties fo:color="#000000" style:text-line-through-style="none" fo:font-family="Calibri" fo:font-size="9.5pt" fo:letter-spacing="normal" fo:font-style="italic" style:text-underline-style="none" fo:font-weight="normal" style:font-size-asian="9.5pt" style:font-style-asian="italic" style:font-weight-asian="normal" style:font-size-complex="9.5pt" style:font-style-complex="italic" style:font-weight-complex="normal"/>
    </style:style>
    <style:style style:name="T22"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text:list-style style:name="L1">
      <text:list-level-style-number text:level="1" style:num-format="">
        <style:list-level-properties text:min-label-width="0.6cm"/>
        <style:text-properties fo:color="#7c3aed"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c48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94a3b8"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f172a"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334155"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0b981"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b82f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59e0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92400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65f4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 1" draw:style-name="dp1" draw:master-page-name="Standard">
        <draw:custom-shape draw:name="Shape 0" draw:style-name="gr1" draw:text-style-name="P1" draw:layer="layout" svg:width="0.253cm" svg:height="14.287cm" svg:x="0cm" svg:y="0cm">
          <text:p/>
          <draw:enhanced-geometry svg:viewBox="0 0 21600 21600" draw:type="rectangle" draw:enhanced-path="M 0 0 L 21600 0 21600 21600 0 21600 0 0 Z N"/>
        </draw:custom-shape>
        <draw:custom-shape draw:name="Text 1" draw:style-name="gr2" draw:text-style-name="P3" draw:layer="layout" svg:width="23.621cm" svg:height="2.539cm" svg:x="0.889cm" svg:y="3.302cm">
          <text:p text:style-name="P2"><text:span text:style-name="T1">PULSAR</text:span></text:p>
          <draw:enhanced-geometry svg:viewBox="0 0 21600 21600" draw:type="rectangle" draw:enhanced-path="M 0 0 L 21600 0 21600 21600 0 21600 0 0 Z N"/>
        </draw:custom-shape>
        <draw:custom-shape draw:name="Text 2" draw:style-name="gr2" draw:text-style-name="P3" draw:layer="layout" svg:width="12.699cm" svg:height="1.142cm" svg:x="0.889cm" svg:y="5.969cm">
          <text:p text:style-name="P2"><text:span text:style-name="T2">by Neptune</text:span></text:p>
          <draw:enhanced-geometry svg:viewBox="0 0 21600 21600" draw:type="rectangle" draw:enhanced-path="M 0 0 L 21600 0 21600 21600 0 21600 0 0 Z N"/>
        </draw:custom-shape>
        <draw:custom-shape draw:name="Text 3" draw:style-name="gr2" draw:text-style-name="P3" draw:layer="layout" svg:width="16.509cm" svg:height="0.964cm" svg:x="0.889cm" svg:y="7.315cm">
          <text:p text:style-name="P2"><text:span text:style-name="T3">Application mobile de billetterie événementielle éco-responsable</text:span></text:p>
          <draw:enhanced-geometry svg:viewBox="0 0 21600 21600" draw:type="rectangle" draw:enhanced-path="M 0 0 L 21600 0 21600 21600 0 21600 0 0 Z N"/>
        </draw:custom-shape>
        <draw:custom-shape draw:name="Shape 4" draw:style-name="gr3" draw:text-style-name="P1" draw:layer="layout" svg:width="6.603cm" svg:height="6.603cm" svg:x="18.288cm" svg:y="3.302cm">
          <text:p/>
          <draw:enhanced-geometry svg:viewBox="0 0 21600 21600" draw:type="rectangle" draw:enhanced-path="M 0 0 L 21600 0 21600 21600 0 21600 0 0 Z N"/>
        </draw:custom-shape>
        <draw:custom-shape draw:name="Text 5" draw:style-name="gr2" draw:text-style-name="P3" draw:layer="layout" svg:width="6.095cm" svg:height="0.761cm" svg:x="18.542cm" svg:y="3.683cm">
          <text:p text:style-name="P2"><text:span text:style-name="T4">Équipe Neptune</text:span></text:p>
          <draw:enhanced-geometry svg:viewBox="0 0 21600 21600" draw:type="rectangle" draw:enhanced-path="M 0 0 L 21600 0 21600 21600 0 21600 0 0 Z N"/>
        </draw:custom-shape>
        <draw:custom-shape draw:name="Text 6" draw:style-name="gr2" draw:text-style-name="P3" draw:layer="layout" svg:width="6.095cm" svg:height="0.659cm" svg:x="18.542cm" svg:y="4.623cm">
          <text:p text:style-name="P2"><text:span text:style-name="T5">• </text:span><text:span text:style-name="T5">Tom Farge</text:span></text:p>
          <draw:enhanced-geometry svg:viewBox="0 0 21600 21600" draw:type="rectangle" draw:enhanced-path="M 0 0 L 21600 0 21600 21600 0 21600 0 0 Z N"/>
        </draw:custom-shape>
        <draw:custom-shape draw:name="Text 7" draw:style-name="gr2" draw:text-style-name="P3" draw:layer="layout" svg:width="6.095cm" svg:height="0.659cm" svg:x="18.542cm" svg:y="5.334cm">
          <text:p text:style-name="P2"><text:span text:style-name="T5">• </text:span><text:span text:style-name="T5">Islem</text:span></text:p>
          <draw:enhanced-geometry svg:viewBox="0 0 21600 21600" draw:type="rectangle" draw:enhanced-path="M 0 0 L 21600 0 21600 21600 0 21600 0 0 Z N"/>
        </draw:custom-shape>
        <draw:custom-shape draw:name="Text 8" draw:style-name="gr2" draw:text-style-name="P3" draw:layer="layout" svg:width="6.095cm" svg:height="0.659cm" svg:x="18.542cm" svg:y="6.045cm">
          <text:p text:style-name="P2"><text:span text:style-name="T5">• </text:span><text:span text:style-name="T5">Manon</text:span></text:p>
          <draw:enhanced-geometry svg:viewBox="0 0 21600 21600" draw:type="rectangle" draw:enhanced-path="M 0 0 L 21600 0 21600 21600 0 21600 0 0 Z N"/>
        </draw:custom-shape>
        <draw:custom-shape draw:name="Text 9" draw:style-name="gr2" draw:text-style-name="P3" draw:layer="layout" svg:width="6.095cm" svg:height="0.659cm" svg:x="18.542cm" svg:y="6.756cm">
          <text:p text:style-name="P2"><text:span text:style-name="T5">• </text:span><text:span text:style-name="T5">Seife</text:span></text:p>
          <draw:enhanced-geometry svg:viewBox="0 0 21600 21600" draw:type="rectangle" draw:enhanced-path="M 0 0 L 21600 0 21600 21600 0 21600 0 0 Z N"/>
        </draw:custom-shape>
        <draw:custom-shape draw:name="Text 10" draw:style-name="gr2" draw:text-style-name="P3" draw:layer="layout" svg:width="6.095cm" svg:height="0.558cm" svg:x="18.542cm" svg:y="9.271cm">
          <text:p text:style-name="P2"><text:span text:style-name="T6">Bac+3 — Mai 2026</text:span></text:p>
          <draw:enhanced-geometry svg:viewBox="0 0 21600 21600" draw:type="rectangle" draw:enhanced-path="M 0 0 L 21600 0 21600 21600 0 21600 0 0 Z N"/>
        </draw:custom-shape>
        <draw:custom-shape draw:name="Shape 11" draw:style-name="gr1" draw:text-style-name="P1" draw:layer="layout" svg:width="5.079cm" svg:height="0.913cm" svg:x="0.889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2" draw:style-name="gr2" draw:text-style-name="P3" draw:layer="layout" svg:width="5.079cm" svg:height="0.913cm" svg:x="0.889cm" svg:y="12.827cm">
          <text:p text:style-name="P4"><text:span text:style-name="T7">Flutter</text:span></text:p>
          <draw:enhanced-geometry svg:viewBox="0 0 21600 21600" draw:type="rectangle" draw:enhanced-path="M 0 0 L 21600 0 21600 21600 0 21600 0 0 Z N"/>
        </draw:custom-shape>
        <draw:custom-shape draw:name="Shape 13" draw:style-name="gr1" draw:text-style-name="P1" draw:layer="layout" svg:width="5.079cm" svg:height="0.913cm" svg:x="5.08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4" draw:style-name="gr2" draw:text-style-name="P3" draw:layer="layout" svg:width="5.079cm" svg:height="0.913cm" svg:x="5.08cm" svg:y="12.827cm">
          <text:p text:style-name="P4"><text:span text:style-name="T7">Firebase</text:span></text:p>
          <draw:enhanced-geometry svg:viewBox="0 0 21600 21600" draw:type="rectangle" draw:enhanced-path="M 0 0 L 21600 0 21600 21600 0 21600 0 0 Z N"/>
        </draw:custom-shape>
        <draw:custom-shape draw:name="Shape 15" draw:style-name="gr1" draw:text-style-name="P1" draw:layer="layout" svg:width="5.079cm" svg:height="0.913cm" svg:x="9.271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6" draw:style-name="gr2" draw:text-style-name="P3" draw:layer="layout" svg:width="5.079cm" svg:height="0.913cm" svg:x="9.271cm" svg:y="12.827cm">
          <text:p text:style-name="P4"><text:span text:style-name="T7">Stripe</text:span></text:p>
          <draw:enhanced-geometry svg:viewBox="0 0 21600 21600" draw:type="rectangle" draw:enhanced-path="M 0 0 L 21600 0 21600 21600 0 21600 0 0 Z N"/>
        </draw:custom-shape>
        <draw:custom-shape draw:name="Shape 17" draw:style-name="gr1" draw:text-style-name="P1" draw:layer="layout" svg:width="5.079cm" svg:height="0.913cm" svg:x="13.462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8" draw:style-name="gr2" draw:text-style-name="P3" draw:layer="layout" svg:width="5.079cm" svg:height="0.913cm" svg:x="13.462cm" svg:y="12.827cm">
          <text:p text:style-name="P4"><text:span text:style-name="T7">Isar</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1.905cm" svg:y="3.175cm" draw:page-number="1" presentation:class="page"/>
          <draw:frame draw:name="Notes Placeholder 2" presentation:style-name="pr1" draw:text-style-name="P3" draw:layer="layout" svg:width="15.239cm" svg:height="10cm" svg:x="1.905cm" svg:y="12.224cm" presentation:class="notes" presentation:user-transformed="true">
            <draw:text-box>
              <text:p><text:span text:style-name="T8">SLIDE 1 — TITRE (20 sec)</text:span></text:p>
              <text:p><text:span text:style-name="T8"/></text:p>
              <text:p><text:span text:style-name="T8">CE QUE TU DIS :</text:span></text:p>
              <text:p><text:span text:style-name="T8">"Bonjour. Je m'appelle [Prénom], je fais partie de l'équipe Neptune. On va vous présenter Pulsar, une application mobile de billetterie événementielle. Je vais vous montrer les diagrammes qu'on a produits et les choix qu'on a faits."</text:span></text:p>
              <text:p><text:span text:style-name="T8"/></text:p>
              <text:p><text:span text:style-name="T8">NE PAS DIRE :</text:span></text:p>
              <text:p><text:span text:style-name="T8">- Ne pas mentionner Clean Architecture, Riverpod, Freezed dès le titre</text:span></text:p>
              <text:p><text:span text:style-name="T8">- Ne pas énumérer la stack technique ici</text:span></text:p>
              <text:p><text:span text:style-name="T8"/></text:p>
              <text:p><text:span text:style-name="T8">TRANSITION :</text:span></text:p>
              <text:p><text:span text:style-name="T8">"Commençons par le problème qu'on cherche à résoudr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2" draw:style-name="dp3" draw:master-page-name="Standard">
        <draw:custom-shape draw:name="Text 0" draw:style-name="gr2" draw:text-style-name="P3" draw:layer="layout" svg:width="22.859cm" svg:height="1.32cm" svg:x="1.27cm" svg:y="0.559cm">
          <text:p text:style-name="P2"><text:span text:style-name="T10">Le problème qu'on résout</text:span></text:p>
          <draw:enhanced-geometry svg:viewBox="0 0 21600 21600" draw:type="rectangle" draw:enhanced-path="M 0 0 L 21600 0 21600 21600 0 21600 0 0 Z N"/>
        </draw:custom-shape>
        <draw:custom-shape draw:name="Shape 1" draw:style-name="gr5" draw:text-style-name="P1" draw:layer="layout" svg:width="10.667cm" svg:height="8.889cm" svg:x="1.27cm" svg:y="2.235cm">
          <text:p/>
          <draw:enhanced-geometry svg:viewBox="0 0 21600 21600" draw:type="rectangle" draw:enhanced-path="M 0 0 L 21600 0 21600 21600 0 21600 0 0 Z N"/>
        </draw:custom-shape>
        <draw:custom-shape draw:name="Shape 2" draw:style-name="gr6" draw:text-style-name="P1" draw:layer="layout" svg:width="10.667cm" svg:height="1.117cm" svg:x="1.27cm" svg:y="2.235cm">
          <text:p/>
          <draw:enhanced-geometry svg:viewBox="0 0 21600 21600" draw:type="rectangle" draw:enhanced-path="M 0 0 L 21600 0 21600 21600 0 21600 0 0 Z N"/>
        </draw:custom-shape>
        <draw:custom-shape draw:name="Text 3" draw:style-name="gr2" draw:text-style-name="P3" draw:layer="layout" svg:width="10.159cm" svg:height="1.015cm" svg:x="1.524cm" svg:y="2.286cm">
          <text:p text:style-name="P2"><text:span text:style-name="T11">Le problème aujourd'hui</text:span></text:p>
          <draw:enhanced-geometry svg:viewBox="0 0 21600 21600" draw:type="rectangle" draw:enhanced-path="M 0 0 L 21600 0 21600 21600 0 21600 0 0 Z N"/>
        </draw:custom-shape>
        <draw:custom-shape draw:name="Text 4" draw:style-name="gr2" draw:text-style-name="P3" draw:layer="layout" svg:width="9.905cm" svg:height="1.929cm" svg:x="1.651cm" svg:y="3.607cm">
          <text:p text:style-name="P2"><text:span text:style-name="T12">✗ <text:s/></text:span><text:span text:style-name="T12">Pour aller à un concert, il faut</text:span></text:p>
          <text:p text:style-name="P2"><text:span text:style-name="T12">4-5 applications différentes</text:span></text:p>
          <draw:enhanced-geometry svg:viewBox="0 0 21600 21600" draw:type="rectangle" draw:enhanced-path="M 0 0 L 21600 0 21600 21600 0 21600 0 0 Z N"/>
        </draw:custom-shape>
        <draw:custom-shape draw:name="Text 5" draw:style-name="gr2" draw:text-style-name="P3" draw:layer="layout" svg:width="9.905cm" svg:height="1.929cm" svg:x="1.651cm" svg:y="5.842cm">
          <text:p text:style-name="P2"><text:span text:style-name="T12">✗ <text:s/></text:span><text:span text:style-name="T12">Aucune app ne calcule l'impact</text:span></text:p>
          <text:p text:style-name="P2"><text:span text:style-name="T12">carbone du trajet</text:span></text:p>
          <draw:enhanced-geometry svg:viewBox="0 0 21600 21600" draw:type="rectangle" draw:enhanced-path="M 0 0 L 21600 0 21600 21600 0 21600 0 0 Z N"/>
        </draw:custom-shape>
        <draw:custom-shape draw:name="Text 6" draw:style-name="gr2" draw:text-style-name="P3" draw:layer="layout" svg:width="9.905cm" svg:height="1.929cm" svg:x="1.651cm" svg:y="8.077cm">
          <text:p text:style-name="P2"><text:span text:style-name="T12">✗ <text:s/></text:span><text:span text:style-name="T12">Les billets ne marchent pas</text:span></text:p>
          <text:p text:style-name="P2"><text:span text:style-name="T12">sans connexion internet</text:span></text:p>
          <draw:enhanced-geometry svg:viewBox="0 0 21600 21600" draw:type="rectangle" draw:enhanced-path="M 0 0 L 21600 0 21600 21600 0 21600 0 0 Z N"/>
        </draw:custom-shape>
        <draw:custom-shape draw:name="Text 7" draw:style-name="gr2" draw:text-style-name="P3" draw:layer="layout" svg:width="1.777cm" svg:height="1.523cm" svg:x="12.192cm" svg:y="6.096cm">
          <text:p text:style-name="P4"><text:span text:style-name="T10">→</text:span></text:p>
          <draw:enhanced-geometry svg:viewBox="0 0 21600 21600" draw:type="rectangle" draw:enhanced-path="M 0 0 L 21600 0 21600 21600 0 21600 0 0 Z N"/>
        </draw:custom-shape>
        <draw:custom-shape draw:name="Shape 8" draw:style-name="gr7" draw:text-style-name="P1" draw:layer="layout" svg:width="10.667cm" svg:height="8.889cm" svg:x="14.224cm" svg:y="2.235cm">
          <text:p/>
          <draw:enhanced-geometry svg:viewBox="0 0 21600 21600" draw:type="rectangle" draw:enhanced-path="M 0 0 L 21600 0 21600 21600 0 21600 0 0 Z N"/>
        </draw:custom-shape>
        <draw:custom-shape draw:name="Shape 9" draw:style-name="gr8" draw:text-style-name="P1" draw:layer="layout" svg:width="10.667cm" svg:height="1.117cm" svg:x="14.224cm" svg:y="2.235cm">
          <text:p/>
          <draw:enhanced-geometry svg:viewBox="0 0 21600 21600" draw:type="rectangle" draw:enhanced-path="M 0 0 L 21600 0 21600 21600 0 21600 0 0 Z N"/>
        </draw:custom-shape>
        <draw:custom-shape draw:name="Text 10" draw:style-name="gr2" draw:text-style-name="P3" draw:layer="layout" svg:width="10.159cm" svg:height="1.015cm" svg:x="14.478cm" svg:y="2.286cm">
          <text:p text:style-name="P2"><text:span text:style-name="T11">Ce que fait Pulsar</text:span></text:p>
          <draw:enhanced-geometry svg:viewBox="0 0 21600 21600" draw:type="rectangle" draw:enhanced-path="M 0 0 L 21600 0 21600 21600 0 21600 0 0 Z N"/>
        </draw:custom-shape>
        <draw:custom-shape draw:name="Text 11" draw:style-name="gr2" draw:text-style-name="P3" draw:layer="layout" svg:width="9.905cm" svg:height="1.929cm" svg:x="14.605cm" svg:y="3.607cm">
          <text:p text:style-name="P2"><text:span text:style-name="T12">✓ <text:s/></text:span><text:span text:style-name="T12">Billet + Transport + Hébergement</text:span></text:p>
          <text:p text:style-name="P2"><text:span text:style-name="T12">dans une seule application</text:span></text:p>
          <draw:enhanced-geometry svg:viewBox="0 0 21600 21600" draw:type="rectangle" draw:enhanced-path="M 0 0 L 21600 0 21600 21600 0 21600 0 0 Z N"/>
        </draw:custom-shape>
        <draw:custom-shape draw:name="Text 12" draw:style-name="gr2" draw:text-style-name="P3" draw:layer="layout" svg:width="9.905cm" svg:height="1.929cm" svg:x="14.605cm" svg:y="5.842cm">
          <text:p text:style-name="P2"><text:span text:style-name="T12">✓ <text:s/></text:span><text:span text:style-name="T12">Calcul automatique de l'empreinte</text:span></text:p>
          <text:p text:style-name="P2"><text:span text:style-name="T12">carbone (référentiels ADEME)</text:span></text:p>
          <draw:enhanced-geometry svg:viewBox="0 0 21600 21600" draw:type="rectangle" draw:enhanced-path="M 0 0 L 21600 0 21600 21600 0 21600 0 0 Z N"/>
        </draw:custom-shape>
        <draw:custom-shape draw:name="Text 13" draw:style-name="gr2" draw:text-style-name="P3" draw:layer="layout" svg:width="9.905cm" svg:height="1.929cm" svg:x="14.605cm" svg:y="8.077cm">
          <text:p text:style-name="P2"><text:span text:style-name="T12">✓ <text:s/></text:span><text:span text:style-name="T12">Billets accessibles sans réseau</text:span></text:p>
          <text:p text:style-name="P2"><text:span text:style-name="T12">(QR code stocké sur le téléphone)</text:span></text:p>
          <draw:enhanced-geometry svg:viewBox="0 0 21600 21600" draw:type="rectangle" draw:enhanced-path="M 0 0 L 21600 0 21600 21600 0 21600 0 0 Z N"/>
        </draw:custom-shape>
        <draw:custom-shape draw:name="Shape 14" draw:style-name="gr9" draw:text-style-name="P1" draw:layer="layout" svg:width="23.367cm" svg:height="1.066cm" svg:x="1.27cm" svg:y="11.532cm">
          <text:p/>
          <draw:enhanced-geometry svg:viewBox="0 0 21600 21600" draw:type="rectangle" draw:enhanced-path="M 0 0 L 21600 0 21600 21600 0 21600 0 0 Z N"/>
        </draw:custom-shape>
        <draw:custom-shape draw:name="Text 15" draw:style-name="gr2" draw:text-style-name="P3" draw:layer="layout" svg:width="22.859cm" svg:height="0.964cm" svg:x="1.524cm" svg:y="11.582cm">
          <text:p text:style-name="P4"><text:span text:style-name="T6">Cibles : Android · iOS · Web <text:s text:c="2"/>— <text:s text:c="2"/>Stack principale : Flutter + Firebase + Stripe</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1.905cm" svg:y="3.175cm" draw:page-number="2" presentation:class="page"/>
          <draw:frame draw:name="Notes Placeholder 2" presentation:style-name="pr1" draw:text-style-name="P3" draw:layer="layout" svg:width="15.239cm" svg:height="10cm" svg:x="1.905cm" svg:y="12.224cm" presentation:class="notes" presentation:user-transformed="true">
            <draw:text-box>
              <text:p><text:span text:style-name="T8">SLIDE 2 — PROBLÈME/SOLUTION (45 sec)</text:span></text:p>
              <text:p><text:span text:style-name="T8"/></text:p>
              <text:p><text:span text:style-name="T8">CE QUE TU DIS :</text:span></text:p>
              <text:p><text:span text:style-name="T8">"Aujourd'hui, pour organiser une sortie à un concert, il faut Shotgun pour le billet, Google Maps pour le trajet, Booking pour l'hôtel. Trois apps différentes, trois parcours séparés. Pulsar regroupe tout ça en une seule application. Et en plus, il calcule automatiquement l'impact carbone de ton déplacement."</text:span></text:p>
              <text:p><text:span text:style-name="T8"/></text:p>
              <text:p><text:span text:style-name="T8">POINT IMPORTANT À MENTIONNER :</text:span></text:p>
              <text:p><text:span text:style-name="T8">"Les billets QR sont stockés directement sur le téléphone, donc ils fonctionnent même sans réseau — utile dans un festival en zone blanche."</text:span></text:p>
              <text:p><text:span text:style-name="T8"/></text:p>
              <text:p><text:span text:style-name="T8">QUESTIONS POSSIBLES :</text:span></text:p>
              <text:p><text:span text:style-name="T8">Q : En quoi c'est différent de Shotgun ?</text:span></text:p>
              <text:p><text:span text:style-name="T8">R : "Shotgun ne fait que la billetterie. Pulsar fait billet + transport + hébergement dans le même parcours, avec le calcul CO₂."</text:span></text:p>
              <text:p><text:span text:style-name="T8"/></text:p>
              <text:p><text:span text:style-name="T8">Q : C'est une vraie application ?</text:span></text:p>
              <text:p><text:span text:style-name="T8">R : "C'est un projet de formation complet avec architecture, CDC de 60 user stories, et base de code Flutter fonctionnell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3" draw:style-name="dp3" draw:master-page-name="Standard">
        <draw:custom-shape draw:name="Text 0" draw:style-name="gr2" draw:text-style-name="P3" draw:layer="layout" svg:width="22.859cm" svg:height="1.32cm" svg:x="1.27cm" svg:y="0.559cm">
          <text:p text:style-name="P2"><text:span text:style-name="T10">Nos choix techniques — et pourquoi</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93cm">
          <text:p text:style-name="P2"><text:span text:style-name="T12">4 décisions importantes, chacune justifiée par une contrainte concrète</text:span></text:p>
          <draw:enhanced-geometry svg:viewBox="0 0 21600 21600" draw:type="rectangle" draw:enhanced-path="M 0 0 L 21600 0 21600 21600 0 21600 0 0 Z N"/>
        </draw:custom-shape>
        <draw:custom-shape draw:name="Shape 2" draw:style-name="gr10" draw:text-style-name="P1" draw:layer="layout" svg:width="11.429cm" svg:height="4.825cm" svg:x="1.016cm" svg:y="2.794cm">
          <text:p/>
          <draw:enhanced-geometry svg:viewBox="0 0 21600 21600" draw:type="rectangle" draw:enhanced-path="M 0 0 L 21600 0 21600 21600 0 21600 0 0 Z N"/>
        </draw:custom-shape>
        <draw:custom-shape draw:name="Shape 3" draw:style-name="gr11" draw:text-style-name="P1" draw:layer="layout" svg:width="11.429cm" svg:height="1.117cm" svg:x="1.016cm" svg:y="2.794cm">
          <text:p/>
          <draw:enhanced-geometry svg:viewBox="0 0 21600 21600" draw:type="rectangle" draw:enhanced-path="M 0 0 L 21600 0 21600 21600 0 21600 0 0 Z N"/>
        </draw:custom-shape>
        <draw:custom-shape draw:name="Text 4" draw:style-name="gr2" draw:text-style-name="P3" draw:layer="layout" svg:width="10.921cm" svg:height="0.913cm" svg:x="1.27cm" svg:y="2.921cm">
          <text:p text:style-name="P2"><text:span text:style-name="T11"><text:s text:c="2"/></text:span><text:span text:style-name="T11">Flutter</text:span></text:p>
          <draw:enhanced-geometry svg:viewBox="0 0 21600 21600" draw:type="rectangle" draw:enhanced-path="M 0 0 L 21600 0 21600 21600 0 21600 0 0 Z N"/>
        </draw:custom-shape>
        <draw:custom-shape draw:name="Text 5" draw:style-name="gr2" draw:text-style-name="P3" draw:layer="layout" svg:width="10.667cm" svg:height="1.777cm" svg:x="1.397cm" svg:y="4.191cm">
          <text:p text:style-name="P2"><text:span text:style-name="T5">1 seul dev. Flutter permet de faire Android + iOS + Web avec un seul code.</text:span></text:p>
          <draw:enhanced-geometry svg:viewBox="0 0 21600 21600" draw:type="rectangle" draw:enhanced-path="M 0 0 L 21600 0 21600 21600 0 21600 0 0 Z N"/>
        </draw:custom-shape>
        <draw:custom-shape draw:name="Text 6" draw:style-name="gr2" draw:text-style-name="P3" draw:layer="layout" svg:width="10.667cm" svg:height="1.269cm" svg:x="1.397cm" svg:y="6.096cm">
          <text:p text:style-name="P2"><text:span text:style-name="T13">Sinon : 3 équipes séparées, impossible à notre taille.</text:span></text:p>
          <draw:enhanced-geometry svg:viewBox="0 0 21600 21600" draw:type="rectangle" draw:enhanced-path="M 0 0 L 21600 0 21600 21600 0 21600 0 0 Z N"/>
        </draw:custom-shape>
        <draw:custom-shape draw:name="Shape 7" draw:style-name="gr10" draw:text-style-name="P1" draw:layer="layout" svg:width="11.429cm" svg:height="4.825cm" svg:x="13.208cm" svg:y="2.794cm">
          <text:p/>
          <draw:enhanced-geometry svg:viewBox="0 0 21600 21600" draw:type="rectangle" draw:enhanced-path="M 0 0 L 21600 0 21600 21600 0 21600 0 0 Z N"/>
        </draw:custom-shape>
        <draw:custom-shape draw:name="Shape 8" draw:style-name="gr11" draw:text-style-name="P1" draw:layer="layout" svg:width="11.429cm" svg:height="1.117cm" svg:x="13.208cm" svg:y="2.794cm">
          <text:p/>
          <draw:enhanced-geometry svg:viewBox="0 0 21600 21600" draw:type="rectangle" draw:enhanced-path="M 0 0 L 21600 0 21600 21600 0 21600 0 0 Z N"/>
        </draw:custom-shape>
        <draw:custom-shape draw:name="Text 9" draw:style-name="gr2" draw:text-style-name="P3" draw:layer="layout" svg:width="10.921cm" svg:height="0.913cm" svg:x="13.462cm" svg:y="2.921cm">
          <text:p text:style-name="P2"><text:span text:style-name="T11"><text:s/></text:span><text:span text:style-name="T11">Isar (base locale)</text:span></text:p>
          <draw:enhanced-geometry svg:viewBox="0 0 21600 21600" draw:type="rectangle" draw:enhanced-path="M 0 0 L 21600 0 21600 21600 0 21600 0 0 Z N"/>
        </draw:custom-shape>
        <draw:custom-shape draw:name="Text 10" draw:style-name="gr2" draw:text-style-name="P3" draw:layer="layout" svg:width="10.667cm" svg:height="1.777cm" svg:x="13.589cm" svg:y="4.191cm">
          <text:p text:style-name="P2"><text:span text:style-name="T5">Les billets doivent être lisibles SANS internet. Isar stocke tout sur le téléphone.</text:span></text:p>
          <draw:enhanced-geometry svg:viewBox="0 0 21600 21600" draw:type="rectangle" draw:enhanced-path="M 0 0 L 21600 0 21600 21600 0 21600 0 0 Z N"/>
        </draw:custom-shape>
        <draw:custom-shape draw:name="Text 11" draw:style-name="gr2" draw:text-style-name="P3" draw:layer="layout" svg:width="10.667cm" svg:height="1.269cm" svg:x="13.589cm" svg:y="6.096cm">
          <text:p text:style-name="P2"><text:span text:style-name="T13">SQLite aurait marché aussi, on a choisi Isar pour sa rapidité.</text:span></text:p>
          <draw:enhanced-geometry svg:viewBox="0 0 21600 21600" draw:type="rectangle" draw:enhanced-path="M 0 0 L 21600 0 21600 21600 0 21600 0 0 Z N"/>
        </draw:custom-shape>
        <draw:custom-shape draw:name="Shape 12" draw:style-name="gr10" draw:text-style-name="P1" draw:layer="layout" svg:width="11.429cm" svg:height="4.825cm" svg:x="1.016cm" svg:y="8.128cm">
          <text:p/>
          <draw:enhanced-geometry svg:viewBox="0 0 21600 21600" draw:type="rectangle" draw:enhanced-path="M 0 0 L 21600 0 21600 21600 0 21600 0 0 Z N"/>
        </draw:custom-shape>
        <draw:custom-shape draw:name="Shape 13" draw:style-name="gr11" draw:text-style-name="P1" draw:layer="layout" svg:width="11.429cm" svg:height="1.117cm" svg:x="1.016cm" svg:y="8.128cm">
          <text:p/>
          <draw:enhanced-geometry svg:viewBox="0 0 21600 21600" draw:type="rectangle" draw:enhanced-path="M 0 0 L 21600 0 21600 21600 0 21600 0 0 Z N"/>
        </draw:custom-shape>
        <draw:custom-shape draw:name="Text 14" draw:style-name="gr2" draw:text-style-name="P3" draw:layer="layout" svg:width="10.921cm" svg:height="0.913cm" svg:x="1.27cm" svg:y="8.255cm">
          <text:p text:style-name="P2"><text:span text:style-name="T11"><text:s/></text:span><text:span text:style-name="T11">Firebase</text:span></text:p>
          <draw:enhanced-geometry svg:viewBox="0 0 21600 21600" draw:type="rectangle" draw:enhanced-path="M 0 0 L 21600 0 21600 21600 0 21600 0 0 Z N"/>
        </draw:custom-shape>
        <draw:custom-shape draw:name="Text 15" draw:style-name="gr2" draw:text-style-name="P3" draw:layer="layout" svg:width="10.667cm" svg:height="1.777cm" svg:x="1.397cm" svg:y="9.525cm">
          <text:p text:style-name="P2"><text:span text:style-name="T5">Gère l'authentification et les données serveur sans qu'on ait à coder un back-end.</text:span></text:p>
          <draw:enhanced-geometry svg:viewBox="0 0 21600 21600" draw:type="rectangle" draw:enhanced-path="M 0 0 L 21600 0 21600 21600 0 21600 0 0 Z N"/>
        </draw:custom-shape>
        <draw:custom-shape draw:name="Text 16" draw:style-name="gr2" draw:text-style-name="P3" draw:layer="layout" svg:width="10.667cm" svg:height="1.269cm" svg:x="1.397cm" svg:y="11.43cm">
          <text:p text:style-name="P2"><text:span text:style-name="T13">Alternative : Node.js + PostgreSQL plus complexe, plus long.</text:span></text:p>
          <draw:enhanced-geometry svg:viewBox="0 0 21600 21600" draw:type="rectangle" draw:enhanced-path="M 0 0 L 21600 0 21600 21600 0 21600 0 0 Z N"/>
        </draw:custom-shape>
        <draw:custom-shape draw:name="Shape 17" draw:style-name="gr10" draw:text-style-name="P1" draw:layer="layout" svg:width="11.429cm" svg:height="4.825cm" svg:x="13.208cm" svg:y="8.128cm">
          <text:p/>
          <draw:enhanced-geometry svg:viewBox="0 0 21600 21600" draw:type="rectangle" draw:enhanced-path="M 0 0 L 21600 0 21600 21600 0 21600 0 0 Z N"/>
        </draw:custom-shape>
        <draw:custom-shape draw:name="Shape 18" draw:style-name="gr11" draw:text-style-name="P1" draw:layer="layout" svg:width="11.429cm" svg:height="1.117cm" svg:x="13.208cm" svg:y="8.128cm">
          <text:p/>
          <draw:enhanced-geometry svg:viewBox="0 0 21600 21600" draw:type="rectangle" draw:enhanced-path="M 0 0 L 21600 0 21600 21600 0 21600 0 0 Z N"/>
        </draw:custom-shape>
        <draw:custom-shape draw:name="Text 19" draw:style-name="gr2" draw:text-style-name="P3" draw:layer="layout" svg:width="10.921cm" svg:height="0.913cm" svg:x="13.462cm" svg:y="8.255cm">
          <text:p text:style-name="P2"><text:span text:style-name="T11"><text:s/></text:span><text:span text:style-name="T11">Stripe</text:span></text:p>
          <draw:enhanced-geometry svg:viewBox="0 0 21600 21600" draw:type="rectangle" draw:enhanced-path="M 0 0 L 21600 0 21600 21600 0 21600 0 0 Z N"/>
        </draw:custom-shape>
        <draw:custom-shape draw:name="Text 20" draw:style-name="gr2" draw:text-style-name="P3" draw:layer="layout" svg:width="10.667cm" svg:height="1.777cm" svg:x="13.589cm" svg:y="9.525cm">
          <text:p text:style-name="P2"><text:span text:style-name="T5">Gère les paiements bancaires. On ne stocke jamais de numéro de carte bancaire.</text:span></text:p>
          <draw:enhanced-geometry svg:viewBox="0 0 21600 21600" draw:type="rectangle" draw:enhanced-path="M 0 0 L 21600 0 21600 21600 0 21600 0 0 Z N"/>
        </draw:custom-shape>
        <draw:custom-shape draw:name="Text 21" draw:style-name="gr2" draw:text-style-name="P3" draw:layer="layout" svg:width="10.667cm" svg:height="1.269cm" svg:x="13.589cm" svg:y="11.43cm">
          <text:p text:style-name="P2"><text:span text:style-name="T13">Obligation légale (norme PCI-DSS) : déléguer à un spécialiste.</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951cm" svg:y="-11.8cm" draw:page-number="3" presentation:class="page"/>
          <draw:frame draw:name="Notes Placeholder 2" presentation:style-name="pr1" draw:text-style-name="P3" draw:layer="layout" svg:width="15.239cm" svg:height="10cm" svg:x="0.161cm" svg:y="-4.2cm" presentation:class="notes" presentation:user-transformed="true">
            <draw:text-box>
              <text:p><text:span text:style-name="T8"/></text:p>
              <text:p><text:span text:style-name="T8">"Pour chaque outil qu'on a choisi, il y avait une raison concrète. Flutter d'abord : on est 4, on ne pouvait pas maintenir une app Android, une app iOS, et un site web séparément. Flutter nous permet de tout faire avec un seul code. Isar ensuite : les billets doivent marcher sans internet, donc on stocke tout directement sur le téléphone. Firebase gère les comptes utilisateurs et les données côté serveur. Et Stripe gère les paiements — on ne touche jamais aux données bancaires, c'est lui qui s'en charge."</text:span></text:p>
              <text:p><text:span text:style-name="T8"/></text:p>
              <text:p><text:span text:style-name="T8">CE QUE TU DOIS SAVOIR EXPLIQUER :</text:span></text:p>
              <text:p><text:span text:style-name="T8">- Flutter = 1 code pour 3 plateformes</text:span></text:p>
              <text:p><text:span text:style-name="T8">- Isar = base de données locale sur le téléphone (pas besoin d'internet)</text:span></text:p>
              <text:p><text:span text:style-name="T8">- Firebase = service Google qui gère les comptes et le cloud</text:span></text:p>
              <text:p><text:span text:style-name="T8">- Stripe = paiement sécurisé, on ne stocke jamais les CB</text:span></text:p>
              <text:p><text:span text:style-name="T8"/></text:p>
              <text:p><text:span text:style-name="T8">NE PAS DIRE si tu ne maîtrises pas :</text:span></text:p>
              <text:p><text:span text:style-name="T8">- Ne pas parler de "compilation AOT" si on ne te pose pas la question</text:span></text:p>
              <text:p><text:span text:style-name="T8">- Ne pas mentionner Riverpod ou Freezed spontanément</text:span></text:p>
              <text:p><text:span text:style-name="T8"/></text:p>
              <text:p><text:span text:style-name="T8">QUESTIONS POSSIBLES :</text:span></text:p>
              <text:p><text:span text:style-name="T8">Q : C'est quoi Flutter exactement ?</text:span></text:p>
              <text:p><text:span text:style-name="T8">R : "Un outil créé par Google qui permet d'écrire une app une seule fois en Dart et de la déployer sur Android, iOS et Web. L'app est compilée en code natif — elle est aussi rapide qu'une app développée spécifiquement."</text:span></text:p>
              <text:p><text:span text:style-name="T8"/></text:p>
              <text:p><text:span text:style-name="T8">Q : Pourquoi pas React Native ?</text:span></text:p>
              <text:p><text:span text:style-name="T8">R : "React Native ne supporte pas bien le Web nativement. Pour nous qui ciblons 3 plateformes, Flutter était plus adapté."</text:span></text:p>
              <text:p><text:span text:style-name="T8"/></text:p>
              <text:p><text:span text:style-name="T8">Q : Isar c'est quoi comme type de base de données ?</text:span></text:p>
              <text:p><text:span text:style-name="T8">R : "C'est une base NoSQL — elle stocke des documents complets plutôt que des tableaux avec des colonnes. L'avantage : chaque billet est un document autonome, consultable sans réseau."</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4" draw:style-name="dp3" draw:master-page-name="Standard">
        <draw:custom-shape draw:name="Text 0" draw:style-name="gr2" draw:text-style-name="P3" draw:layer="layout" svg:width="22.859cm" svg:height="1.269cm" svg:x="1.27cm" svg:y="0.559cm">
          <text:p text:style-name="P2"><text:span text:style-name="T14">MCD — Modèle Conceptuel de Données</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8cm">
          <text:p text:style-name="P2"><text:span text:style-name="T12">Méthode Merise · 5 entités métier · Indépendant de la technologie</text:span></text:p>
          <draw:enhanced-geometry svg:viewBox="0 0 21600 21600" draw:type="rectangle" draw:enhanced-path="M 0 0 L 21600 0 21600 21600 0 21600 0 0 Z N"/>
        </draw:custom-shape>
        <draw:frame draw:name="Image 0" draw:style-name="gr12" draw:text-style-name="P7" draw:layer="layout" svg:width="13.969cm" svg:height="9.905cm" svg:x="0.762cm" svg:y="2.667cm">
          <draw:image xlink:href="Pictures/1000020100000960000007085420D367.png" xlink:type="simple" xlink:show="embed" xlink:actuate="onLoad">
            <text:p/>
          </draw:image>
        </draw:frame>
        <draw:custom-shape draw:name="Shape 2" draw:style-name="gr13" draw:text-style-name="P1" draw:layer="layout" svg:width="9.27cm" svg:height="1.828cm" svg:x="15.494cm" svg:y="2.667cm">
          <text:p/>
          <draw:enhanced-geometry svg:viewBox="0 0 21600 21600" draw:type="rectangle" draw:enhanced-path="M 0 0 L 21600 0 21600 21600 0 21600 0 0 Z N"/>
        </draw:custom-shape>
        <draw:custom-shape draw:name="Shape 3" draw:style-name="gr1" draw:text-style-name="P1" draw:layer="layout" svg:width="0.253cm" svg:height="1.828cm" svg:x="15.494cm" svg:y="2.667cm">
          <text:p/>
          <draw:enhanced-geometry svg:viewBox="0 0 21600 21600" draw:type="rectangle" draw:enhanced-path="M 0 0 L 21600 0 21600 21600 0 21600 0 0 Z N"/>
        </draw:custom-shape>
        <draw:custom-shape draw:name="Text 4" draw:style-name="gr2" draw:text-style-name="P3" draw:layer="layout" svg:width="8.635cm" svg:height="0.71cm" svg:x="15.951cm" svg:y="2.794cm">
          <text:p text:style-name="P2"><text:span text:style-name="T4">UTILISATEUR</text:span></text:p>
          <draw:enhanced-geometry svg:viewBox="0 0 21600 21600" draw:type="rectangle" draw:enhanced-path="M 0 0 L 21600 0 21600 21600 0 21600 0 0 Z N"/>
        </draw:custom-shape>
        <draw:custom-shape draw:name="Text 5" draw:style-name="gr2" draw:text-style-name="P3" draw:layer="layout" svg:width="8.635cm" svg:height="0.761cm" svg:x="15.951cm" svg:y="3.505cm">
          <text:p text:style-name="P2"><text:span text:style-name="T6">Profil, préférences, éco-score</text:span></text:p>
          <draw:enhanced-geometry svg:viewBox="0 0 21600 21600" draw:type="rectangle" draw:enhanced-path="M 0 0 L 21600 0 21600 21600 0 21600 0 0 Z N"/>
        </draw:custom-shape>
        <draw:custom-shape draw:name="Shape 6" draw:style-name="gr14" draw:text-style-name="P1" draw:layer="layout" svg:width="9.27cm" svg:height="1.828cm" svg:x="15.494cm" svg:y="4.801cm">
          <text:p/>
          <draw:enhanced-geometry svg:viewBox="0 0 21600 21600" draw:type="rectangle" draw:enhanced-path="M 0 0 L 21600 0 21600 21600 0 21600 0 0 Z N"/>
        </draw:custom-shape>
        <draw:custom-shape draw:name="Shape 7" draw:style-name="gr15" draw:text-style-name="P1" draw:layer="layout" svg:width="0.253cm" svg:height="1.828cm" svg:x="15.494cm" svg:y="4.801cm">
          <text:p/>
          <draw:enhanced-geometry svg:viewBox="0 0 21600 21600" draw:type="rectangle" draw:enhanced-path="M 0 0 L 21600 0 21600 21600 0 21600 0 0 Z N"/>
        </draw:custom-shape>
        <draw:custom-shape draw:name="Text 8" draw:style-name="gr2" draw:text-style-name="P3" draw:layer="layout" svg:width="8.635cm" svg:height="0.71cm" svg:x="15.951cm" svg:y="4.928cm">
          <text:p text:style-name="P2"><text:span text:style-name="T4">ÉVÉNEMENT</text:span></text:p>
          <draw:enhanced-geometry svg:viewBox="0 0 21600 21600" draw:type="rectangle" draw:enhanced-path="M 0 0 L 21600 0 21600 21600 0 21600 0 0 Z N"/>
        </draw:custom-shape>
        <draw:custom-shape draw:name="Text 9" draw:style-name="gr2" draw:text-style-name="P3" draw:layer="layout" svg:width="8.635cm" svg:height="0.761cm" svg:x="15.951cm" svg:y="5.639cm">
          <text:p text:style-name="P2"><text:span text:style-name="T6">Catalogue, prix, badges éco</text:span></text:p>
          <draw:enhanced-geometry svg:viewBox="0 0 21600 21600" draw:type="rectangle" draw:enhanced-path="M 0 0 L 21600 0 21600 21600 0 21600 0 0 Z N"/>
        </draw:custom-shape>
        <draw:custom-shape draw:name="Shape 10" draw:style-name="gr16" draw:text-style-name="P1" draw:layer="layout" svg:width="9.27cm" svg:height="1.828cm" svg:x="15.494cm" svg:y="6.934cm">
          <text:p/>
          <draw:enhanced-geometry svg:viewBox="0 0 21600 21600" draw:type="rectangle" draw:enhanced-path="M 0 0 L 21600 0 21600 21600 0 21600 0 0 Z N"/>
        </draw:custom-shape>
        <draw:custom-shape draw:name="Shape 11" draw:style-name="gr8" draw:text-style-name="P1" draw:layer="layout" svg:width="0.253cm" svg:height="1.828cm" svg:x="15.494cm" svg:y="6.934cm">
          <text:p/>
          <draw:enhanced-geometry svg:viewBox="0 0 21600 21600" draw:type="rectangle" draw:enhanced-path="M 0 0 L 21600 0 21600 21600 0 21600 0 0 Z N"/>
        </draw:custom-shape>
        <draw:custom-shape draw:name="Text 12" draw:style-name="gr2" draw:text-style-name="P3" draw:layer="layout" svg:width="8.635cm" svg:height="0.71cm" svg:x="15.951cm" svg:y="7.061cm">
          <text:p text:style-name="P2"><text:span text:style-name="T4">BILLET</text:span></text:p>
          <draw:enhanced-geometry svg:viewBox="0 0 21600 21600" draw:type="rectangle" draw:enhanced-path="M 0 0 L 21600 0 21600 21600 0 21600 0 0 Z N"/>
        </draw:custom-shape>
        <draw:custom-shape draw:name="Text 13" draw:style-name="gr2" draw:text-style-name="P3" draw:layer="layout" svg:width="8.635cm" svg:height="0.761cm" svg:x="15.951cm" svg:y="7.772cm">
          <text:p text:style-name="P2"><text:span text:style-name="T6">Achat, QR code, statut</text:span></text:p>
          <draw:enhanced-geometry svg:viewBox="0 0 21600 21600" draw:type="rectangle" draw:enhanced-path="M 0 0 L 21600 0 21600 21600 0 21600 0 0 Z N"/>
        </draw:custom-shape>
        <draw:custom-shape draw:name="Shape 14" draw:style-name="gr17" draw:text-style-name="P1" draw:layer="layout" svg:width="9.27cm" svg:height="1.828cm" svg:x="15.494cm" svg:y="9.068cm">
          <text:p/>
          <draw:enhanced-geometry svg:viewBox="0 0 21600 21600" draw:type="rectangle" draw:enhanced-path="M 0 0 L 21600 0 21600 21600 0 21600 0 0 Z N"/>
        </draw:custom-shape>
        <draw:custom-shape draw:name="Shape 15" draw:style-name="gr18" draw:text-style-name="P1" draw:layer="layout" svg:width="0.253cm" svg:height="1.828cm" svg:x="15.494cm" svg:y="9.068cm">
          <text:p/>
          <draw:enhanced-geometry svg:viewBox="0 0 21600 21600" draw:type="rectangle" draw:enhanced-path="M 0 0 L 21600 0 21600 21600 0 21600 0 0 Z N"/>
        </draw:custom-shape>
        <draw:custom-shape draw:name="Text 16" draw:style-name="gr2" draw:text-style-name="P3" draw:layer="layout" svg:width="8.635cm" svg:height="0.71cm" svg:x="15.951cm" svg:y="9.195cm">
          <text:p text:style-name="P2"><text:span text:style-name="T4">PANIER</text:span></text:p>
          <draw:enhanced-geometry svg:viewBox="0 0 21600 21600" draw:type="rectangle" draw:enhanced-path="M 0 0 L 21600 0 21600 21600 0 21600 0 0 Z N"/>
        </draw:custom-shape>
        <draw:custom-shape draw:name="Text 17" draw:style-name="gr2" draw:text-style-name="P3" draw:layer="layout" svg:width="8.635cm" svg:height="0.761cm" svg:x="15.951cm" svg:y="9.906cm">
          <text:p text:style-name="P2"><text:span text:style-name="T6">Items avant paiement</text:span></text:p>
          <draw:enhanced-geometry svg:viewBox="0 0 21600 21600" draw:type="rectangle" draw:enhanced-path="M 0 0 L 21600 0 21600 21600 0 21600 0 0 Z N"/>
        </draw:custom-shape>
        <draw:custom-shape draw:name="Shape 18" draw:style-name="gr19" draw:text-style-name="P1" draw:layer="layout" svg:width="9.27cm" svg:height="1.828cm" svg:x="15.494cm" svg:y="11.201cm">
          <text:p/>
          <draw:enhanced-geometry svg:viewBox="0 0 21600 21600" draw:type="rectangle" draw:enhanced-path="M 0 0 L 21600 0 21600 21600 0 21600 0 0 Z N"/>
        </draw:custom-shape>
        <draw:custom-shape draw:name="Shape 19" draw:style-name="gr20" draw:text-style-name="P1" draw:layer="layout" svg:width="0.253cm" svg:height="1.828cm" svg:x="15.494cm" svg:y="11.201cm">
          <text:p/>
          <draw:enhanced-geometry svg:viewBox="0 0 21600 21600" draw:type="rectangle" draw:enhanced-path="M 0 0 L 21600 0 21600 21600 0 21600 0 0 Z N"/>
        </draw:custom-shape>
        <draw:custom-shape draw:name="Text 20" draw:style-name="gr2" draw:text-style-name="P3" draw:layer="layout" svg:width="8.635cm" svg:height="0.71cm" svg:x="15.951cm" svg:y="11.328cm">
          <text:p text:style-name="P2"><text:span text:style-name="T4">FAVORI</text:span></text:p>
          <draw:enhanced-geometry svg:viewBox="0 0 21600 21600" draw:type="rectangle" draw:enhanced-path="M 0 0 L 21600 0 21600 21600 0 21600 0 0 Z N"/>
        </draw:custom-shape>
        <draw:custom-shape draw:name="Text 21" draw:style-name="gr2" draw:text-style-name="P3" draw:layer="layout" svg:width="8.635cm" svg:height="0.761cm" svg:x="15.951cm" svg:y="12.04cm">
          <text:p text:style-name="P2"><text:span text:style-name="T6">Événements sauvegardés</text:span></text:p>
          <draw:enhanced-geometry svg:viewBox="0 0 21600 21600" draw:type="rectangle" draw:enhanced-path="M 0 0 L 21600 0 21600 21600 0 21600 0 0 Z N"/>
        </draw:custom-shape>
        <draw:custom-shape draw:name="Shape 22" draw:style-name="gr21" draw:text-style-name="P1" draw:layer="layout" svg:width="24.002cm" svg:height="0.812cm" svg:x="0.762cm" svg:y="13.005cm">
          <text:p/>
          <draw:enhanced-geometry svg:viewBox="0 0 21600 21600" draw:type="rectangle" draw:enhanced-path="M 0 0 L 21600 0 21600 21600 0 21600 0 0 Z N"/>
        </draw:custom-shape>
        <draw:custom-shape draw:name="Text 23" draw:style-name="gr2" draw:text-style-name="P3" draw:layer="layout" svg:width="23.367cm" svg:height="0.71cm" svg:x="1.016cm" svg:y="13.056cm">
          <text:p text:style-name="P2"><text:span text:style-name="T15">Cardinalité 1,N = un utilisateur peut avoir plusieurs billets / chaque billet appartient à 1 seul utilisateur</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239cm" svg:y="-12.372cm" draw:page-number="4" presentation:class="page"/>
          <draw:frame draw:name="Notes Placeholder 2" presentation:style-name="pr1" draw:text-style-name="P3" draw:layer="layout" svg:width="15.239cm" svg:height="10cm" svg:x="-0.439cm" svg:y="-4.4cm" presentation:class="notes" presentation:user-transformed="true">
            <draw:text-box>
              <text:p><text:span text:style-name="T8">SLIDE 4 — MCD (60 sec)</text:span></text:p>
              <text:p><text:span text:style-name="T8"/></text:p>
              <text:p><text:span text:style-name="T8">CE QUE TU DIS :</text:span></text:p>
              <text:p><text:span text:style-name="T8">"Le MCD — Modèle Conceptuel de Données — c'est la première étape de la méthode Merise. Il représente les entités métier de notre application et leurs relations, sans parler de technologie. On a 5 entités : l'Utilisateur, l'Événement, le Billet, le Panier et le Favori.</text:span></text:p>
              <text:p><text:span text:style-name="T8"/></text:p>
              <text:p><text:span text:style-name="T8">Concernant les relations : un Utilisateur peut acheter plusieurs Billets, mais chaque Billet appartient à un seul Utilisateur — c'est ce qu'on appelle la cardinalité 1,N. Un Événement peut avoir plusieurs Billets, mais chaque Billet correspond à un seul Événement."</text:span></text:p>
              <text:p><text:span text:style-name="T8"/></text:p>
              <text:p><text:span text:style-name="T8">POINTER SUR LE DIAGRAMME :</text:span></text:p>
              <text:p><text:span text:style-name="T8">→ </text:span><text:span text:style-name="T8">Pointer l'entité UTILISATEUR : "C'est notre acteur principal — il porte ses préférences et son éco-score"</text:span></text:p>
              <text:p><text:span text:style-name="T8">→ </text:span><text:span text:style-name="T8">Pointer la relation ACHÈTE : "La cardinalité 1,N ici — un utilisateur, plusieurs billets"</text:span></text:p>
              <text:p><text:span text:style-name="T8">→ </text:span><text:span text:style-name="T8">Pointer PANIER : "C'est l'état temporaire avant le paiement — après checkout, le panier devient des billets"</text:span></text:p>
              <text:p><text:span text:style-name="T8"/></text:p>
              <text:p><text:span text:style-name="T8">QUESTIONS POSSIBLES :</text:span></text:p>
              <text:p><text:span text:style-name="T8">Q : Pourquoi seulement 5 entités ?</text:span></text:p>
              <text:p><text:span text:style-name="T8">R : "Le MCD représente la version 1 du projet — le MVP. Les modules transport et hébergement, prévus en V2, ajouteraient 2-3 entités supplémentaires."</text:span></text:p>
              <text:p><text:span text:style-name="T8"/></text:p>
              <text:p><text:span text:style-name="T8">Q : C'est quoi la différence entre une entité et une association ?</text:span></text:p>
              <text:p><text:span text:style-name="T8">R : "Une entité, c'est un objet du monde réel — ici l'Utilisateur, l'Événement. Une association, c'est le lien entre deux entités — ici ACHÈTE, AJOUTE. Le losange dans Merise symbolise une association."</text:span></text:p>
              <text:p><text:span text:style-name="T8"/></text:p>
              <text:p><text:span text:style-name="T8">Q : Pourquoi FAVORI est une entité et pas juste une relation ?</text:span></text:p>
              <text:p><text:span text:style-name="T8">R : "Parce que FAVORI porte un attribut propre — la date d'ajout. Dès qu'une association a ses propres données, elle devient une entité-association."</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5" draw:style-name="dp3" draw:master-page-name="Standard">
        <draw:custom-shape draw:name="Text 0" draw:style-name="gr2" draw:text-style-name="P3" draw:layer="layout" svg:width="22.859cm" svg:height="1.269cm" svg:x="1.27cm" svg:y="0.559cm">
          <text:p text:style-name="P2"><text:span text:style-name="T14">MLD — Modèle Logique de Données</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8cm">
          <text:p text:style-name="P2"><text:span text:style-name="T12">Transposition du MCD en tables SQL · 3 règles Merise</text:span></text:p>
          <draw:enhanced-geometry svg:viewBox="0 0 21600 21600" draw:type="rectangle" draw:enhanced-path="M 0 0 L 21600 0 21600 21600 0 21600 0 0 Z N"/>
        </draw:custom-shape>
        <draw:frame draw:name="Image 0" draw:style-name="gr12" draw:text-style-name="P7" draw:layer="layout" svg:width="14.223cm" svg:height="9.651cm" svg:x="0.762cm" svg:y="2.54cm">
          <draw:image xlink:href="Pictures/1000020100000960000006A4278DD498.png" xlink:type="simple" xlink:show="embed" xlink:actuate="onLoad">
            <text:p/>
          </draw:image>
        </draw:frame>
        <draw:custom-shape draw:name="Shape 2" draw:style-name="gr13" draw:text-style-name="P1" draw:layer="layout" svg:width="9.27cm" svg:height="3.25cm" svg:x="15.494cm" svg:y="2.54cm">
          <text:p/>
          <draw:enhanced-geometry svg:viewBox="0 0 21600 21600" draw:type="rectangle" draw:enhanced-path="M 0 0 L 21600 0 21600 21600 0 21600 0 0 Z N"/>
        </draw:custom-shape>
        <draw:custom-shape draw:name="Shape 3" draw:style-name="gr1" draw:text-style-name="P1" draw:layer="layout" svg:width="1.117cm" svg:height="1.117cm" svg:x="15.646cm" svg:y="2.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4" draw:style-name="gr2" draw:text-style-name="P3" draw:layer="layout" svg:width="1.117cm" svg:height="1.117cm" svg:x="15.646cm" svg:y="2.692cm">
          <text:p text:style-name="P4"><text:span text:style-name="T16">1</text:span></text:p>
          <draw:enhanced-geometry svg:viewBox="0 0 21600 21600" draw:type="rectangle" draw:enhanced-path="M 0 0 L 21600 0 21600 21600 0 21600 0 0 Z N"/>
        </draw:custom-shape>
        <draw:custom-shape draw:name="Text 5" draw:style-name="gr2" draw:text-style-name="P3" draw:layer="layout" svg:width="7.619cm" svg:height="0.761cm" svg:x="17.018cm" svg:y="2.794cm">
          <text:p text:style-name="P2"><text:span text:style-name="T4">Chaque entité → une table</text:span></text:p>
          <draw:enhanced-geometry svg:viewBox="0 0 21600 21600" draw:type="rectangle" draw:enhanced-path="M 0 0 L 21600 0 21600 21600 0 21600 0 0 Z N"/>
        </draw:custom-shape>
        <draw:custom-shape draw:name="Text 6" draw:style-name="gr2" draw:text-style-name="P3" draw:layer="layout" svg:width="7.619cm" svg:height="1.269cm" svg:x="17.018cm" svg:y="3.658cm">
          <text:p text:style-name="P2"><text:span text:style-name="T13">UTILISATEUR → table Utilisateur</text:span></text:p>
          <draw:enhanced-geometry svg:viewBox="0 0 21600 21600" draw:type="rectangle" draw:enhanced-path="M 0 0 L 21600 0 21600 21600 0 21600 0 0 Z N"/>
        </draw:custom-shape>
        <draw:custom-shape draw:name="Shape 7" draw:style-name="gr16" draw:text-style-name="P1" draw:layer="layout" svg:width="9.27cm" svg:height="3.25cm" svg:x="15.494cm" svg:y="6.223cm">
          <text:p/>
          <draw:enhanced-geometry svg:viewBox="0 0 21600 21600" draw:type="rectangle" draw:enhanced-path="M 0 0 L 21600 0 21600 21600 0 21600 0 0 Z N"/>
        </draw:custom-shape>
        <draw:custom-shape draw:name="Shape 8" draw:style-name="gr8" draw:text-style-name="P1" draw:layer="layout" svg:width="1.117cm" svg:height="1.117cm" svg:x="15.646cm" svg:y="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9" draw:style-name="gr2" draw:text-style-name="P3" draw:layer="layout" svg:width="1.117cm" svg:height="1.117cm" svg:x="15.646cm" svg:y="6.375cm">
          <text:p text:style-name="P4"><text:span text:style-name="T16">2</text:span></text:p>
          <draw:enhanced-geometry svg:viewBox="0 0 21600 21600" draw:type="rectangle" draw:enhanced-path="M 0 0 L 21600 0 21600 21600 0 21600 0 0 Z N"/>
        </draw:custom-shape>
        <draw:custom-shape draw:name="Text 10" draw:style-name="gr2" draw:text-style-name="P3" draw:layer="layout" svg:width="7.619cm" svg:height="0.761cm" svg:x="17.018cm" svg:y="6.477cm">
          <text:p text:style-name="P2"><text:span text:style-name="T4">L'identifiant → clé primaire (PK)</text:span></text:p>
          <draw:enhanced-geometry svg:viewBox="0 0 21600 21600" draw:type="rectangle" draw:enhanced-path="M 0 0 L 21600 0 21600 21600 0 21600 0 0 Z N"/>
        </draw:custom-shape>
        <draw:custom-shape draw:name="Text 11" draw:style-name="gr2" draw:text-style-name="P3" draw:layer="layout" svg:width="7.619cm" svg:height="1.269cm" svg:x="17.018cm" svg:y="7.341cm">
          <text:p text:style-name="P2"><text:span text:style-name="T13">idUtilisateur devient PK</text:span></text:p>
          <draw:enhanced-geometry svg:viewBox="0 0 21600 21600" draw:type="rectangle" draw:enhanced-path="M 0 0 L 21600 0 21600 21600 0 21600 0 0 Z N"/>
        </draw:custom-shape>
        <draw:custom-shape draw:name="Shape 12" draw:style-name="gr19" draw:text-style-name="P1" draw:layer="layout" svg:width="9.27cm" svg:height="3.25cm" svg:x="15.494cm" svg:y="9.906cm">
          <text:p/>
          <draw:enhanced-geometry svg:viewBox="0 0 21600 21600" draw:type="rectangle" draw:enhanced-path="M 0 0 L 21600 0 21600 21600 0 21600 0 0 Z N"/>
        </draw:custom-shape>
        <draw:custom-shape draw:name="Shape 13" draw:style-name="gr20" draw:text-style-name="P1" draw:layer="layout" svg:width="1.117cm" svg:height="1.117cm" svg:x="15.646cm" svg:y="10.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4" draw:style-name="gr2" draw:text-style-name="P3" draw:layer="layout" svg:width="1.117cm" svg:height="1.117cm" svg:x="15.646cm" svg:y="10.058cm">
          <text:p text:style-name="P4"><text:span text:style-name="T16">3</text:span></text:p>
          <draw:enhanced-geometry svg:viewBox="0 0 21600 21600" draw:type="rectangle" draw:enhanced-path="M 0 0 L 21600 0 21600 21600 0 21600 0 0 Z N"/>
        </draw:custom-shape>
        <draw:custom-shape draw:name="Text 15" draw:style-name="gr2" draw:text-style-name="P3" draw:layer="layout" svg:width="7.619cm" svg:height="0.761cm" svg:x="17.018cm" svg:y="10.16cm">
          <text:p text:style-name="P2"><text:span text:style-name="T4">Association 1,N → clé étrangère (FK)</text:span></text:p>
          <draw:enhanced-geometry svg:viewBox="0 0 21600 21600" draw:type="rectangle" draw:enhanced-path="M 0 0 L 21600 0 21600 21600 0 21600 0 0 Z N"/>
        </draw:custom-shape>
        <draw:custom-shape draw:name="Text 16" draw:style-name="gr2" draw:text-style-name="P3" draw:layer="layout" svg:width="7.619cm" svg:height="1.269cm" svg:x="17.018cm" svg:y="11.024cm">
          <text:p text:style-name="P2"><text:span text:style-name="T13">Billet contient id_utilisateur (FK)</text:span></text:p>
          <draw:enhanced-geometry svg:viewBox="0 0 21600 21600" draw:type="rectangle" draw:enhanced-path="M 0 0 L 21600 0 21600 21600 0 21600 0 0 Z N"/>
        </draw:custom-shape>
        <draw:custom-shape draw:name="Shape 17" draw:style-name="gr22" draw:text-style-name="P1" draw:layer="layout" svg:width="9.27cm" svg:height="1.269cm" svg:x="15.494cm" svg:y="13.665cm">
          <text:p/>
          <draw:enhanced-geometry svg:viewBox="0 0 21600 21600" draw:type="rectangle" draw:enhanced-path="M 0 0 L 21600 0 21600 21600 0 21600 0 0 Z N"/>
        </draw:custom-shape>
        <draw:custom-shape draw:name="Text 18" draw:style-name="gr2" draw:text-style-name="P3" draw:layer="layout" svg:width="8.889cm" svg:height="1.167cm" svg:x="15.748cm" svg:y="13.716cm">
          <text:p text:style-name="P2"><text:span text:style-name="T17">⚠️ </text:span><text:span text:style-name="T17">Certains champs sont copiés dans plusieurs tables (dénormalisation) → pour fonctionner sans réseau</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cm" svg:y="-12.6cm" draw:page-number="5" presentation:class="page"/>
          <draw:frame draw:name="Notes Placeholder 2" presentation:style-name="pr1" draw:text-style-name="P3" draw:layer="layout" svg:width="15.239cm" svg:height="10cm" svg:x="-0.039cm" svg:y="-3.8cm" presentation:class="notes" presentation:user-transformed="true">
            <draw:text-box>
              <text:p><text:span text:style-name="T8">SLIDE 5 — MLD (60 sec)</text:span></text:p>
              <text:p><text:span text:style-name="T8"/></text:p>
              <text:p><text:span text:style-name="T8">CE QUE TU DIS :</text:span></text:p>
              <text:p><text:span text:style-name="T8">"Le MLD, c'est la deuxième étape Merise : on traduit le MCD en tables SQL concrètes. Il y a 3 règles mécaniques. Règle 1 : chaque entité devient une table. Règle 2 : son identifiant devient la clé primaire. Règle 3 : chaque relation 1,N se traduit par une clé étrangère dans la table côté N.</text:span></text:p>
              <text:p><text:span text:style-name="T8"/></text:p>
              <text:p><text:span text:style-name="T8">Par exemple, la table Billet contient un champ id_evenement qui est une clé étrangère — elle pointe vers la table Evenement. C'est comme ça qu'on sait à quel événement correspond chaque billet."</text:span></text:p>
              <text:p><text:span text:style-name="T8"/></text:p>
              <text:p><text:span text:style-name="T8">POINTER SUR LE DIAGRAMME :</text:span></text:p>
              <text:p><text:span text:style-name="T8">→ </text:span><text:span text:style-name="T8">Pointer la table Utilisateur : "PK = id_utilisateur, auto-incrémenté"</text:span></text:p>
              <text:p><text:span text:style-name="T8">→ </text:span><text:span text:style-name="T8">Pointer la FK dans Billet : "id_evenement FK → fait le lien avec la table Evenement"</text:span></text:p>
              <text:p><text:span text:style-name="T8">→ </text:span><text:span text:style-name="T8">Pointer la note bas de page : "On a volontairement copié certaines infos comme le nom de l'événement dans le billet — c'est pour pouvoir afficher le billet sans accès réseau"</text:span></text:p>
              <text:p><text:span text:style-name="T8"/></text:p>
              <text:p><text:span text:style-name="T8">QUESTIONS POSSIBLES :</text:span></text:p>
              <text:p><text:span text:style-name="T8">Q : C'est quoi une clé primaire ?</text:span></text:p>
              <text:p><text:span text:style-name="T8">R : "Un identifiant unique pour chaque ligne d'une table. Deux billets ne peuvent pas avoir le même id_billet."</text:span></text:p>
              <text:p><text:span text:style-name="T8"/></text:p>
              <text:p><text:span text:style-name="T8">Q : Et une clé étrangère ?</text:span></text:p>
              <text:p><text:span text:style-name="T8">R : "Un champ qui fait référence à la clé primaire d'une autre table. Ça crée le lien entre les tables."</text:span></text:p>
              <text:p><text:span text:style-name="T8"/></text:p>
              <text:p><text:span text:style-name="T8">Q : Pourquoi certaines infos sont copiées dans plusieurs tables ?</text:span></text:p>
              <text:p><text:span text:style-name="T8">R : "Pour une contrainte technique : en mode sans réseau, l'app ne peut pas aller chercher le nom de l'événement dans une autre table. Donc on le copie directement dans le billet au moment de l'achat. C'est ce qu'on appelle la dénormalisation intentionnell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6" draw:style-name="dp3" draw:master-page-name="Standard">
        <draw:custom-shape draw:name="Text 0" draw:style-name="gr2" draw:text-style-name="P3" draw:layer="layout" svg:width="22.859cm" svg:height="1.269cm" svg:x="1.27cm" svg:y="0.559cm">
          <text:p text:style-name="P2"><text:span text:style-name="T18">ERD — Le schéma réel de notre base de données</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8cm">
          <text:p text:style-name="P2"><text:span text:style-name="T12">Ce qui est vraiment implémenté dans Isar (base locale sur le téléphone)</text:span></text:p>
          <draw:enhanced-geometry svg:viewBox="0 0 21600 21600" draw:type="rectangle" draw:enhanced-path="M 0 0 L 21600 0 21600 21600 0 21600 0 0 Z N"/>
        </draw:custom-shape>
        <draw:frame draw:name="Image 0" draw:style-name="gr12" draw:text-style-name="P7" draw:layer="layout" svg:width="14.731cm" svg:height="10.667cm" svg:x="0.762cm" svg:y="2.54cm">
          <draw:image xlink:href="Pictures/100000000000096000000708F0843942.png" xlink:type="simple" xlink:show="embed" xlink:actuate="onLoad">
            <text:p/>
          </draw:image>
        </draw:frame>
        <draw:custom-shape draw:name="Text 2" draw:style-name="gr2" draw:text-style-name="P3" draw:layer="layout" svg:width="8.635cm" svg:height="0.812cm" svg:x="16.002cm" svg:y="2.54cm">
          <text:p text:style-name="P2"><text:span text:style-name="T4">MCD vs ERD — quelle différence ?</text:span></text:p>
          <draw:enhanced-geometry svg:viewBox="0 0 21600 21600" draw:type="rectangle" draw:enhanced-path="M 0 0 L 21600 0 21600 21600 0 21600 0 0 Z N"/>
        </draw:custom-shape>
        <draw:custom-shape draw:name="Shape 3" draw:style-name="gr13" draw:text-style-name="P1" draw:layer="layout" svg:width="8.635cm" svg:height="2.285cm" svg:x="16.002cm" svg:y="3.556cm">
          <text:p/>
          <draw:enhanced-geometry svg:viewBox="0 0 21600 21600" draw:type="rectangle" draw:enhanced-path="M 0 0 L 21600 0 21600 21600 0 21600 0 0 Z N"/>
        </draw:custom-shape>
        <draw:custom-shape draw:name="Text 4" draw:style-name="gr2" draw:text-style-name="P3" draw:layer="layout" svg:width="2.031cm" svg:height="2.031cm" svg:x="16.129cm" svg:y="3.658cm">
          <text:p text:style-name="P4"><text:span text:style-name="T19">MCD</text:span></text:p>
          <draw:enhanced-geometry svg:viewBox="0 0 21600 21600" draw:type="rectangle" draw:enhanced-path="M 0 0 L 21600 0 21600 21600 0 21600 0 0 Z N"/>
        </draw:custom-shape>
        <draw:custom-shape draw:name="Shape 5" draw:style-name="gr23" draw:text-style-name="P1" draw:layer="layout" svg:width="0.101cm" svg:height="2.285cm" svg:x="18.034cm" svg:y="3.556cm">
          <text:p/>
          <draw:enhanced-geometry svg:viewBox="0 0 21600 21600" draw:type="rectangle" draw:enhanced-path="M 0 0 L 21600 0 21600 21600 0 21600 0 0 Z N"/>
        </draw:custom-shape>
        <draw:custom-shape draw:name="Text 6" draw:style-name="gr2" draw:text-style-name="P3" draw:layer="layout" svg:width="6.222cm" svg:height="1.98cm" svg:x="18.288cm" svg:y="3.708cm">
          <text:p text:style-name="P2"><text:span text:style-name="T6">Entités abstraites</text:span></text:p>
          <text:p text:style-name="P2"><text:span text:style-name="T6">Sans technologie</text:span></text:p>
          <draw:enhanced-geometry svg:viewBox="0 0 21600 21600" draw:type="rectangle" draw:enhanced-path="M 0 0 L 21600 0 21600 21600 0 21600 0 0 Z N"/>
        </draw:custom-shape>
        <draw:custom-shape draw:name="Shape 7" draw:style-name="gr16" draw:text-style-name="P1" draw:layer="layout" svg:width="8.635cm" svg:height="2.285cm" svg:x="16.002cm" svg:y="6.35cm">
          <text:p/>
          <draw:enhanced-geometry svg:viewBox="0 0 21600 21600" draw:type="rectangle" draw:enhanced-path="M 0 0 L 21600 0 21600 21600 0 21600 0 0 Z N"/>
        </draw:custom-shape>
        <draw:custom-shape draw:name="Text 8" draw:style-name="gr2" draw:text-style-name="P3" draw:layer="layout" svg:width="2.031cm" svg:height="2.031cm" svg:x="16.129cm" svg:y="6.452cm">
          <text:p text:style-name="P4"><text:span text:style-name="T19">ERD</text:span></text:p>
          <draw:enhanced-geometry svg:viewBox="0 0 21600 21600" draw:type="rectangle" draw:enhanced-path="M 0 0 L 21600 0 21600 21600 0 21600 0 0 Z N"/>
        </draw:custom-shape>
        <draw:custom-shape draw:name="Shape 9" draw:style-name="gr23" draw:text-style-name="P1" draw:layer="layout" svg:width="0.101cm" svg:height="2.285cm" svg:x="18.034cm" svg:y="6.35cm">
          <text:p/>
          <draw:enhanced-geometry svg:viewBox="0 0 21600 21600" draw:type="rectangle" draw:enhanced-path="M 0 0 L 21600 0 21600 21600 0 21600 0 0 Z N"/>
        </draw:custom-shape>
        <draw:custom-shape draw:name="Text 10" draw:style-name="gr2" draw:text-style-name="P3" draw:layer="layout" svg:width="6.222cm" svg:height="1.98cm" svg:x="18.288cm" svg:y="6.502cm">
          <text:p text:style-name="P2"><text:span text:style-name="T6">Collections Isar réelles</text:span></text:p>
          <text:p text:style-name="P2"><text:span text:style-name="T6">Avec types Dart (String, int...)</text:span></text:p>
          <draw:enhanced-geometry svg:viewBox="0 0 21600 21600" draw:type="rectangle" draw:enhanced-path="M 0 0 L 21600 0 21600 21600 0 21600 0 0 Z N"/>
        </draw:custom-shape>
        <draw:custom-shape draw:name="Text 11" draw:style-name="gr2" draw:text-style-name="P3" draw:layer="layout" svg:width="8.635cm" svg:height="0.71cm" svg:x="16.002cm" svg:y="9.449cm">
          <text:p text:style-name="P2"><text:span text:style-name="T4">Les 5 collections :</text:span></text:p>
          <draw:enhanced-geometry svg:viewBox="0 0 21600 21600" draw:type="rectangle" draw:enhanced-path="M 0 0 L 21600 0 21600 21600 0 21600 0 0 Z N"/>
        </draw:custom-shape>
        <draw:custom-shape draw:name="Shape 12" draw:style-name="gr1" draw:text-style-name="P1" draw:layer="layout" svg:width="0.253cm" svg:height="0.558cm" svg:x="16.002cm" svg:y="10.312cm">
          <text:p/>
          <draw:enhanced-geometry svg:viewBox="0 0 21600 21600" draw:type="rectangle" draw:enhanced-path="M 0 0 L 21600 0 21600 21600 0 21600 0 0 Z N"/>
        </draw:custom-shape>
        <draw:custom-shape draw:name="Text 13" draw:style-name="gr2" draw:text-style-name="P3" draw:layer="layout" svg:width="8.254cm" svg:height="0.558cm" svg:x="16.459cm" svg:y="10.312cm">
          <text:p text:style-name="P2"><text:span text:style-name="T15">IsarUserProfile — Profil + éco-score</text:span></text:p>
          <draw:enhanced-geometry svg:viewBox="0 0 21600 21600" draw:type="rectangle" draw:enhanced-path="M 0 0 L 21600 0 21600 21600 0 21600 0 0 Z N"/>
        </draw:custom-shape>
        <draw:custom-shape draw:name="Shape 14" draw:style-name="gr15" draw:text-style-name="P1" draw:layer="layout" svg:width="0.253cm" svg:height="0.558cm" svg:x="16.002cm" svg:y="11.024cm">
          <text:p/>
          <draw:enhanced-geometry svg:viewBox="0 0 21600 21600" draw:type="rectangle" draw:enhanced-path="M 0 0 L 21600 0 21600 21600 0 21600 0 0 Z N"/>
        </draw:custom-shape>
        <draw:custom-shape draw:name="Text 15" draw:style-name="gr2" draw:text-style-name="P3" draw:layer="layout" svg:width="8.254cm" svg:height="0.558cm" svg:x="16.459cm" svg:y="11.024cm">
          <text:p text:style-name="P2"><text:span text:style-name="T15">IsarEvent — Catalogue événements</text:span></text:p>
          <draw:enhanced-geometry svg:viewBox="0 0 21600 21600" draw:type="rectangle" draw:enhanced-path="M 0 0 L 21600 0 21600 21600 0 21600 0 0 Z N"/>
        </draw:custom-shape>
        <draw:custom-shape draw:name="Shape 16" draw:style-name="gr8" draw:text-style-name="P1" draw:layer="layout" svg:width="0.253cm" svg:height="0.558cm" svg:x="16.002cm" svg:y="11.735cm">
          <text:p/>
          <draw:enhanced-geometry svg:viewBox="0 0 21600 21600" draw:type="rectangle" draw:enhanced-path="M 0 0 L 21600 0 21600 21600 0 21600 0 0 Z N"/>
        </draw:custom-shape>
        <draw:custom-shape draw:name="Text 17" draw:style-name="gr2" draw:text-style-name="P3" draw:layer="layout" svg:width="8.254cm" svg:height="0.558cm" svg:x="16.459cm" svg:y="11.735cm">
          <text:p text:style-name="P2"><text:span text:style-name="T15">IsarTicket — Billets + QR code</text:span></text:p>
          <draw:enhanced-geometry svg:viewBox="0 0 21600 21600" draw:type="rectangle" draw:enhanced-path="M 0 0 L 21600 0 21600 21600 0 21600 0 0 Z N"/>
        </draw:custom-shape>
        <draw:custom-shape draw:name="Shape 18" draw:style-name="gr18" draw:text-style-name="P1" draw:layer="layout" svg:width="0.253cm" svg:height="0.558cm" svg:x="16.002cm" svg:y="12.446cm">
          <text:p/>
          <draw:enhanced-geometry svg:viewBox="0 0 21600 21600" draw:type="rectangle" draw:enhanced-path="M 0 0 L 21600 0 21600 21600 0 21600 0 0 Z N"/>
        </draw:custom-shape>
        <draw:custom-shape draw:name="Text 19" draw:style-name="gr2" draw:text-style-name="P3" draw:layer="layout" svg:width="8.254cm" svg:height="0.558cm" svg:x="16.459cm" svg:y="12.446cm">
          <text:p text:style-name="P2"><text:span text:style-name="T15">IsarCartItem — Panier temporaire</text:span></text:p>
          <draw:enhanced-geometry svg:viewBox="0 0 21600 21600" draw:type="rectangle" draw:enhanced-path="M 0 0 L 21600 0 21600 21600 0 21600 0 0 Z N"/>
        </draw:custom-shape>
        <draw:custom-shape draw:name="Shape 20" draw:style-name="gr20" draw:text-style-name="P1" draw:layer="layout" svg:width="0.253cm" svg:height="0.558cm" svg:x="16.002cm" svg:y="13.157cm">
          <text:p/>
          <draw:enhanced-geometry svg:viewBox="0 0 21600 21600" draw:type="rectangle" draw:enhanced-path="M 0 0 L 21600 0 21600 21600 0 21600 0 0 Z N"/>
        </draw:custom-shape>
        <draw:custom-shape draw:name="Text 21" draw:style-name="gr2" draw:text-style-name="P3" draw:layer="layout" svg:width="8.254cm" svg:height="0.558cm" svg:x="16.459cm" svg:y="13.157cm">
          <text:p text:style-name="P2"><text:span text:style-name="T15">IsarFavorite — Favoris utilisateur</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039cm" svg:y="-8.972cm" draw:page-number="6" presentation:class="page"/>
          <draw:frame draw:name="Notes Placeholder 2" presentation:style-name="pr1" draw:text-style-name="P3" draw:layer="layout" svg:width="15.239cm" svg:height="10cm" svg:x="0cm" svg:y="0cm" presentation:class="notes" presentation:user-transformed="true">
            <draw:text-box>
              <text:p><text:span text:style-name="T8">SLIDE 6 — ERD (60 sec)</text:span></text:p>
              <text:p><text:span text:style-name="T8"/></text:p>
              <text:p><text:span text:style-name="T8">CE QUE TU DIS :</text:span></text:p>
              <text:p><text:span text:style-name="T8">"L'ERD, c'est l'étape finale : le schéma réel de notre base de données, tel qu'il est codé dans Isar. La différence avec le MCD : ici on a les types de données réels — String, int, double, DateTime — et les noms de champs exacts du code.</text:span></text:p>
              <text:p><text:span text:style-name="T8"/></text:p>
              <text:p><text:span text:style-name="T8">On a 5 collections dans Isar. IsarUserProfile stocke le profil avec l'éco-score. IsarEvent contient le catalogue. IsarTicket contient chaque billet acheté avec son QR code. IsarCartItem est le panier avant paiement — il disparaît après l'achat. IsarFavorite stocke les événements mis en favoris."</text:span></text:p>
              <text:p><text:span text:style-name="T8"/></text:p>
              <text:p><text:span text:style-name="T8">COHÉRENCE À SOULIGNER :</text:span></text:p>
              <text:p><text:span text:style-name="T8">"Ce qui est important, c'est la cohérence : le MCD avait 5 entités, le MLD avait 5 tables, et l'ERD a 5 collections. Ce sont les mêmes 5 objets métier représentés à 3 niveaux différents."</text:span></text:p>
              <text:p><text:span text:style-name="T8"/></text:p>
              <text:p><text:span text:style-name="T8">QUESTIONS POSSIBLES :</text:span></text:p>
              <text:p><text:span text:style-name="T8">Q : Pourquoi Isar et pas une base SQL classique ?</text:span></text:p>
              <text:p><text:span text:style-name="T8">R : "Isar est une base NoSQL spécialisée pour mobile. Elle est plus rapide pour lire des données sur un téléphone, et elle fonctionne sans internet — c'est essentiel pour notre cas d'usage."</text:span></text:p>
              <text:p><text:span text:style-name="T8"/></text:p>
              <text:p><text:span text:style-name="T8">Q : C'est quoi la différence entre MCD, MLD et ERD ?</text:span></text:p>
              <text:p><text:span text:style-name="T8">R : "MCD = conception Merise, sans technologie, juste les entités et leurs liens. MLD = traduction en tables SQL avec clés primaires et étrangères. ERD = le schéma réel dans le code, avec les types de données exacts. Les 3 représentent les mêmes données à des niveaux de détail différents."</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7" draw:style-name="dp3" draw:master-page-name="Standard">
        <draw:custom-shape draw:name="Text 0" draw:style-name="gr2" draw:text-style-name="P3" draw:layer="layout" svg:width="22.859cm" svg:height="1.269cm" svg:x="1.27cm" svg:y="0.559cm">
          <text:p text:style-name="P2"><text:span text:style-name="T14">Diagramme de Classes UML</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8cm">
          <text:p text:style-name="P2"><text:span text:style-name="T12">Organisation du code en objets · Qui fait quoi dans l'application</text:span></text:p>
          <draw:enhanced-geometry svg:viewBox="0 0 21600 21600" draw:type="rectangle" draw:enhanced-path="M 0 0 L 21600 0 21600 21600 0 21600 0 0 Z N"/>
        </draw:custom-shape>
        <draw:frame draw:name="Image 0" draw:style-name="gr12" draw:text-style-name="P7" draw:layer="layout" svg:width="14.731cm" svg:height="9.905cm" svg:x="0.762cm" svg:y="2.54cm">
          <draw:image xlink:href="Pictures/1000020100000960000006DA72FBD4DF.png" xlink:type="simple" xlink:show="embed" xlink:actuate="onLoad">
            <text:p/>
          </draw:image>
        </draw:frame>
        <draw:custom-shape draw:name="Shape 2" draw:style-name="gr13" draw:text-style-name="P1" draw:layer="layout" svg:width="8.762cm" svg:height="3.504cm" svg:x="16.002cm" svg:y="2.54cm">
          <text:p/>
          <draw:enhanced-geometry svg:viewBox="0 0 21600 21600" draw:type="rectangle" draw:enhanced-path="M 0 0 L 21600 0 21600 21600 0 21600 0 0 Z N"/>
        </draw:custom-shape>
        <draw:custom-shape draw:name="Shape 3" draw:style-name="gr1" draw:text-style-name="P1" draw:layer="layout" svg:width="2.793cm" svg:height="3.504cm" svg:x="16.002cm" svg:y="2.54cm">
          <text:p/>
          <draw:enhanced-geometry svg:viewBox="0 0 21600 21600" draw:type="rectangle" draw:enhanced-path="M 0 0 L 21600 0 21600 21600 0 21600 0 0 Z N"/>
        </draw:custom-shape>
        <draw:custom-shape draw:name="Text 4" draw:style-name="gr2" draw:text-style-name="P3" draw:layer="layout" svg:width="2.742cm" svg:height="3.504cm" svg:x="16.027cm" svg:y="2.54cm">
          <text:p text:style-name="P4"><text:span text:style-name="T7">Modèles</text:span></text:p>
          <text:p text:style-name="P4"><text:span text:style-name="T7">(domain)</text:span></text:p>
          <draw:enhanced-geometry svg:viewBox="0 0 21600 21600" draw:type="rectangle" draw:enhanced-path="M 0 0 L 21600 0 21600 21600 0 21600 0 0 Z N"/>
        </draw:custom-shape>
        <draw:custom-shape draw:name="Text 5" draw:style-name="gr2" draw:text-style-name="P3" draw:layer="layout" svg:width="5.587cm" svg:height="3.199cm" svg:x="18.999cm" svg:y="2.692cm">
          <text:p text:style-name="P2"><text:span text:style-name="T15">Définissent les données</text:span></text:p>
          <text:p text:style-name="P2"><text:span text:style-name="T15">(Event, Ticket, UserProfile...)</text:span></text:p>
          <text:p text:style-name="P2"><text:span text:style-name="T15">Immutables : ne changent</text:span></text:p>
          <text:p text:style-name="P2"><text:span text:style-name="T15">pas une fois créés</text:span></text:p>
          <draw:enhanced-geometry svg:viewBox="0 0 21600 21600" draw:type="rectangle" draw:enhanced-path="M 0 0 L 21600 0 21600 21600 0 21600 0 0 Z N"/>
        </draw:custom-shape>
        <draw:custom-shape draw:name="Shape 6" draw:style-name="gr17" draw:text-style-name="P1" draw:layer="layout" svg:width="8.762cm" svg:height="3.504cm" svg:x="16.002cm" svg:y="6.401cm">
          <text:p/>
          <draw:enhanced-geometry svg:viewBox="0 0 21600 21600" draw:type="rectangle" draw:enhanced-path="M 0 0 L 21600 0 21600 21600 0 21600 0 0 Z N"/>
        </draw:custom-shape>
        <draw:custom-shape draw:name="Shape 7" draw:style-name="gr18" draw:text-style-name="P1" draw:layer="layout" svg:width="2.793cm" svg:height="3.504cm" svg:x="16.002cm" svg:y="6.401cm">
          <text:p/>
          <draw:enhanced-geometry svg:viewBox="0 0 21600 21600" draw:type="rectangle" draw:enhanced-path="M 0 0 L 21600 0 21600 21600 0 21600 0 0 Z N"/>
        </draw:custom-shape>
        <draw:custom-shape draw:name="Text 8" draw:style-name="gr2" draw:text-style-name="P3" draw:layer="layout" svg:width="2.742cm" svg:height="3.504cm" svg:x="16.027cm" svg:y="6.401cm">
          <text:p text:style-name="P4"><text:span text:style-name="T7">Repositories</text:span></text:p>
          <text:p text:style-name="P4"><text:span text:style-name="T7">(data)</text:span></text:p>
          <draw:enhanced-geometry svg:viewBox="0 0 21600 21600" draw:type="rectangle" draw:enhanced-path="M 0 0 L 21600 0 21600 21600 0 21600 0 0 Z N"/>
        </draw:custom-shape>
        <draw:custom-shape draw:name="Text 9" draw:style-name="gr2" draw:text-style-name="P3" draw:layer="layout" svg:width="5.587cm" svg:height="3.199cm" svg:x="18.999cm" svg:y="6.553cm">
          <text:p text:style-name="P2"><text:span text:style-name="T15">Accèdent à la base</text:span></text:p>
          <text:p text:style-name="P2"><text:span text:style-name="T15">de données Isar</text:span></text:p>
          <text:p text:style-name="P2"><text:span text:style-name="T15">Exposent des méthodes</text:span></text:p>
          <text:p text:style-name="P2"><text:span text:style-name="T15">simples (getAll, save...)</text:span></text:p>
          <draw:enhanced-geometry svg:viewBox="0 0 21600 21600" draw:type="rectangle" draw:enhanced-path="M 0 0 L 21600 0 21600 21600 0 21600 0 0 Z N"/>
        </draw:custom-shape>
        <draw:custom-shape draw:name="Shape 10" draw:style-name="gr24" draw:text-style-name="P1" draw:layer="layout" svg:width="8.762cm" svg:height="3.504cm" svg:x="16.002cm" svg:y="10.262cm">
          <text:p/>
          <draw:enhanced-geometry svg:viewBox="0 0 21600 21600" draw:type="rectangle" draw:enhanced-path="M 0 0 L 21600 0 21600 21600 0 21600 0 0 Z N"/>
        </draw:custom-shape>
        <draw:custom-shape draw:name="Shape 11" draw:style-name="gr25" draw:text-style-name="P1" draw:layer="layout" svg:width="2.793cm" svg:height="3.504cm" svg:x="16.002cm" svg:y="10.262cm">
          <text:p/>
          <draw:enhanced-geometry svg:viewBox="0 0 21600 21600" draw:type="rectangle" draw:enhanced-path="M 0 0 L 21600 0 21600 21600 0 21600 0 0 Z N"/>
        </draw:custom-shape>
        <draw:custom-shape draw:name="Text 12" draw:style-name="gr2" draw:text-style-name="P3" draw:layer="layout" svg:width="2.742cm" svg:height="3.504cm" svg:x="16.027cm" svg:y="10.262cm">
          <text:p text:style-name="P4"><text:span text:style-name="T7">IsarService</text:span></text:p>
          <text:p text:style-name="P4"><text:span text:style-name="T7">(core)</text:span></text:p>
          <draw:enhanced-geometry svg:viewBox="0 0 21600 21600" draw:type="rectangle" draw:enhanced-path="M 0 0 L 21600 0 21600 21600 0 21600 0 0 Z N"/>
        </draw:custom-shape>
        <draw:custom-shape draw:name="Text 13" draw:style-name="gr2" draw:text-style-name="P3" draw:layer="layout" svg:width="5.587cm" svg:height="3.199cm" svg:x="18.999cm" svg:y="10.414cm">
          <text:p text:style-name="P2"><text:span text:style-name="T15">Gère la connexion</text:span></text:p>
          <text:p text:style-name="P2"><text:span text:style-name="T15">à la base de données</text:span></text:p>
          <text:p text:style-name="P2"><text:span text:style-name="T15">Un seul objet partagé</text:span></text:p>
          <text:p text:style-name="P2"><text:span text:style-name="T15">dans toute l'app</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2cm" svg:y="-9.772cm" draw:page-number="7" presentation:class="page"/>
          <draw:frame draw:name="Notes Placeholder 2" presentation:style-name="pr1" draw:text-style-name="P3" draw:layer="layout" svg:width="15.239cm" svg:height="10cm" svg:x="-0.2cm" svg:y="0cm" presentation:class="notes" presentation:user-transformed="true">
            <draw:text-box>
              <text:p><text:span text:style-name="T8">SLIDE 7 — CLASSES (50 sec)</text:span></text:p>
              <text:p><text:span text:style-name="T8"/></text:p>
              <text:p><text:span text:style-name="T8">CE QUE TU DIS :</text:span></text:p>
              <text:p><text:span text:style-name="T8">"Le diagramme de classes montre comment le code est organisé en objets. On a trois catégories. Les modèles — en violet — définissent les données : Event, Ticket, UserProfile. Ils sont immutables : une fois créés, on ne les modifie pas, on crée une copie si besoin. Les repositories — en bleu — s'occupent d'accéder à la base de données Isar. Et l'IsarService — en noir — est l'objet qui gère la connexion à la base, partagé par tous les repositories."</text:span></text:p>
              <text:p><text:span text:style-name="T8"/></text:p>
              <text:p><text:span text:style-name="T8">POINTER SUR LE DIAGRAMME :</text:span></text:p>
              <text:p><text:span text:style-name="T8">→ </text:span><text:span text:style-name="T8">Pointer UserProfile : "Modèle qui décrit un utilisateur avec ses champs : nom, email, éco-score..."</text:span></text:p>
              <text:p><text:span text:style-name="T8">→ </text:span><text:span text:style-name="T8">Pointer EventRepository : "Il expose des méthodes simples : getAll() pour récupérer tous les événements, toggleFavorite() pour mettre en favori"</text:span></text:p>
              <text:p><text:span text:style-name="T8">→ </text:span><text:span text:style-name="T8">Pointer la flèche "possède" : "Un utilisateur possède plusieurs billets — on retrouve la même relation que dans le MCD"</text:span></text:p>
              <text:p><text:span text:style-name="T8"/></text:p>
              <text:p><text:span text:style-name="T8">QUESTIONS POSSIBLES :</text:span></text:p>
              <text:p><text:span text:style-name="T8">Q : C'est quoi un objet immutable ?</text:span></text:p>
              <text:p><text:span text:style-name="T8">R : "Un objet qu'on ne peut pas modifier après création. Si on veut changer le nom d'un événement, on crée un nouvel objet avec les nouvelles valeurs. Ça évite les bugs où quelque chose modifie une donnée par accident."</text:span></text:p>
              <text:p><text:span text:style-name="T8"/></text:p>
              <text:p><text:span text:style-name="T8">Q : Pourquoi séparer les modèles et les repositories ?</text:span></text:p>
              <text:p><text:span text:style-name="T8">R : "Parce que les modèles définissent QUOI (la structure des données) et les repositories définissent COMMENT (comment on les stocke et récupère). Si on change de base de données, on ne touche qu'aux repositories."</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8" draw:style-name="dp3" draw:master-page-name="Standard">
        <draw:custom-shape draw:name="Text 0" draw:style-name="gr2" draw:text-style-name="P3" draw:layer="layout" svg:width="22.859cm" svg:height="1.269cm" svg:x="1.27cm" svg:y="0.559cm">
          <text:p text:style-name="P2"><text:span text:style-name="T14">Diagramme d'Activité UML</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8cm">
          <text:p text:style-name="P2"><text:span text:style-name="T12">Parcours principal de l'utilisateur · 3 couloirs d'acteurs</text:span></text:p>
          <draw:enhanced-geometry svg:viewBox="0 0 21600 21600" draw:type="rectangle" draw:enhanced-path="M 0 0 L 21600 0 21600 21600 0 21600 0 0 Z N"/>
        </draw:custom-shape>
        <draw:frame draw:name="Image 0" draw:style-name="gr12" draw:text-style-name="P7" draw:layer="layout" svg:width="11.429cm" svg:height="10.921cm" svg:x="0.762cm" svg:y="2.54cm">
          <draw:image xlink:href="Pictures/100002010000096000000D201C0A9194.png" xlink:type="simple" xlink:show="embed" xlink:actuate="onLoad">
            <text:p/>
          </draw:image>
        </draw:frame>
        <draw:custom-shape draw:name="Text 2" draw:style-name="gr2" draw:text-style-name="P3" draw:layer="layout" svg:width="11.683cm" svg:height="0.761cm" svg:x="12.954cm" svg:y="2.54cm">
          <text:p text:style-name="P2"><text:span text:style-name="T20">Éléments du diagramme :</text:span></text:p>
          <draw:enhanced-geometry svg:viewBox="0 0 21600 21600" draw:type="rectangle" draw:enhanced-path="M 0 0 L 21600 0 21600 21600 0 21600 0 0 Z N"/>
        </draw:custom-shape>
        <draw:custom-shape draw:name="Shape 3" draw:style-name="gr13" draw:text-style-name="P1" draw:layer="layout" svg:width="11.683cm" svg:height="1.675cm" svg:x="12.954cm" svg:y="3.505cm">
          <text:p/>
          <draw:enhanced-geometry svg:viewBox="0 0 21600 21600" draw:type="rectangle" draw:enhanced-path="M 0 0 L 21600 0 21600 21600 0 21600 0 0 Z N"/>
        </draw:custom-shape>
        <draw:custom-shape draw:name="Text 4" draw:style-name="gr2" draw:text-style-name="P3" draw:layer="layout" svg:width="1.523cm" svg:height="1.574cm" svg:x="13.081cm" svg:y="3.556cm">
          <text:p text:style-name="P4"><text:span text:style-name="T19">●</text:span></text:p>
          <draw:enhanced-geometry svg:viewBox="0 0 21600 21600" draw:type="rectangle" draw:enhanced-path="M 0 0 L 21600 0 21600 21600 0 21600 0 0 Z N"/>
        </draw:custom-shape>
        <draw:custom-shape draw:name="Shape 5" draw:style-name="gr23" draw:text-style-name="P1" draw:layer="layout" svg:width="0.101cm" svg:height="1.523cm" svg:x="14.478cm" svg:y="3.556cm">
          <text:p/>
          <draw:enhanced-geometry svg:viewBox="0 0 21600 21600" draw:type="rectangle" draw:enhanced-path="M 0 0 L 21600 0 21600 21600 0 21600 0 0 Z N"/>
        </draw:custom-shape>
        <draw:custom-shape draw:name="Text 6" draw:style-name="gr2" draw:text-style-name="P3" draw:layer="layout" svg:width="4.063cm" svg:height="0.659cm" svg:x="14.732cm" svg:y="3.607cm">
          <text:p text:style-name="P2"><text:span text:style-name="T7">Début / Fin</text:span></text:p>
          <draw:enhanced-geometry svg:viewBox="0 0 21600 21600" draw:type="rectangle" draw:enhanced-path="M 0 0 L 21600 0 21600 21600 0 21600 0 0 Z N"/>
        </draw:custom-shape>
        <draw:custom-shape draw:name="Text 7" draw:style-name="gr2" draw:text-style-name="P3" draw:layer="layout" svg:width="9.651cm" svg:height="0.659cm" svg:x="14.732cm" svg:y="4.267cm">
          <text:p text:style-name="P2"><text:span text:style-name="T21">Point de départ et d'arrivée du parcours</text:span></text:p>
          <draw:enhanced-geometry svg:viewBox="0 0 21600 21600" draw:type="rectangle" draw:enhanced-path="M 0 0 L 21600 0 21600 21600 0 21600 0 0 Z N"/>
        </draw:custom-shape>
        <draw:custom-shape draw:name="Shape 8" draw:style-name="gr17" draw:text-style-name="P1" draw:layer="layout" svg:width="11.683cm" svg:height="1.675cm" svg:x="12.954cm" svg:y="5.436cm">
          <text:p/>
          <draw:enhanced-geometry svg:viewBox="0 0 21600 21600" draw:type="rectangle" draw:enhanced-path="M 0 0 L 21600 0 21600 21600 0 21600 0 0 Z N"/>
        </draw:custom-shape>
        <draw:custom-shape draw:name="Text 9" draw:style-name="gr2" draw:text-style-name="P3" draw:layer="layout" svg:width="1.523cm" svg:height="1.574cm" svg:x="13.081cm" svg:y="5.486cm">
          <text:p text:style-name="P4"><text:span text:style-name="T19">□</text:span></text:p>
          <draw:enhanced-geometry svg:viewBox="0 0 21600 21600" draw:type="rectangle" draw:enhanced-path="M 0 0 L 21600 0 21600 21600 0 21600 0 0 Z N"/>
        </draw:custom-shape>
        <draw:custom-shape draw:name="Shape 10" draw:style-name="gr23" draw:text-style-name="P1" draw:layer="layout" svg:width="0.101cm" svg:height="1.523cm" svg:x="14.478cm" svg:y="5.486cm">
          <text:p/>
          <draw:enhanced-geometry svg:viewBox="0 0 21600 21600" draw:type="rectangle" draw:enhanced-path="M 0 0 L 21600 0 21600 21600 0 21600 0 0 Z N"/>
        </draw:custom-shape>
        <draw:custom-shape draw:name="Text 11" draw:style-name="gr2" draw:text-style-name="P3" draw:layer="layout" svg:width="4.063cm" svg:height="0.659cm" svg:x="14.732cm" svg:y="5.537cm">
          <text:p text:style-name="P2"><text:span text:style-name="T7">Action</text:span></text:p>
          <draw:enhanced-geometry svg:viewBox="0 0 21600 21600" draw:type="rectangle" draw:enhanced-path="M 0 0 L 21600 0 21600 21600 0 21600 0 0 Z N"/>
        </draw:custom-shape>
        <draw:custom-shape draw:name="Text 12" draw:style-name="gr2" draw:text-style-name="P3" draw:layer="layout" svg:width="9.651cm" svg:height="0.659cm" svg:x="14.732cm" svg:y="6.198cm">
          <text:p text:style-name="P2"><text:span text:style-name="T21">Une étape réalisée par un acteur</text:span></text:p>
          <draw:enhanced-geometry svg:viewBox="0 0 21600 21600" draw:type="rectangle" draw:enhanced-path="M 0 0 L 21600 0 21600 21600 0 21600 0 0 Z N"/>
        </draw:custom-shape>
        <draw:custom-shape draw:name="Shape 13" draw:style-name="gr19" draw:text-style-name="P1" draw:layer="layout" svg:width="11.683cm" svg:height="1.675cm" svg:x="12.954cm" svg:y="7.366cm">
          <text:p/>
          <draw:enhanced-geometry svg:viewBox="0 0 21600 21600" draw:type="rectangle" draw:enhanced-path="M 0 0 L 21600 0 21600 21600 0 21600 0 0 Z N"/>
        </draw:custom-shape>
        <draw:custom-shape draw:name="Text 14" draw:style-name="gr2" draw:text-style-name="P3" draw:layer="layout" svg:width="1.523cm" svg:height="1.574cm" svg:x="13.081cm" svg:y="7.417cm">
          <text:p text:style-name="P4"><text:span text:style-name="T19">◇</text:span></text:p>
          <draw:enhanced-geometry svg:viewBox="0 0 21600 21600" draw:type="rectangle" draw:enhanced-path="M 0 0 L 21600 0 21600 21600 0 21600 0 0 Z N"/>
        </draw:custom-shape>
        <draw:custom-shape draw:name="Shape 15" draw:style-name="gr23" draw:text-style-name="P1" draw:layer="layout" svg:width="0.101cm" svg:height="1.523cm" svg:x="14.478cm" svg:y="7.417cm">
          <text:p/>
          <draw:enhanced-geometry svg:viewBox="0 0 21600 21600" draw:type="rectangle" draw:enhanced-path="M 0 0 L 21600 0 21600 21600 0 21600 0 0 Z N"/>
        </draw:custom-shape>
        <draw:custom-shape draw:name="Text 16" draw:style-name="gr2" draw:text-style-name="P3" draw:layer="layout" svg:width="4.063cm" svg:height="0.659cm" svg:x="14.732cm" svg:y="7.468cm">
          <text:p text:style-name="P2"><text:span text:style-name="T7">Décision</text:span></text:p>
          <draw:enhanced-geometry svg:viewBox="0 0 21600 21600" draw:type="rectangle" draw:enhanced-path="M 0 0 L 21600 0 21600 21600 0 21600 0 0 Z N"/>
        </draw:custom-shape>
        <draw:custom-shape draw:name="Text 17" draw:style-name="gr2" draw:text-style-name="P3" draw:layer="layout" svg:width="9.651cm" svg:height="0.659cm" svg:x="14.732cm" svg:y="8.128cm">
          <text:p text:style-name="P2"><text:span text:style-name="T21">Un choix (acheter ou sauvegarder ?)</text:span></text:p>
          <draw:enhanced-geometry svg:viewBox="0 0 21600 21600" draw:type="rectangle" draw:enhanced-path="M 0 0 L 21600 0 21600 21600 0 21600 0 0 Z N"/>
        </draw:custom-shape>
        <draw:custom-shape draw:name="Shape 18" draw:style-name="gr16" draw:text-style-name="P1" draw:layer="layout" svg:width="11.683cm" svg:height="1.675cm" svg:x="12.954cm" svg:y="9.296cm">
          <text:p/>
          <draw:enhanced-geometry svg:viewBox="0 0 21600 21600" draw:type="rectangle" draw:enhanced-path="M 0 0 L 21600 0 21600 21600 0 21600 0 0 Z N"/>
        </draw:custom-shape>
        <draw:custom-shape draw:name="Text 19" draw:style-name="gr2" draw:text-style-name="P3" draw:layer="layout" svg:width="1.523cm" svg:height="1.574cm" svg:x="13.081cm" svg:y="9.347cm">
          <text:p text:style-name="P4"><text:span text:style-name="T19">══</text:span></text:p>
          <draw:enhanced-geometry svg:viewBox="0 0 21600 21600" draw:type="rectangle" draw:enhanced-path="M 0 0 L 21600 0 21600 21600 0 21600 0 0 Z N"/>
        </draw:custom-shape>
        <draw:custom-shape draw:name="Shape 20" draw:style-name="gr23" draw:text-style-name="P1" draw:layer="layout" svg:width="0.101cm" svg:height="1.523cm" svg:x="14.478cm" svg:y="9.347cm">
          <text:p/>
          <draw:enhanced-geometry svg:viewBox="0 0 21600 21600" draw:type="rectangle" draw:enhanced-path="M 0 0 L 21600 0 21600 21600 0 21600 0 0 Z N"/>
        </draw:custom-shape>
        <draw:custom-shape draw:name="Text 21" draw:style-name="gr2" draw:text-style-name="P3" draw:layer="layout" svg:width="4.063cm" svg:height="0.659cm" svg:x="14.732cm" svg:y="9.398cm">
          <text:p text:style-name="P2"><text:span text:style-name="T7">Fork / Join</text:span></text:p>
          <draw:enhanced-geometry svg:viewBox="0 0 21600 21600" draw:type="rectangle" draw:enhanced-path="M 0 0 L 21600 0 21600 21600 0 21600 0 0 Z N"/>
        </draw:custom-shape>
        <draw:custom-shape draw:name="Text 22" draw:style-name="gr2" draw:text-style-name="P3" draw:layer="layout" svg:width="9.651cm" svg:height="0.659cm" svg:x="14.732cm" svg:y="10.058cm">
          <text:p text:style-name="P2"><text:span text:style-name="T21">Activités parallèles indépendantes</text:span></text:p>
          <draw:enhanced-geometry svg:viewBox="0 0 21600 21600" draw:type="rectangle" draw:enhanced-path="M 0 0 L 21600 0 21600 21600 0 21600 0 0 Z N"/>
        </draw:custom-shape>
        <draw:custom-shape draw:name="Shape 23" draw:style-name="gr14" draw:text-style-name="P1" draw:layer="layout" svg:width="11.683cm" svg:height="1.675cm" svg:x="12.954cm" svg:y="11.227cm">
          <text:p/>
          <draw:enhanced-geometry svg:viewBox="0 0 21600 21600" draw:type="rectangle" draw:enhanced-path="M 0 0 L 21600 0 21600 21600 0 21600 0 0 Z N"/>
        </draw:custom-shape>
        <draw:custom-shape draw:name="Text 24" draw:style-name="gr2" draw:text-style-name="P3" draw:layer="layout" svg:width="1.523cm" svg:height="1.574cm" svg:x="13.081cm" svg:y="11.278cm">
          <text:p text:style-name="P4"><text:span text:style-name="T19">│ │</text:span></text:p>
          <draw:enhanced-geometry svg:viewBox="0 0 21600 21600" draw:type="rectangle" draw:enhanced-path="M 0 0 L 21600 0 21600 21600 0 21600 0 0 Z N"/>
        </draw:custom-shape>
        <draw:custom-shape draw:name="Shape 25" draw:style-name="gr23" draw:text-style-name="P1" draw:layer="layout" svg:width="0.101cm" svg:height="1.523cm" svg:x="14.478cm" svg:y="11.278cm">
          <text:p/>
          <draw:enhanced-geometry svg:viewBox="0 0 21600 21600" draw:type="rectangle" draw:enhanced-path="M 0 0 L 21600 0 21600 21600 0 21600 0 0 Z N"/>
        </draw:custom-shape>
        <draw:custom-shape draw:name="Text 26" draw:style-name="gr2" draw:text-style-name="P3" draw:layer="layout" svg:width="4.063cm" svg:height="0.659cm" svg:x="14.732cm" svg:y="11.328cm">
          <text:p text:style-name="P2"><text:span text:style-name="T7">Couloirs (swimlanes)</text:span></text:p>
          <draw:enhanced-geometry svg:viewBox="0 0 21600 21600" draw:type="rectangle" draw:enhanced-path="M 0 0 L 21600 0 21600 21600 0 21600 0 0 Z N"/>
        </draw:custom-shape>
        <draw:custom-shape draw:name="Text 27" draw:style-name="gr2" draw:text-style-name="P3" draw:layer="layout" svg:width="9.651cm" svg:height="0.659cm" svg:x="14.732cm" svg:y="11.989cm">
          <text:p text:style-name="P2"><text:span text:style-name="T21">Qui est responsable de chaque action</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4cm" svg:y="-10.172cm" draw:page-number="8" presentation:class="page"/>
          <draw:frame draw:name="Notes Placeholder 2" presentation:style-name="pr1" draw:text-style-name="P3" draw:layer="layout" svg:width="15.239cm" svg:height="10cm" svg:x="-0.039cm" svg:y="-0.2cm" presentation:class="notes" presentation:user-transformed="true">
            <draw:text-box>
              <text:p><text:span text:style-name="T8">SLIDE 8 — ACTIVITÉ (45 sec)</text:span></text:p>
              <text:p><text:span text:style-name="T8"/></text:p>
              <text:p><text:span text:style-name="T8">CE QUE TU DIS :</text:span></text:p>
              <text:p><text:span text:style-name="T8">"Le diagramme d'activité montre comment se déroule le parcours principal de l'utilisateur, du début à la fin. Il est découpé en 3 couloirs : ce que fait l'Utilisateur, ce que fait le Système automatiquement, et ce que fait l'Organisateur.</text:span></text:p>
              <text:p><text:span text:style-name="T8"/></text:p>
              <text:p><text:span text:style-name="T8">Le point intéressant, c'est ce fork après le paiement — les deux barres horizontales épaisses. Ça signifie que la planification du transport et la réservation de l'hébergement sont indépendantes : l'utilisateur peut faire l'une sans l'autre, dans n'importe quel ordre."</text:span></text:p>
              <text:p><text:span text:style-name="T8"/></text:p>
              <text:p><text:span text:style-name="T8">POINTER SUR LE DIAGRAMME :</text:span></text:p>
              <text:p><text:span text:style-name="T8">→ </text:span><text:span text:style-name="T8">Pointer le cercle de départ : "On commence ici — l'utilisateur ouvre l'app"</text:span></text:p>
              <text:p><text:span text:style-name="T8">→ </text:span><text:span text:style-name="T8">Pointer le losange : "Première décision : acheter ou mettre en favori ?"</text:span></text:p>
              <text:p><text:span text:style-name="T8">→ </text:span><text:span text:style-name="T8">Pointer le fork : "Après l'achat, transport et hébergement sont indépendants"</text:span></text:p>
              <text:p><text:span text:style-name="T8">→ </text:span><text:span text:style-name="T8">Pointer le couloir Système : "Le système envoie automatiquement les notifications et génère le QR code"</text:span></text:p>
              <text:p><text:span text:style-name="T8"/></text:p>
              <text:p><text:span text:style-name="T8">QUESTIONS POSSIBLES :</text:span></text:p>
              <text:p><text:span text:style-name="T8">Q : C'est quoi un swimlane ?</text:span></text:p>
              <text:p><text:span text:style-name="T8">R : "C'est un couloir dans le diagramme qui montre quel acteur est responsable de quelle action. Ici 3 couloirs : l'Utilisateur qui interagit, le Système qui automatise, l'Organisateur qui contrôle."</text:span></text:p>
              <text:p><text:span text:style-name="T8"/></text:p>
              <text:p><text:span text:style-name="T8">Q : Pourquoi utiliser un fork ici ?</text:span></text:p>
              <text:p><text:span text:style-name="T8">R : "Pour montrer que ces deux activités sont indépendantes — l'utilisateur peut réserver son transport sans réserver d'hébergement. Le fork ne veut pas dire que ça se passe en même temps, mais qu'il n'y a pas de dépendance entre les deux."</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9" draw:style-name="dp3" draw:master-page-name="Standard">
        <draw:custom-shape draw:name="Text 0" draw:style-name="gr2" draw:text-style-name="P3" draw:layer="layout" svg:width="22.859cm" svg:height="1.269cm" svg:x="1.27cm" svg:y="0.559cm">
          <text:p text:style-name="P2"><text:span text:style-name="T14">Parcours Utilisateurs</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8cm">
          <text:p text:style-name="P2"><text:span text:style-name="T12">5 flowcharts — du premier clic au bilan post-événement</text:span></text:p>
          <draw:enhanced-geometry svg:viewBox="0 0 21600 21600" draw:type="rectangle" draw:enhanced-path="M 0 0 L 21600 0 21600 21600 0 21600 0 0 Z N"/>
        </draw:custom-shape>
        <draw:frame draw:name="Image 0" draw:style-name="gr12" draw:text-style-name="P7" draw:layer="layout" svg:width="8.889cm" svg:height="10.667cm" svg:x="0.762cm" svg:y="2.54cm">
          <draw:image xlink:href="Pictures/100002010000096000000C8072C9976B.png" xlink:type="simple" xlink:show="embed" xlink:actuate="onLoad">
            <text:p/>
          </draw:image>
        </draw:frame>
        <draw:custom-shape draw:name="Shape 2" draw:style-name="gr13" draw:text-style-name="P1" draw:layer="layout" svg:width="14.35cm" svg:height="1.879cm" svg:x="10.287cm" svg:y="2.54cm">
          <text:p/>
          <draw:enhanced-geometry svg:viewBox="0 0 21600 21600" draw:type="rectangle" draw:enhanced-path="M 0 0 L 21600 0 21600 21600 0 21600 0 0 Z N"/>
        </draw:custom-shape>
        <draw:custom-shape draw:name="Shape 3" draw:style-name="gr1" draw:text-style-name="P1" draw:layer="layout" svg:width="1.117cm" svg:height="1.879cm" svg:x="10.287cm" svg:y="2.54cm">
          <text:p/>
          <draw:enhanced-geometry svg:viewBox="0 0 21600 21600" draw:type="rectangle" draw:enhanced-path="M 0 0 L 21600 0 21600 21600 0 21600 0 0 Z N"/>
        </draw:custom-shape>
        <draw:custom-shape draw:name="Text 4" draw:style-name="gr2" draw:text-style-name="P3" draw:layer="layout" svg:width="1.117cm" svg:height="1.879cm" svg:x="10.287cm" svg:y="2.54cm">
          <text:p text:style-name="P4"><text:span text:style-name="T22">1</text:span></text:p>
          <draw:enhanced-geometry svg:viewBox="0 0 21600 21600" draw:type="rectangle" draw:enhanced-path="M 0 0 L 21600 0 21600 21600 0 21600 0 0 Z N"/>
        </draw:custom-shape>
        <draw:custom-shape draw:name="Text 5" draw:style-name="gr2" draw:text-style-name="P3" draw:layer="layout" svg:width="12.699cm" svg:height="0.71cm" svg:x="11.633cm" svg:y="2.692cm">
          <text:p text:style-name="P2"><text:span text:style-name="T20">Achat de billet</text:span></text:p>
          <draw:enhanced-geometry svg:viewBox="0 0 21600 21600" draw:type="rectangle" draw:enhanced-path="M 0 0 L 21600 0 21600 21600 0 21600 0 0 Z N"/>
        </draw:custom-shape>
        <draw:custom-shape draw:name="Text 6" draw:style-name="gr2" draw:text-style-name="P3" draw:layer="layout" svg:width="12.699cm" svg:height="0.609cm" svg:x="11.633cm" svg:y="3.404cm">
          <text:p text:style-name="P2"><text:span text:style-name="T6">Découverte → QR code en main</text:span></text:p>
          <draw:enhanced-geometry svg:viewBox="0 0 21600 21600" draw:type="rectangle" draw:enhanced-path="M 0 0 L 21600 0 21600 21600 0 21600 0 0 Z N"/>
        </draw:custom-shape>
        <draw:custom-shape draw:name="Shape 7" draw:style-name="gr16" draw:text-style-name="P1" draw:layer="layout" svg:width="14.35cm" svg:height="1.879cm" svg:x="10.287cm" svg:y="4.724cm">
          <text:p/>
          <draw:enhanced-geometry svg:viewBox="0 0 21600 21600" draw:type="rectangle" draw:enhanced-path="M 0 0 L 21600 0 21600 21600 0 21600 0 0 Z N"/>
        </draw:custom-shape>
        <draw:custom-shape draw:name="Shape 8" draw:style-name="gr8" draw:text-style-name="P1" draw:layer="layout" svg:width="1.117cm" svg:height="1.879cm" svg:x="10.287cm" svg:y="4.724cm">
          <text:p/>
          <draw:enhanced-geometry svg:viewBox="0 0 21600 21600" draw:type="rectangle" draw:enhanced-path="M 0 0 L 21600 0 21600 21600 0 21600 0 0 Z N"/>
        </draw:custom-shape>
        <draw:custom-shape draw:name="Text 9" draw:style-name="gr2" draw:text-style-name="P3" draw:layer="layout" svg:width="1.117cm" svg:height="1.879cm" svg:x="10.287cm" svg:y="4.724cm">
          <text:p text:style-name="P4"><text:span text:style-name="T22">2</text:span></text:p>
          <draw:enhanced-geometry svg:viewBox="0 0 21600 21600" draw:type="rectangle" draw:enhanced-path="M 0 0 L 21600 0 21600 21600 0 21600 0 0 Z N"/>
        </draw:custom-shape>
        <draw:custom-shape draw:name="Text 10" draw:style-name="gr2" draw:text-style-name="P3" draw:layer="layout" svg:width="12.699cm" svg:height="0.71cm" svg:x="11.633cm" svg:y="4.877cm">
          <text:p text:style-name="P2"><text:span text:style-name="T20">Transport bas carbone</text:span></text:p>
          <draw:enhanced-geometry svg:viewBox="0 0 21600 21600" draw:type="rectangle" draw:enhanced-path="M 0 0 L 21600 0 21600 21600 0 21600 0 0 Z N"/>
        </draw:custom-shape>
        <draw:custom-shape draw:name="Text 11" draw:style-name="gr2" draw:text-style-name="P3" draw:layer="layout" svg:width="12.699cm" svg:height="0.609cm" svg:x="11.633cm" svg:y="5.588cm">
          <text:p text:style-name="P2"><text:span text:style-name="T6">Comparaison CO₂ → réservation</text:span></text:p>
          <draw:enhanced-geometry svg:viewBox="0 0 21600 21600" draw:type="rectangle" draw:enhanced-path="M 0 0 L 21600 0 21600 21600 0 21600 0 0 Z N"/>
        </draw:custom-shape>
        <draw:custom-shape draw:name="Shape 12" draw:style-name="gr14" draw:text-style-name="P1" draw:layer="layout" svg:width="14.35cm" svg:height="1.879cm" svg:x="10.287cm" svg:y="6.909cm">
          <text:p/>
          <draw:enhanced-geometry svg:viewBox="0 0 21600 21600" draw:type="rectangle" draw:enhanced-path="M 0 0 L 21600 0 21600 21600 0 21600 0 0 Z N"/>
        </draw:custom-shape>
        <draw:custom-shape draw:name="Shape 13" draw:style-name="gr15" draw:text-style-name="P1" draw:layer="layout" svg:width="1.117cm" svg:height="1.879cm" svg:x="10.287cm" svg:y="6.909cm">
          <text:p/>
          <draw:enhanced-geometry svg:viewBox="0 0 21600 21600" draw:type="rectangle" draw:enhanced-path="M 0 0 L 21600 0 21600 21600 0 21600 0 0 Z N"/>
        </draw:custom-shape>
        <draw:custom-shape draw:name="Text 14" draw:style-name="gr2" draw:text-style-name="P3" draw:layer="layout" svg:width="1.117cm" svg:height="1.879cm" svg:x="10.287cm" svg:y="6.909cm">
          <text:p text:style-name="P4"><text:span text:style-name="T22">3</text:span></text:p>
          <draw:enhanced-geometry svg:viewBox="0 0 21600 21600" draw:type="rectangle" draw:enhanced-path="M 0 0 L 21600 0 21600 21600 0 21600 0 0 Z N"/>
        </draw:custom-shape>
        <draw:custom-shape draw:name="Text 15" draw:style-name="gr2" draw:text-style-name="P3" draw:layer="layout" svg:width="12.699cm" svg:height="0.71cm" svg:x="11.633cm" svg:y="7.061cm">
          <text:p text:style-name="P2"><text:span text:style-name="T20">Hébergement</text:span></text:p>
          <draw:enhanced-geometry svg:viewBox="0 0 21600 21600" draw:type="rectangle" draw:enhanced-path="M 0 0 L 21600 0 21600 21600 0 21600 0 0 Z N"/>
        </draw:custom-shape>
        <draw:custom-shape draw:name="Text 16" draw:style-name="gr2" draw:text-style-name="P3" draw:layer="layout" svg:width="12.699cm" svg:height="0.609cm" svg:x="11.633cm" svg:y="7.772cm">
          <text:p text:style-name="P2"><text:span text:style-name="T6">Suggestion → confirmation</text:span></text:p>
          <draw:enhanced-geometry svg:viewBox="0 0 21600 21600" draw:type="rectangle" draw:enhanced-path="M 0 0 L 21600 0 21600 21600 0 21600 0 0 Z N"/>
        </draw:custom-shape>
        <draw:custom-shape draw:name="Shape 17" draw:style-name="gr19" draw:text-style-name="P1" draw:layer="layout" svg:width="14.35cm" svg:height="1.879cm" svg:x="10.287cm" svg:y="9.093cm">
          <text:p/>
          <draw:enhanced-geometry svg:viewBox="0 0 21600 21600" draw:type="rectangle" draw:enhanced-path="M 0 0 L 21600 0 21600 21600 0 21600 0 0 Z N"/>
        </draw:custom-shape>
        <draw:custom-shape draw:name="Shape 18" draw:style-name="gr20" draw:text-style-name="P1" draw:layer="layout" svg:width="1.117cm" svg:height="1.879cm" svg:x="10.287cm" svg:y="9.093cm">
          <text:p/>
          <draw:enhanced-geometry svg:viewBox="0 0 21600 21600" draw:type="rectangle" draw:enhanced-path="M 0 0 L 21600 0 21600 21600 0 21600 0 0 Z N"/>
        </draw:custom-shape>
        <draw:custom-shape draw:name="Text 19" draw:style-name="gr2" draw:text-style-name="P3" draw:layer="layout" svg:width="1.117cm" svg:height="1.879cm" svg:x="10.287cm" svg:y="9.093cm">
          <text:p text:style-name="P4"><text:span text:style-name="T22">4</text:span></text:p>
          <draw:enhanced-geometry svg:viewBox="0 0 21600 21600" draw:type="rectangle" draw:enhanced-path="M 0 0 L 21600 0 21600 21600 0 21600 0 0 Z N"/>
        </draw:custom-shape>
        <draw:custom-shape draw:name="Text 20" draw:style-name="gr2" draw:text-style-name="P3" draw:layer="layout" svg:width="12.699cm" svg:height="0.71cm" svg:x="11.633cm" svg:y="9.246cm">
          <text:p text:style-name="P2"><text:span text:style-name="T20">Jour J</text:span></text:p>
          <draw:enhanced-geometry svg:viewBox="0 0 21600 21600" draw:type="rectangle" draw:enhanced-path="M 0 0 L 21600 0 21600 21600 0 21600 0 0 Z N"/>
        </draw:custom-shape>
        <draw:custom-shape draw:name="Text 21" draw:style-name="gr2" draw:text-style-name="P3" draw:layer="layout" svg:width="12.699cm" svg:height="0.609cm" svg:x="11.633cm" svg:y="9.957cm">
          <text:p text:style-name="P2"><text:span text:style-name="T6">Scan entrée → bilan post-event</text:span></text:p>
          <draw:enhanced-geometry svg:viewBox="0 0 21600 21600" draw:type="rectangle" draw:enhanced-path="M 0 0 L 21600 0 21600 21600 0 21600 0 0 Z N"/>
        </draw:custom-shape>
        <draw:custom-shape draw:name="Shape 22" draw:style-name="gr17" draw:text-style-name="P1" draw:layer="layout" svg:width="14.35cm" svg:height="1.879cm" svg:x="10.287cm" svg:y="11.278cm">
          <text:p/>
          <draw:enhanced-geometry svg:viewBox="0 0 21600 21600" draw:type="rectangle" draw:enhanced-path="M 0 0 L 21600 0 21600 21600 0 21600 0 0 Z N"/>
        </draw:custom-shape>
        <draw:custom-shape draw:name="Shape 23" draw:style-name="gr18" draw:text-style-name="P1" draw:layer="layout" svg:width="1.117cm" svg:height="1.879cm" svg:x="10.287cm" svg:y="11.278cm">
          <text:p/>
          <draw:enhanced-geometry svg:viewBox="0 0 21600 21600" draw:type="rectangle" draw:enhanced-path="M 0 0 L 21600 0 21600 21600 0 21600 0 0 Z N"/>
        </draw:custom-shape>
        <draw:custom-shape draw:name="Text 24" draw:style-name="gr2" draw:text-style-name="P3" draw:layer="layout" svg:width="1.117cm" svg:height="1.879cm" svg:x="10.287cm" svg:y="11.278cm">
          <text:p text:style-name="P4"><text:span text:style-name="T22">5</text:span></text:p>
          <draw:enhanced-geometry svg:viewBox="0 0 21600 21600" draw:type="rectangle" draw:enhanced-path="M 0 0 L 21600 0 21600 21600 0 21600 0 0 Z N"/>
        </draw:custom-shape>
        <draw:custom-shape draw:name="Text 25" draw:style-name="gr2" draw:text-style-name="P3" draw:layer="layout" svg:width="12.699cm" svg:height="0.71cm" svg:x="11.633cm" svg:y="11.43cm">
          <text:p text:style-name="P2"><text:span text:style-name="T20">Vue d'ensemble</text:span></text:p>
          <draw:enhanced-geometry svg:viewBox="0 0 21600 21600" draw:type="rectangle" draw:enhanced-path="M 0 0 L 21600 0 21600 21600 0 21600 0 0 Z N"/>
        </draw:custom-shape>
        <draw:custom-shape draw:name="Text 26" draw:style-name="gr2" draw:text-style-name="P3" draw:layer="layout" svg:width="12.699cm" svg:height="0.609cm" svg:x="11.633cm" svg:y="12.141cm">
          <text:p text:style-name="P2"><text:span text:style-name="T6">J-30 à J+1, tous les acteurs</text:span></text:p>
          <draw:enhanced-geometry svg:viewBox="0 0 21600 21600" draw:type="rectangle" draw:enhanced-path="M 0 0 L 21600 0 21600 21600 0 21600 0 0 Z N"/>
        </draw:custom-shape>
        <draw:custom-shape draw:name="Shape 27" draw:style-name="gr26" draw:text-style-name="P1" draw:layer="layout" svg:width="24.002cm" svg:height="0.812cm" svg:x="0.762cm" svg:y="13.208cm">
          <text:p/>
          <draw:enhanced-geometry svg:viewBox="0 0 21600 21600" draw:type="rectangle" draw:enhanced-path="M 0 0 L 21600 0 21600 21600 0 21600 0 0 Z N"/>
        </draw:custom-shape>
        <draw:custom-shape draw:name="Text 28" draw:style-name="gr2" draw:text-style-name="P3" draw:layer="layout" svg:width="23.367cm" svg:height="0.71cm" svg:x="1.016cm" svg:y="13.259cm">
          <text:p text:style-name="P2"><text:span text:style-name="T15">Chaque étape des parcours correspond à des user stories du CDC — le lien entre analyse fonctionnelle et conception</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4cm" svg:y="-9cm" draw:page-number="9" presentation:class="page"/>
          <draw:frame draw:name="Notes Placeholder 2" presentation:style-name="pr1" draw:text-style-name="P3" draw:layer="layout" svg:width="15.239cm" svg:height="10cm" svg:x="-0.039cm" svg:y="0cm" presentation:class="notes" presentation:user-transformed="true">
            <draw:text-box>
              <text:p><text:span text:style-name="T8">SLIDE 9 — PARCOURS (45 sec)</text:span></text:p>
              <text:p><text:span text:style-name="T8"/></text:p>
              <text:p><text:span text:style-name="T8">CE QUE TU DIS :</text:span></text:p>
              <text:p><text:span text:style-name="T8">"Les parcours utilisateurs montrent le chemin que suit l'utilisateur dans l'application. On a modélisé 5 parcours principaux. Le parcours 1, qu'on voit ici, c'est l'achat d'un billet en 8 étapes. On voit les actions de l'utilisateur, mais aussi ce que le système fait automatiquement : générer le QR code, envoyer la notification de confirmation.</text:span></text:p>
              <text:p><text:span text:style-name="T8"/></text:p>
              <text:p><text:span text:style-name="T8">Ces parcours sont directement liés aux user stories de notre CDC — chaque étape correspond à une fonctionnalité documentée."</text:span></text:p>
              <text:p><text:span text:style-name="T8"/></text:p>
              <text:p><text:span text:style-name="T8">POINTER SUR LE DIAGRAMME :</text:span></text:p>
              <text:p><text:span text:style-name="T8">→ </text:span><text:span text:style-name="T8">"Ici l'utilisateur choisit son billet"</text:span></text:p>
              <text:p><text:span text:style-name="T8">→ </text:span><text:span text:style-name="T8">"Là le système génère le QR code signé"</text:span></text:p>
              <text:p><text:span text:style-name="T8">→ </text:span><text:span text:style-name="T8">"Et à la fin, l'app propose automatiquement de planifier le transport"</text:span></text:p>
              <text:p><text:span text:style-name="T8"/></text:p>
              <text:p><text:span text:style-name="T8">QUESTIONS POSSIBLES :</text:span></text:p>
              <text:p><text:span text:style-name="T8">Q : C'est quoi une user story ?</text:span></text:p>
              <text:p><text:span text:style-name="T8">R : "C'est une façon d'écrire une fonctionnalité du point de vue de l'utilisateur. Format : En tant que [utilisateur], je veux [action], afin de [bénéfice]. Par exemple : En tant qu'utilisateur, je veux consulter mon billet hors-ligne, afin de pouvoir entrer dans l'événement sans réseau."</text:span></text:p>
              <text:p><text:span text:style-name="T8"/></text:p>
              <text:p><text:span text:style-name="T8">Q : Pourquoi 5 parcours séparés ?</text:span></text:p>
              <text:p><text:span text:style-name="T8">R : "Pour éviter un diagramme illisible de 30 étapes. Chaque parcours correspond à un module de l'application — billetterie, transport, hébergement..."</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10" draw:style-name="dp1" draw:master-page-name="Standard">
        <draw:custom-shape draw:name="Shape 0" draw:style-name="gr8" draw:text-style-name="P1" draw:layer="layout" svg:width="0.253cm" svg:height="14.287cm" svg:x="0cm" svg:y="0cm">
          <text:p/>
          <draw:enhanced-geometry svg:viewBox="0 0 21600 21600" draw:type="rectangle" draw:enhanced-path="M 0 0 L 21600 0 21600 21600 0 21600 0 0 Z N"/>
        </draw:custom-shape>
        <draw:custom-shape draw:name="Text 1" draw:style-name="gr2" draw:text-style-name="P3" draw:layer="layout" svg:width="22.859cm" svg:height="1.32cm" svg:x="0.889cm" svg:y="0.762cm">
          <text:p text:style-name="P2"><text:span text:style-name="T10">Ce qu'on a produit</text:span></text:p>
          <draw:enhanced-geometry svg:viewBox="0 0 21600 21600" draw:type="rectangle" draw:enhanced-path="M 0 0 L 21600 0 21600 21600 0 21600 0 0 Z N"/>
        </draw:custom-shape>
        <draw:custom-shape draw:name="Shape 2" draw:style-name="gr27" draw:text-style-name="P1" draw:layer="layout" svg:width="11.683cm" svg:height="2.844cm" svg:x="0.889cm" svg:y="2.667cm">
          <text:p/>
          <draw:enhanced-geometry svg:viewBox="0 0 21600 21600" draw:type="rectangle" draw:enhanced-path="M 0 0 L 21600 0 21600 21600 0 21600 0 0 Z N"/>
        </draw:custom-shape>
        <draw:custom-shape draw:name="Text 3" draw:style-name="gr2" draw:text-style-name="P3" draw:layer="layout" svg:width="1.396cm" svg:height="1.396cm" svg:x="1.27cm" svg:y="3.378cm">
          <text:p text:style-name="P4"><text:span text:style-name="T2">📱</text:span></text:p>
          <draw:enhanced-geometry svg:viewBox="0 0 21600 21600" draw:type="rectangle" draw:enhanced-path="M 0 0 L 21600 0 21600 21600 0 21600 0 0 Z N"/>
        </draw:custom-shape>
        <draw:custom-shape draw:name="Text 4" draw:style-name="gr2" draw:text-style-name="P3" draw:layer="layout" svg:width="9.397cm" svg:height="0.913cm" svg:x="2.921cm" svg:y="3.023cm">
          <text:p text:style-name="P2"><text:span text:style-name="T20">Application Flutter</text:span></text:p>
          <draw:enhanced-geometry svg:viewBox="0 0 21600 21600" draw:type="rectangle" draw:enhanced-path="M 0 0 L 21600 0 21600 21600 0 21600 0 0 Z N"/>
        </draw:custom-shape>
        <draw:custom-shape draw:name="Text 5" draw:style-name="gr2" draw:text-style-name="P3" draw:layer="layout" svg:width="9.397cm" svg:height="1.015cm" svg:x="2.921cm" svg:y="4.039cm">
          <text:p text:style-name="P2"><text:span text:style-name="T6">Android + iOS + Web · 42 fichiers</text:span></text:p>
          <draw:enhanced-geometry svg:viewBox="0 0 21600 21600" draw:type="rectangle" draw:enhanced-path="M 0 0 L 21600 0 21600 21600 0 21600 0 0 Z N"/>
        </draw:custom-shape>
        <draw:custom-shape draw:name="Shape 6" draw:style-name="gr27" draw:text-style-name="P1" draw:layer="layout" svg:width="11.683cm" svg:height="2.844cm" svg:x="13.208cm" svg:y="2.667cm">
          <text:p/>
          <draw:enhanced-geometry svg:viewBox="0 0 21600 21600" draw:type="rectangle" draw:enhanced-path="M 0 0 L 21600 0 21600 21600 0 21600 0 0 Z N"/>
        </draw:custom-shape>
        <draw:custom-shape draw:name="Text 7" draw:style-name="gr2" draw:text-style-name="P3" draw:layer="layout" svg:width="1.396cm" svg:height="1.396cm" svg:x="13.589cm" svg:y="3.378cm">
          <text:p text:style-name="P4"><text:span text:style-name="T2">📋</text:span></text:p>
          <draw:enhanced-geometry svg:viewBox="0 0 21600 21600" draw:type="rectangle" draw:enhanced-path="M 0 0 L 21600 0 21600 21600 0 21600 0 0 Z N"/>
        </draw:custom-shape>
        <draw:custom-shape draw:name="Text 8" draw:style-name="gr2" draw:text-style-name="P3" draw:layer="layout" svg:width="9.397cm" svg:height="0.913cm" svg:x="15.24cm" svg:y="3.023cm">
          <text:p text:style-name="P2"><text:span text:style-name="T20">CDC complet</text:span></text:p>
          <draw:enhanced-geometry svg:viewBox="0 0 21600 21600" draw:type="rectangle" draw:enhanced-path="M 0 0 L 21600 0 21600 21600 0 21600 0 0 Z N"/>
        </draw:custom-shape>
        <draw:custom-shape draw:name="Text 9" draw:style-name="gr2" draw:text-style-name="P3" draw:layer="layout" svg:width="9.397cm" svg:height="1.015cm" svg:x="15.24cm" svg:y="4.039cm">
          <text:p text:style-name="P2"><text:span text:style-name="T6">60 user stories · 9 modules · planning</text:span></text:p>
          <draw:enhanced-geometry svg:viewBox="0 0 21600 21600" draw:type="rectangle" draw:enhanced-path="M 0 0 L 21600 0 21600 21600 0 21600 0 0 Z N"/>
        </draw:custom-shape>
        <draw:custom-shape draw:name="Shape 10" draw:style-name="gr27" draw:text-style-name="P1" draw:layer="layout" svg:width="11.683cm" svg:height="2.844cm" svg:x="0.889cm" svg:y="5.918cm">
          <text:p/>
          <draw:enhanced-geometry svg:viewBox="0 0 21600 21600" draw:type="rectangle" draw:enhanced-path="M 0 0 L 21600 0 21600 21600 0 21600 0 0 Z N"/>
        </draw:custom-shape>
        <draw:custom-shape draw:name="Text 11" draw:style-name="gr2" draw:text-style-name="P3" draw:layer="layout" svg:width="1.396cm" svg:height="1.396cm" svg:x="1.27cm" svg:y="6.629cm">
          <text:p text:style-name="P4"><text:span text:style-name="T2">🗄️</text:span></text:p>
          <draw:enhanced-geometry svg:viewBox="0 0 21600 21600" draw:type="rectangle" draw:enhanced-path="M 0 0 L 21600 0 21600 21600 0 21600 0 0 Z N"/>
        </draw:custom-shape>
        <draw:custom-shape draw:name="Text 12" draw:style-name="gr2" draw:text-style-name="P3" draw:layer="layout" svg:width="9.397cm" svg:height="0.913cm" svg:x="2.921cm" svg:y="6.274cm">
          <text:p text:style-name="P2"><text:span text:style-name="T20">MCD + MLD + ERD</text:span></text:p>
          <draw:enhanced-geometry svg:viewBox="0 0 21600 21600" draw:type="rectangle" draw:enhanced-path="M 0 0 L 21600 0 21600 21600 0 21600 0 0 Z N"/>
        </draw:custom-shape>
        <draw:custom-shape draw:name="Text 13" draw:style-name="gr2" draw:text-style-name="P3" draw:layer="layout" svg:width="9.397cm" svg:height="1.015cm" svg:x="2.921cm" svg:y="7.29cm">
          <text:p text:style-name="P2"><text:span text:style-name="T6">3 niveaux de modélisation cohérents</text:span></text:p>
          <draw:enhanced-geometry svg:viewBox="0 0 21600 21600" draw:type="rectangle" draw:enhanced-path="M 0 0 L 21600 0 21600 21600 0 21600 0 0 Z N"/>
        </draw:custom-shape>
        <draw:custom-shape draw:name="Shape 14" draw:style-name="gr27" draw:text-style-name="P1" draw:layer="layout" svg:width="11.683cm" svg:height="2.844cm" svg:x="13.208cm" svg:y="5.918cm">
          <text:p/>
          <draw:enhanced-geometry svg:viewBox="0 0 21600 21600" draw:type="rectangle" draw:enhanced-path="M 0 0 L 21600 0 21600 21600 0 21600 0 0 Z N"/>
        </draw:custom-shape>
        <draw:custom-shape draw:name="Text 15" draw:style-name="gr2" draw:text-style-name="P3" draw:layer="layout" svg:width="1.396cm" svg:height="1.396cm" svg:x="13.589cm" svg:y="6.629cm">
          <text:p text:style-name="P4"><text:span text:style-name="T2">📐</text:span></text:p>
          <draw:enhanced-geometry svg:viewBox="0 0 21600 21600" draw:type="rectangle" draw:enhanced-path="M 0 0 L 21600 0 21600 21600 0 21600 0 0 Z N"/>
        </draw:custom-shape>
        <draw:custom-shape draw:name="Text 16" draw:style-name="gr2" draw:text-style-name="P3" draw:layer="layout" svg:width="9.397cm" svg:height="0.913cm" svg:x="15.24cm" svg:y="6.274cm">
          <text:p text:style-name="P2"><text:span text:style-name="T20">Classes + Activité UML</text:span></text:p>
          <draw:enhanced-geometry svg:viewBox="0 0 21600 21600" draw:type="rectangle" draw:enhanced-path="M 0 0 L 21600 0 21600 21600 0 21600 0 0 Z N"/>
        </draw:custom-shape>
        <draw:custom-shape draw:name="Text 17" draw:style-name="gr2" draw:text-style-name="P3" draw:layer="layout" svg:width="9.397cm" svg:height="1.015cm" svg:x="15.24cm" svg:y="7.29cm">
          <text:p text:style-name="P2"><text:span text:style-name="T6">Organisation du code + flux principal</text:span></text:p>
          <draw:enhanced-geometry svg:viewBox="0 0 21600 21600" draw:type="rectangle" draw:enhanced-path="M 0 0 L 21600 0 21600 21600 0 21600 0 0 Z N"/>
        </draw:custom-shape>
        <draw:custom-shape draw:name="Shape 18" draw:style-name="gr27" draw:text-style-name="P1" draw:layer="layout" svg:width="11.683cm" svg:height="2.844cm" svg:x="0.889cm" svg:y="9.169cm">
          <text:p/>
          <draw:enhanced-geometry svg:viewBox="0 0 21600 21600" draw:type="rectangle" draw:enhanced-path="M 0 0 L 21600 0 21600 21600 0 21600 0 0 Z N"/>
        </draw:custom-shape>
        <draw:custom-shape draw:name="Text 19" draw:style-name="gr2" draw:text-style-name="P3" draw:layer="layout" svg:width="1.396cm" svg:height="1.396cm" svg:x="1.27cm" svg:y="9.881cm">
          <text:p text:style-name="P4"><text:span text:style-name="T2">🗺️</text:span></text:p>
          <draw:enhanced-geometry svg:viewBox="0 0 21600 21600" draw:type="rectangle" draw:enhanced-path="M 0 0 L 21600 0 21600 21600 0 21600 0 0 Z N"/>
        </draw:custom-shape>
        <draw:custom-shape draw:name="Text 20" draw:style-name="gr2" draw:text-style-name="P3" draw:layer="layout" svg:width="9.397cm" svg:height="0.913cm" svg:x="2.921cm" svg:y="9.525cm">
          <text:p text:style-name="P2"><text:span text:style-name="T20">5 parcours utilisateurs</text:span></text:p>
          <draw:enhanced-geometry svg:viewBox="0 0 21600 21600" draw:type="rectangle" draw:enhanced-path="M 0 0 L 21600 0 21600 21600 0 21600 0 0 Z N"/>
        </draw:custom-shape>
        <draw:custom-shape draw:name="Text 21" draw:style-name="gr2" draw:text-style-name="P3" draw:layer="layout" svg:width="9.397cm" svg:height="1.015cm" svg:x="2.921cm" svg:y="10.541cm">
          <text:p text:style-name="P2"><text:span text:style-name="T6">De l'achat au bilan post-événement</text:span></text:p>
          <draw:enhanced-geometry svg:viewBox="0 0 21600 21600" draw:type="rectangle" draw:enhanced-path="M 0 0 L 21600 0 21600 21600 0 21600 0 0 Z N"/>
        </draw:custom-shape>
        <draw:custom-shape draw:name="Shape 22" draw:style-name="gr27" draw:text-style-name="P1" draw:layer="layout" svg:width="11.683cm" svg:height="2.844cm" svg:x="13.208cm" svg:y="9.169cm">
          <text:p/>
          <draw:enhanced-geometry svg:viewBox="0 0 21600 21600" draw:type="rectangle" draw:enhanced-path="M 0 0 L 21600 0 21600 21600 0 21600 0 0 Z N"/>
        </draw:custom-shape>
        <draw:custom-shape draw:name="Text 23" draw:style-name="gr2" draw:text-style-name="P3" draw:layer="layout" svg:width="1.396cm" svg:height="1.396cm" svg:x="13.589cm" svg:y="9.881cm">
          <text:p text:style-name="P4"><text:span text:style-name="T2">✏️</text:span></text:p>
          <draw:enhanced-geometry svg:viewBox="0 0 21600 21600" draw:type="rectangle" draw:enhanced-path="M 0 0 L 21600 0 21600 21600 0 21600 0 0 Z N"/>
        </draw:custom-shape>
        <draw:custom-shape draw:name="Text 24" draw:style-name="gr2" draw:text-style-name="P3" draw:layer="layout" svg:width="9.397cm" svg:height="0.913cm" svg:x="15.24cm" svg:y="9.525cm">
          <text:p text:style-name="P2"><text:span text:style-name="T20">Fichier draw.io</text:span></text:p>
          <draw:enhanced-geometry svg:viewBox="0 0 21600 21600" draw:type="rectangle" draw:enhanced-path="M 0 0 L 21600 0 21600 21600 0 21600 0 0 Z N"/>
        </draw:custom-shape>
        <draw:custom-shape draw:name="Text 25" draw:style-name="gr2" draw:text-style-name="P3" draw:layer="layout" svg:width="9.397cm" svg:height="1.015cm" svg:x="15.24cm" svg:y="10.541cm">
          <text:p text:style-name="P2"><text:span text:style-name="T6">8 onglets 100% éditables</text:span></text:p>
          <draw:enhanced-geometry svg:viewBox="0 0 21600 21600" draw:type="rectangle" draw:enhanced-path="M 0 0 L 21600 0 21600 21600 0 21600 0 0 Z N"/>
        </draw:custom-shape>
        <draw:custom-shape draw:name="Text 26" draw:style-name="gr2" draw:text-style-name="P3" draw:layer="layout" svg:width="23.621cm" svg:height="0.964cm" svg:x="0.889cm" svg:y="13.005cm">
          <text:p text:style-name="P4"><text:span text:style-name="T23">Merci — Questions ?</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15.239cm" svg:height="8.572cm" svg:x="-0.239cm" svg:y="-8.772cm" draw:page-number="10" presentation:class="page"/>
          <draw:frame draw:name="Notes Placeholder 2" presentation:style-name="pr1" draw:text-style-name="P3" draw:layer="layout" svg:width="15.239cm" svg:height="10cm" svg:x="0cm" svg:y="0cm" presentation:class="notes" presentation:user-transformed="true">
            <draw:text-box>
              <text:p><text:span text:style-name="T8">SLIDE 10 — CONCLUSION (25 sec)</text:span></text:p>
              <text:p><text:span text:style-name="T8"/></text:p>
              <text:p><text:span text:style-name="T8">CE QUE TU DIS :</text:span></text:p>
              <text:p><text:span text:style-name="T8">"Pour résumer, on a produit une application Flutter complète, un cahier des charges de 60 user stories, une modélisation en 3 niveaux — MCD, MLD, ERD — des diagrammes UML, et tous les fichiers sont éditables dans draw.io. Merci."</text:span></text:p>
              <text:p><text:span text:style-name="T8"/></text:p>
              <text:p><text:span text:style-name="T8">CONSEILS Q&amp;R :</text:span></text:p>
              <text:p><text:span text:style-name="T8">→ </text:span><text:span text:style-name="T8">Prendre 2 secondes avant de répondre — ça rassure</text:span></text:p>
              <text:p><text:span text:style-name="T8">→ </text:span><text:span text:style-name="T8">Si question trop précise sur le code : "Je vais reformuler pour m'assurer de bien répondre..."</text:span></text:p>
              <text:p><text:span text:style-name="T8">→ </text:span><text:span text:style-name="T8">Ne jamais s'excuser d'avoir utilisé des outils — tout le monde le fait</text:span></text:p>
              <text:p><text:span text:style-name="T8"/></text:p>
              <text:p><text:span text:style-name="T8">QUESTIONS FINALES PROBABLES :</text:span></text:p>
              <text:p><text:span text:style-name="T8">Q : Vous avez tout codé vous-mêmes ?</text:span></text:p>
              <text:p><text:span text:style-name="T8">R : "On a travaillé en utilisant les outils modernes disponibles, comme le font les développeurs professionnels aujourd'hui. L'important est qu'on comprend et qu'on peut justifier chaque choix technique."</text:span></text:p>
              <text:p><text:span text:style-name="T8"/></text:p>
              <text:p><text:span text:style-name="T8">Q : Qu'est-ce que vous changeriez si vous recommenciez ?</text:span></text:p>
              <text:p><text:span text:style-name="T8">R : "On partirait sur une base plus simple côté base de données pour éviter le problème de compatibilité web. Et on écrirait les tests unitaires dès le début, pas à la fin."</text:span></text:p>
              <text:p><text:span text:style-name="T8"/></text:p>
              <text:p><text:span text:style-name="T8">Q : C'est quoi votre KPI le plus important ?</text:span></text:p>
              <text:p><text:span text:style-name="T8">R : "Le taux de conversion : est-ce que les utilisateurs qui voient un événement finissent par acheter un billet ? On vise au-dessus de 8%."</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9.429cm" svg:x="1.27cm" svg:y="3.343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5-25T22:22:15.38</dc:date>
    <meta:document-statistic meta:object-count="274"/>
    <meta:generator>OpenOffice/4.1.14$Win32 OpenOffice.org_project/4114m1$Build-9811</meta:generator>
  </office:meta>
</office:document-meta>
</file>