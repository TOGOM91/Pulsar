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21cm" fo:margin-left="-0.191cm" fo:margin-top="0cm" fo:margin-bottom="0cm" table:align="left"/>
    </style:style>
    <style:style style:name="Tableau1.A" style:family="table-column">
      <style:table-column-properties style:column-width="15.921cm"/>
    </style:style>
    <style:style style:name="Tableau1.1" style:family="table-row">
      <style:table-row-properties style:keep-together="true" fo:keep-together="auto"/>
    </style:style>
    <style:style style:name="Tableau1.A1" style:family="table-cell">
      <style:table-cell-properties fo:background-color="#fef3c7" fo:padding-left="0.191cm" fo:padding-right="0.191cm" fo:padding-top="0cm" fo:padding-bottom="0cm" fo:border="0.004cm solid #e2e8f0">
        <style:background-image/>
      </style:table-cell-properties>
    </style:style>
    <style:style style:name="Tableau1.A2" style:family="table-cell">
      <style:table-cell-properties fo:background-color="#ffffff" fo:padding-left="0.191cm" fo:padding-right="0.191cm" fo:padding-top="0cm" fo:padding-bottom="0cm" fo:border-left="0.004cm solid #e2e8f0" fo:border-right="0.004cm solid #e2e8f0" fo:border-top="none" fo:border-bottom="0.004cm solid #e2e8f0">
        <style:background-image/>
      </style:table-cell-properties>
    </style:style>
    <style:style style:name="Tableau2" style:family="table">
      <style:table-properties style:width="15.921cm" fo:margin-left="-0.191cm" fo:margin-top="0cm" fo:margin-bottom="0cm" table:align="left"/>
    </style:style>
    <style:style style:name="Tableau2.A" style:family="table-column">
      <style:table-column-properties style:column-width="15.921cm"/>
    </style:style>
    <style:style style:name="Tableau2.1" style:family="table-row">
      <style:table-row-properties style:keep-together="true" fo:keep-together="auto"/>
    </style:style>
    <style:style style:name="Tableau2.A1" style:family="table-cell">
      <style:table-cell-properties fo:background-color="#ede9fe" fo:padding-left="0.191cm" fo:padding-right="0.191cm" fo:padding-top="0cm" fo:padding-bottom="0cm" fo:border="0.004cm solid #e2e8f0">
        <style:background-image/>
      </style:table-cell-properties>
    </style:style>
    <style:style style:name="Tableau2.A2" style:family="table-cell">
      <style:table-cell-properties fo:background-color="#ffffff" fo:padding-left="0.191cm" fo:padding-right="0.191cm" fo:padding-top="0cm" fo:padding-bottom="0cm" fo:border-left="0.004cm solid #e2e8f0" fo:border-right="0.004cm solid #e2e8f0" fo:border-top="none" fo:border-bottom="0.004cm solid #e2e8f0">
        <style:background-image/>
      </style:table-cell-properties>
    </style:style>
    <style:style style:name="Tableau3" style:family="table">
      <style:table-properties style:width="15.921cm" fo:margin-left="-0.191cm" fo:margin-top="0cm" fo:margin-bottom="0cm" table:align="left"/>
    </style:style>
    <style:style style:name="Tableau3.A" style:family="table-column">
      <style:table-column-properties style:column-width="15.921cm"/>
    </style:style>
    <style:style style:name="Tableau3.1" style:family="table-row">
      <style:table-row-properties style:keep-together="true" fo:keep-together="auto"/>
    </style:style>
    <style:style style:name="Tableau3.A1" style:family="table-cell">
      <style:table-cell-properties fo:background-color="#d1fae5" fo:padding-left="0.191cm" fo:padding-right="0.191cm" fo:padding-top="0cm" fo:padding-bottom="0cm" fo:border="0.004cm solid #e2e8f0">
        <style:background-image/>
      </style:table-cell-properties>
    </style:style>
    <style:style style:name="Tableau3.A2" style:family="table-cell">
      <style:table-cell-properties fo:background-color="#ffffff" fo:padding-left="0.191cm" fo:padding-right="0.191cm" fo:padding-top="0cm" fo:padding-bottom="0cm" fo:border-left="0.004cm solid #e2e8f0" fo:border-right="0.004cm solid #e2e8f0" fo:border-top="none" fo:border-bottom="0.004cm solid #e2e8f0">
        <style:background-image/>
      </style:table-cell-properties>
    </style:style>
    <style:style style:name="Tableau4" style:family="table">
      <style:table-properties style:width="15.921cm" fo:margin-left="-0.191cm" fo:margin-top="0cm" fo:margin-bottom="0cm" table:align="left"/>
    </style:style>
    <style:style style:name="Tableau4.A" style:family="table-column">
      <style:table-column-properties style:column-width="1.057cm"/>
    </style:style>
    <style:style style:name="Tableau4.B" style:family="table-column">
      <style:table-column-properties style:column-width="4.249cm"/>
    </style:style>
    <style:style style:name="Tableau4.C" style:family="table-column">
      <style:table-column-properties style:column-width="9.2cm"/>
    </style:style>
    <style:style style:name="Tableau4.D" style:family="table-column">
      <style:table-column-properties style:column-width="1.415cm"/>
    </style:style>
    <style:style style:name="Tableau4.1" style:family="table-row">
      <style:table-row-properties style:keep-together="true" fo:keep-together="auto"/>
    </style:style>
    <style:style style:name="Tableau4.A1" style:family="table-cell">
      <style:table-cell-properties fo:background-color="#7c3aed" fo:padding-left="0.191cm" fo:padding-right="0.191cm" fo:padding-top="0cm" fo:padding-bottom="0cm" fo:border="0.004cm solid #e2e8f0">
        <style:background-image/>
      </style:table-cell-properties>
    </style:style>
    <style:style style:name="Tableau4.B1" style:family="table-cell">
      <style:table-cell-properties fo:background-color="#ede9fe" fo:padding-left="0.191cm" fo:padding-right="0.191cm" fo:padding-top="0cm" fo:padding-bottom="0cm" fo:border="0.004cm solid #e2e8f0">
        <style:background-image/>
      </style:table-cell-properties>
    </style:style>
    <style:style style:name="Tableau4.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4.C2" style:family="table-cell">
      <style:table-cell-properties fo:background-color="#ffffff" fo:padding-left="0.191cm" fo:padding-right="0.191cm" fo:padding-top="0cm" fo:padding-bottom="0cm" fo:border="0.004cm solid #e2e8f0">
        <style:background-image/>
      </style:table-cell-properties>
    </style:style>
    <style:style style:name="Tableau4.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4.C3" style:family="table-cell">
      <style:table-cell-properties fo:background-color="#d1fae5" fo:padding-left="0.191cm" fo:padding-right="0.191cm" fo:padding-top="0cm" fo:padding-bottom="0cm" fo:border="0.004cm solid #e2e8f0">
        <style:background-image/>
      </style:table-cell-properties>
    </style:style>
    <style:style style:name="Tableau4.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4.C4" style:family="table-cell">
      <style:table-cell-properties fo:background-color="#fce7f3" fo:padding-left="0.191cm" fo:padding-right="0.191cm" fo:padding-top="0cm" fo:padding-bottom="0cm" fo:border="0.004cm solid #e2e8f0">
        <style:background-image/>
      </style:table-cell-properties>
    </style:style>
    <style:style style:name="Tableau5" style:family="table">
      <style:table-properties style:width="15.921cm" fo:margin-left="-0.191cm" fo:margin-top="0cm" fo:margin-bottom="0cm" table:align="left"/>
    </style:style>
    <style:style style:name="Tableau5.A" style:family="table-column">
      <style:table-column-properties style:column-width="1.057cm"/>
    </style:style>
    <style:style style:name="Tableau5.B" style:family="table-column">
      <style:table-column-properties style:column-width="4.249cm"/>
    </style:style>
    <style:style style:name="Tableau5.C" style:family="table-column">
      <style:table-column-properties style:column-width="9.2cm"/>
    </style:style>
    <style:style style:name="Tableau5.D" style:family="table-column">
      <style:table-column-properties style:column-width="1.415cm"/>
    </style:style>
    <style:style style:name="Tableau5.1" style:family="table-row">
      <style:table-row-properties style:keep-together="true" fo:keep-together="auto"/>
    </style:style>
    <style:style style:name="Tableau5.A1" style:family="table-cell">
      <style:table-cell-properties fo:background-color="#7c3aed" fo:padding-left="0.191cm" fo:padding-right="0.191cm" fo:padding-top="0cm" fo:padding-bottom="0cm" fo:border="0.004cm solid #e2e8f0">
        <style:background-image/>
      </style:table-cell-properties>
    </style:style>
    <style:style style:name="Tableau5.B1" style:family="table-cell">
      <style:table-cell-properties fo:background-color="#ede9fe" fo:padding-left="0.191cm" fo:padding-right="0.191cm" fo:padding-top="0cm" fo:padding-bottom="0cm" fo:border="0.004cm solid #e2e8f0">
        <style:background-image/>
      </style:table-cell-properties>
    </style:style>
    <style:style style:name="Tableau5.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5.C2" style:family="table-cell">
      <style:table-cell-properties fo:background-color="#ffffff" fo:padding-left="0.191cm" fo:padding-right="0.191cm" fo:padding-top="0cm" fo:padding-bottom="0cm" fo:border="0.004cm solid #e2e8f0">
        <style:background-image/>
      </style:table-cell-properties>
    </style:style>
    <style:style style:name="Tableau5.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5.C3" style:family="table-cell">
      <style:table-cell-properties fo:background-color="#d1fae5" fo:padding-left="0.191cm" fo:padding-right="0.191cm" fo:padding-top="0cm" fo:padding-bottom="0cm" fo:border="0.004cm solid #e2e8f0">
        <style:background-image/>
      </style:table-cell-properties>
    </style:style>
    <style:style style:name="Tableau5.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5.C4" style:family="table-cell">
      <style:table-cell-properties fo:background-color="#fce7f3" fo:padding-left="0.191cm" fo:padding-right="0.191cm" fo:padding-top="0cm" fo:padding-bottom="0cm" fo:border="0.004cm solid #e2e8f0">
        <style:background-image/>
      </style:table-cell-properties>
    </style:style>
    <style:style style:name="Tableau6" style:family="table">
      <style:table-properties style:width="15.921cm" fo:margin-left="-0.191cm" fo:margin-top="0cm" fo:margin-bottom="0cm" table:align="left"/>
    </style:style>
    <style:style style:name="Tableau6.A" style:family="table-column">
      <style:table-column-properties style:column-width="1.057cm"/>
    </style:style>
    <style:style style:name="Tableau6.B" style:family="table-column">
      <style:table-column-properties style:column-width="4.249cm"/>
    </style:style>
    <style:style style:name="Tableau6.C" style:family="table-column">
      <style:table-column-properties style:column-width="9.2cm"/>
    </style:style>
    <style:style style:name="Tableau6.D" style:family="table-column">
      <style:table-column-properties style:column-width="1.415cm"/>
    </style:style>
    <style:style style:name="Tableau6.1" style:family="table-row">
      <style:table-row-properties style:keep-together="true" fo:keep-together="auto"/>
    </style:style>
    <style:style style:name="Tableau6.A1" style:family="table-cell">
      <style:table-cell-properties fo:background-color="#7c3aed" fo:padding-left="0.191cm" fo:padding-right="0.191cm" fo:padding-top="0cm" fo:padding-bottom="0cm" fo:border="0.004cm solid #e2e8f0">
        <style:background-image/>
      </style:table-cell-properties>
    </style:style>
    <style:style style:name="Tableau6.B1" style:family="table-cell">
      <style:table-cell-properties fo:background-color="#ede9fe" fo:padding-left="0.191cm" fo:padding-right="0.191cm" fo:padding-top="0cm" fo:padding-bottom="0cm" fo:border="0.004cm solid #e2e8f0">
        <style:background-image/>
      </style:table-cell-properties>
    </style:style>
    <style:style style:name="Tableau6.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6.C2" style:family="table-cell">
      <style:table-cell-properties fo:background-color="#ffffff" fo:padding-left="0.191cm" fo:padding-right="0.191cm" fo:padding-top="0cm" fo:padding-bottom="0cm" fo:border="0.004cm solid #e2e8f0">
        <style:background-image/>
      </style:table-cell-properties>
    </style:style>
    <style:style style:name="Tableau6.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6.C3" style:family="table-cell">
      <style:table-cell-properties fo:background-color="#d1fae5" fo:padding-left="0.191cm" fo:padding-right="0.191cm" fo:padding-top="0cm" fo:padding-bottom="0cm" fo:border="0.004cm solid #e2e8f0">
        <style:background-image/>
      </style:table-cell-properties>
    </style:style>
    <style:style style:name="Tableau6.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6.C4" style:family="table-cell">
      <style:table-cell-properties fo:background-color="#fce7f3" fo:padding-left="0.191cm" fo:padding-right="0.191cm" fo:padding-top="0cm" fo:padding-bottom="0cm" fo:border="0.004cm solid #e2e8f0">
        <style:background-image/>
      </style:table-cell-properties>
    </style:style>
    <style:style style:name="Tableau7" style:family="table">
      <style:table-properties style:width="15.921cm" fo:margin-left="-0.191cm" fo:margin-top="0cm" fo:margin-bottom="0cm" table:align="left"/>
    </style:style>
    <style:style style:name="Tableau7.A" style:family="table-column">
      <style:table-column-properties style:column-width="1.057cm"/>
    </style:style>
    <style:style style:name="Tableau7.B" style:family="table-column">
      <style:table-column-properties style:column-width="4.249cm"/>
    </style:style>
    <style:style style:name="Tableau7.C" style:family="table-column">
      <style:table-column-properties style:column-width="9.2cm"/>
    </style:style>
    <style:style style:name="Tableau7.D" style:family="table-column">
      <style:table-column-properties style:column-width="1.415cm"/>
    </style:style>
    <style:style style:name="Tableau7.1" style:family="table-row">
      <style:table-row-properties style:keep-together="true" fo:keep-together="auto"/>
    </style:style>
    <style:style style:name="Tableau7.A1" style:family="table-cell">
      <style:table-cell-properties fo:background-color="#7c3aed" fo:padding-left="0.191cm" fo:padding-right="0.191cm" fo:padding-top="0cm" fo:padding-bottom="0cm" fo:border="0.004cm solid #e2e8f0">
        <style:background-image/>
      </style:table-cell-properties>
    </style:style>
    <style:style style:name="Tableau7.B1" style:family="table-cell">
      <style:table-cell-properties fo:background-color="#ede9fe" fo:padding-left="0.191cm" fo:padding-right="0.191cm" fo:padding-top="0cm" fo:padding-bottom="0cm" fo:border="0.004cm solid #e2e8f0">
        <style:background-image/>
      </style:table-cell-properties>
    </style:style>
    <style:style style:name="Tableau7.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7.C2" style:family="table-cell">
      <style:table-cell-properties fo:background-color="#ffffff" fo:padding-left="0.191cm" fo:padding-right="0.191cm" fo:padding-top="0cm" fo:padding-bottom="0cm" fo:border="0.004cm solid #e2e8f0">
        <style:background-image/>
      </style:table-cell-properties>
    </style:style>
    <style:style style:name="Tableau7.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7.C3" style:family="table-cell">
      <style:table-cell-properties fo:background-color="#d1fae5" fo:padding-left="0.191cm" fo:padding-right="0.191cm" fo:padding-top="0cm" fo:padding-bottom="0cm" fo:border="0.004cm solid #e2e8f0">
        <style:background-image/>
      </style:table-cell-properties>
    </style:style>
    <style:style style:name="Tableau7.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7.C4" style:family="table-cell">
      <style:table-cell-properties fo:background-color="#fce7f3" fo:padding-left="0.191cm" fo:padding-right="0.191cm" fo:padding-top="0cm" fo:padding-bottom="0cm" fo:border="0.004cm solid #e2e8f0">
        <style:background-image/>
      </style:table-cell-properties>
    </style:style>
    <style:style style:name="Tableau8" style:family="table">
      <style:table-properties style:width="15.921cm" fo:margin-left="-0.191cm" fo:margin-top="0cm" fo:margin-bottom="0cm" table:align="left"/>
    </style:style>
    <style:style style:name="Tableau8.A" style:family="table-column">
      <style:table-column-properties style:column-width="1.057cm"/>
    </style:style>
    <style:style style:name="Tableau8.B" style:family="table-column">
      <style:table-column-properties style:column-width="4.249cm"/>
    </style:style>
    <style:style style:name="Tableau8.C" style:family="table-column">
      <style:table-column-properties style:column-width="9.2cm"/>
    </style:style>
    <style:style style:name="Tableau8.D" style:family="table-column">
      <style:table-column-properties style:column-width="1.415cm"/>
    </style:style>
    <style:style style:name="Tableau8.1" style:family="table-row">
      <style:table-row-properties style:keep-together="true" fo:keep-together="auto"/>
    </style:style>
    <style:style style:name="Tableau8.A1" style:family="table-cell">
      <style:table-cell-properties fo:background-color="#7c3aed" fo:padding-left="0.191cm" fo:padding-right="0.191cm" fo:padding-top="0cm" fo:padding-bottom="0cm" fo:border="0.004cm solid #e2e8f0">
        <style:background-image/>
      </style:table-cell-properties>
    </style:style>
    <style:style style:name="Tableau8.B1" style:family="table-cell">
      <style:table-cell-properties fo:background-color="#ede9fe" fo:padding-left="0.191cm" fo:padding-right="0.191cm" fo:padding-top="0cm" fo:padding-bottom="0cm" fo:border="0.004cm solid #e2e8f0">
        <style:background-image/>
      </style:table-cell-properties>
    </style:style>
    <style:style style:name="Tableau8.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8.C2" style:family="table-cell">
      <style:table-cell-properties fo:background-color="#ffffff" fo:padding-left="0.191cm" fo:padding-right="0.191cm" fo:padding-top="0cm" fo:padding-bottom="0cm" fo:border="0.004cm solid #e2e8f0">
        <style:background-image/>
      </style:table-cell-properties>
    </style:style>
    <style:style style:name="Tableau8.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8.C3" style:family="table-cell">
      <style:table-cell-properties fo:background-color="#d1fae5" fo:padding-left="0.191cm" fo:padding-right="0.191cm" fo:padding-top="0cm" fo:padding-bottom="0cm" fo:border="0.004cm solid #e2e8f0">
        <style:background-image/>
      </style:table-cell-properties>
    </style:style>
    <style:style style:name="Tableau8.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8.C4" style:family="table-cell">
      <style:table-cell-properties fo:background-color="#fce7f3" fo:padding-left="0.191cm" fo:padding-right="0.191cm" fo:padding-top="0cm" fo:padding-bottom="0cm" fo:border="0.004cm solid #e2e8f0">
        <style:background-image/>
      </style:table-cell-properties>
    </style:style>
    <style:style style:name="Tableau9" style:family="table">
      <style:table-properties style:width="15.921cm" fo:margin-left="-0.191cm" fo:margin-top="0cm" fo:margin-bottom="0cm" table:align="left"/>
    </style:style>
    <style:style style:name="Tableau9.A" style:family="table-column">
      <style:table-column-properties style:column-width="1.057cm"/>
    </style:style>
    <style:style style:name="Tableau9.B" style:family="table-column">
      <style:table-column-properties style:column-width="4.249cm"/>
    </style:style>
    <style:style style:name="Tableau9.C" style:family="table-column">
      <style:table-column-properties style:column-width="9.2cm"/>
    </style:style>
    <style:style style:name="Tableau9.D" style:family="table-column">
      <style:table-column-properties style:column-width="1.415cm"/>
    </style:style>
    <style:style style:name="Tableau9.1" style:family="table-row">
      <style:table-row-properties style:keep-together="true" fo:keep-together="auto"/>
    </style:style>
    <style:style style:name="Tableau9.A1" style:family="table-cell">
      <style:table-cell-properties fo:background-color="#7c3aed" fo:padding-left="0.191cm" fo:padding-right="0.191cm" fo:padding-top="0cm" fo:padding-bottom="0cm" fo:border="0.004cm solid #e2e8f0">
        <style:background-image/>
      </style:table-cell-properties>
    </style:style>
    <style:style style:name="Tableau9.B1" style:family="table-cell">
      <style:table-cell-properties fo:background-color="#ede9fe" fo:padding-left="0.191cm" fo:padding-right="0.191cm" fo:padding-top="0cm" fo:padding-bottom="0cm" fo:border="0.004cm solid #e2e8f0">
        <style:background-image/>
      </style:table-cell-properties>
    </style:style>
    <style:style style:name="Tableau9.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9.C2" style:family="table-cell">
      <style:table-cell-properties fo:background-color="#ffffff" fo:padding-left="0.191cm" fo:padding-right="0.191cm" fo:padding-top="0cm" fo:padding-bottom="0cm" fo:border="0.004cm solid #e2e8f0">
        <style:background-image/>
      </style:table-cell-properties>
    </style:style>
    <style:style style:name="Tableau9.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9.C3" style:family="table-cell">
      <style:table-cell-properties fo:background-color="#d1fae5" fo:padding-left="0.191cm" fo:padding-right="0.191cm" fo:padding-top="0cm" fo:padding-bottom="0cm" fo:border="0.004cm solid #e2e8f0">
        <style:background-image/>
      </style:table-cell-properties>
    </style:style>
    <style:style style:name="Tableau9.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9.C4" style:family="table-cell">
      <style:table-cell-properties fo:background-color="#fce7f3" fo:padding-left="0.191cm" fo:padding-right="0.191cm" fo:padding-top="0cm" fo:padding-bottom="0cm" fo:border="0.004cm solid #e2e8f0">
        <style:background-image/>
      </style:table-cell-properties>
    </style:style>
    <style:style style:name="Tableau10" style:family="table">
      <style:table-properties style:width="15.921cm" fo:margin-left="-0.191cm" fo:margin-top="0cm" fo:margin-bottom="0cm" table:align="left"/>
    </style:style>
    <style:style style:name="Tableau10.A" style:family="table-column">
      <style:table-column-properties style:column-width="1.057cm"/>
    </style:style>
    <style:style style:name="Tableau10.B" style:family="table-column">
      <style:table-column-properties style:column-width="4.249cm"/>
    </style:style>
    <style:style style:name="Tableau10.C" style:family="table-column">
      <style:table-column-properties style:column-width="9.2cm"/>
    </style:style>
    <style:style style:name="Tableau10.D" style:family="table-column">
      <style:table-column-properties style:column-width="1.415cm"/>
    </style:style>
    <style:style style:name="Tableau10.1" style:family="table-row">
      <style:table-row-properties style:keep-together="true" fo:keep-together="auto"/>
    </style:style>
    <style:style style:name="Tableau10.A1" style:family="table-cell">
      <style:table-cell-properties fo:background-color="#7c3aed" fo:padding-left="0.191cm" fo:padding-right="0.191cm" fo:padding-top="0cm" fo:padding-bottom="0cm" fo:border="0.004cm solid #e2e8f0">
        <style:background-image/>
      </style:table-cell-properties>
    </style:style>
    <style:style style:name="Tableau10.B1" style:family="table-cell">
      <style:table-cell-properties fo:background-color="#ede9fe" fo:padding-left="0.191cm" fo:padding-right="0.191cm" fo:padding-top="0cm" fo:padding-bottom="0cm" fo:border="0.004cm solid #e2e8f0">
        <style:background-image/>
      </style:table-cell-properties>
    </style:style>
    <style:style style:name="Tableau10.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10.C2" style:family="table-cell">
      <style:table-cell-properties fo:background-color="#ffffff" fo:padding-left="0.191cm" fo:padding-right="0.191cm" fo:padding-top="0cm" fo:padding-bottom="0cm" fo:border="0.004cm solid #e2e8f0">
        <style:background-image/>
      </style:table-cell-properties>
    </style:style>
    <style:style style:name="Tableau10.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10.C3" style:family="table-cell">
      <style:table-cell-properties fo:background-color="#d1fae5" fo:padding-left="0.191cm" fo:padding-right="0.191cm" fo:padding-top="0cm" fo:padding-bottom="0cm" fo:border="0.004cm solid #e2e8f0">
        <style:background-image/>
      </style:table-cell-properties>
    </style:style>
    <style:style style:name="Tableau10.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10.C4" style:family="table-cell">
      <style:table-cell-properties fo:background-color="#fce7f3" fo:padding-left="0.191cm" fo:padding-right="0.191cm" fo:padding-top="0cm" fo:padding-bottom="0cm" fo:border="0.004cm solid #e2e8f0">
        <style:background-image/>
      </style:table-cell-properties>
    </style:style>
    <style:style style:name="Tableau11" style:family="table">
      <style:table-properties style:width="15.921cm" fo:margin-left="-0.191cm" fo:margin-top="0cm" fo:margin-bottom="0cm" table:align="left"/>
    </style:style>
    <style:style style:name="Tableau11.A" style:family="table-column">
      <style:table-column-properties style:column-width="1.057cm"/>
    </style:style>
    <style:style style:name="Tableau11.B" style:family="table-column">
      <style:table-column-properties style:column-width="4.249cm"/>
    </style:style>
    <style:style style:name="Tableau11.C" style:family="table-column">
      <style:table-column-properties style:column-width="9.2cm"/>
    </style:style>
    <style:style style:name="Tableau11.D" style:family="table-column">
      <style:table-column-properties style:column-width="1.415cm"/>
    </style:style>
    <style:style style:name="Tableau11.1" style:family="table-row">
      <style:table-row-properties style:keep-together="true" fo:keep-together="auto"/>
    </style:style>
    <style:style style:name="Tableau11.A1" style:family="table-cell">
      <style:table-cell-properties fo:background-color="#7c3aed" fo:padding-left="0.191cm" fo:padding-right="0.191cm" fo:padding-top="0cm" fo:padding-bottom="0cm" fo:border="0.004cm solid #e2e8f0">
        <style:background-image/>
      </style:table-cell-properties>
    </style:style>
    <style:style style:name="Tableau11.B1" style:family="table-cell">
      <style:table-cell-properties fo:background-color="#ede9fe" fo:padding-left="0.191cm" fo:padding-right="0.191cm" fo:padding-top="0cm" fo:padding-bottom="0cm" fo:border="0.004cm solid #e2e8f0">
        <style:background-image/>
      </style:table-cell-properties>
    </style:style>
    <style:style style:name="Tableau11.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11.C2" style:family="table-cell">
      <style:table-cell-properties fo:background-color="#ffffff" fo:padding-left="0.191cm" fo:padding-right="0.191cm" fo:padding-top="0cm" fo:padding-bottom="0cm" fo:border="0.004cm solid #e2e8f0">
        <style:background-image/>
      </style:table-cell-properties>
    </style:style>
    <style:style style:name="Tableau11.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11.C3" style:family="table-cell">
      <style:table-cell-properties fo:background-color="#d1fae5" fo:padding-left="0.191cm" fo:padding-right="0.191cm" fo:padding-top="0cm" fo:padding-bottom="0cm" fo:border="0.004cm solid #e2e8f0">
        <style:background-image/>
      </style:table-cell-properties>
    </style:style>
    <style:style style:name="Tableau11.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11.C4" style:family="table-cell">
      <style:table-cell-properties fo:background-color="#fce7f3" fo:padding-left="0.191cm" fo:padding-right="0.191cm" fo:padding-top="0cm" fo:padding-bottom="0cm" fo:border="0.004cm solid #e2e8f0">
        <style:background-image/>
      </style:table-cell-properties>
    </style:style>
    <style:style style:name="Tableau12" style:family="table">
      <style:table-properties style:width="15.921cm" fo:margin-left="-0.191cm" fo:margin-top="0cm" fo:margin-bottom="0cm" table:align="left"/>
    </style:style>
    <style:style style:name="Tableau12.A" style:family="table-column">
      <style:table-column-properties style:column-width="1.057cm"/>
    </style:style>
    <style:style style:name="Tableau12.B" style:family="table-column">
      <style:table-column-properties style:column-width="4.249cm"/>
    </style:style>
    <style:style style:name="Tableau12.C" style:family="table-column">
      <style:table-column-properties style:column-width="9.2cm"/>
    </style:style>
    <style:style style:name="Tableau12.D" style:family="table-column">
      <style:table-column-properties style:column-width="1.415cm"/>
    </style:style>
    <style:style style:name="Tableau12.1" style:family="table-row">
      <style:table-row-properties style:keep-together="true" fo:keep-together="auto"/>
    </style:style>
    <style:style style:name="Tableau12.A1" style:family="table-cell">
      <style:table-cell-properties fo:background-color="#7c3aed" fo:padding-left="0.191cm" fo:padding-right="0.191cm" fo:padding-top="0cm" fo:padding-bottom="0cm" fo:border="0.004cm solid #e2e8f0">
        <style:background-image/>
      </style:table-cell-properties>
    </style:style>
    <style:style style:name="Tableau12.B1" style:family="table-cell">
      <style:table-cell-properties fo:background-color="#ede9fe" fo:padding-left="0.191cm" fo:padding-right="0.191cm" fo:padding-top="0cm" fo:padding-bottom="0cm" fo:border="0.004cm solid #e2e8f0">
        <style:background-image/>
      </style:table-cell-properties>
    </style:style>
    <style:style style:name="Tableau12.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12.C2" style:family="table-cell">
      <style:table-cell-properties fo:background-color="#ffffff" fo:padding-left="0.191cm" fo:padding-right="0.191cm" fo:padding-top="0cm" fo:padding-bottom="0cm" fo:border="0.004cm solid #e2e8f0">
        <style:background-image/>
      </style:table-cell-properties>
    </style:style>
    <style:style style:name="Tableau12.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12.C3" style:family="table-cell">
      <style:table-cell-properties fo:background-color="#d1fae5" fo:padding-left="0.191cm" fo:padding-right="0.191cm" fo:padding-top="0cm" fo:padding-bottom="0cm" fo:border="0.004cm solid #e2e8f0">
        <style:background-image/>
      </style:table-cell-properties>
    </style:style>
    <style:style style:name="Tableau12.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12.C4" style:family="table-cell">
      <style:table-cell-properties fo:background-color="#fce7f3" fo:padding-left="0.191cm" fo:padding-right="0.191cm" fo:padding-top="0cm" fo:padding-bottom="0cm" fo:border="0.004cm solid #e2e8f0">
        <style:background-image/>
      </style:table-cell-properties>
    </style:style>
    <style:style style:name="Tableau13" style:family="table">
      <style:table-properties style:width="15.921cm" fo:margin-left="-0.191cm" fo:margin-top="0cm" fo:margin-bottom="0cm" table:align="left"/>
    </style:style>
    <style:style style:name="Tableau13.A" style:family="table-column">
      <style:table-column-properties style:column-width="1.057cm"/>
    </style:style>
    <style:style style:name="Tableau13.B" style:family="table-column">
      <style:table-column-properties style:column-width="4.249cm"/>
    </style:style>
    <style:style style:name="Tableau13.C" style:family="table-column">
      <style:table-column-properties style:column-width="9.2cm"/>
    </style:style>
    <style:style style:name="Tableau13.D" style:family="table-column">
      <style:table-column-properties style:column-width="1.415cm"/>
    </style:style>
    <style:style style:name="Tableau13.1" style:family="table-row">
      <style:table-row-properties style:keep-together="true" fo:keep-together="auto"/>
    </style:style>
    <style:style style:name="Tableau13.A1" style:family="table-cell">
      <style:table-cell-properties fo:background-color="#7c3aed" fo:padding-left="0.191cm" fo:padding-right="0.191cm" fo:padding-top="0cm" fo:padding-bottom="0cm" fo:border="0.004cm solid #e2e8f0">
        <style:background-image/>
      </style:table-cell-properties>
    </style:style>
    <style:style style:name="Tableau13.B1" style:family="table-cell">
      <style:table-cell-properties fo:background-color="#ede9fe" fo:padding-left="0.191cm" fo:padding-right="0.191cm" fo:padding-top="0cm" fo:padding-bottom="0cm" fo:border="0.004cm solid #e2e8f0">
        <style:background-image/>
      </style:table-cell-properties>
    </style:style>
    <style:style style:name="Tableau13.A2" style:family="table-cell">
      <style:table-cell-properties style:vertical-align="middle" fo:background-color="#1e293b" fo:padding-left="0.191cm" fo:padding-right="0.191cm" fo:padding-top="0cm" fo:padding-bottom="0cm" fo:border="0.004cm solid #e2e8f0">
        <style:background-image/>
      </style:table-cell-properties>
    </style:style>
    <style:style style:name="Tableau13.C2" style:family="table-cell">
      <style:table-cell-properties fo:background-color="#ffffff" fo:padding-left="0.191cm" fo:padding-right="0.191cm" fo:padding-top="0cm" fo:padding-bottom="0cm" fo:border="0.004cm solid #e2e8f0">
        <style:background-image/>
      </style:table-cell-properties>
    </style:style>
    <style:style style:name="Tableau13.A3"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13.C3" style:family="table-cell">
      <style:table-cell-properties fo:background-color="#d1fae5" fo:padding-left="0.191cm" fo:padding-right="0.191cm" fo:padding-top="0cm" fo:padding-bottom="0cm" fo:border="0.004cm solid #e2e8f0">
        <style:background-image/>
      </style:table-cell-properties>
    </style:style>
    <style:style style:name="Tableau13.A4" style:family="table-cell">
      <style:table-cell-properties style:vertical-align="middle" fo:background-color="#ec4899" fo:padding-left="0.191cm" fo:padding-right="0.191cm" fo:padding-top="0cm" fo:padding-bottom="0cm" fo:border="0.004cm solid #e2e8f0">
        <style:background-image/>
      </style:table-cell-properties>
    </style:style>
    <style:style style:name="Tableau13.C4" style:family="table-cell">
      <style:table-cell-properties fo:background-color="#fce7f3" fo:padding-left="0.191cm" fo:padding-right="0.191cm" fo:padding-top="0cm" fo:padding-bottom="0cm" fo:border="0.004cm solid #e2e8f0">
        <style:background-image/>
      </style:table-cell-properties>
    </style:style>
    <style:style style:name="Tableau14" style:family="table">
      <style:table-properties style:width="16.274cm" fo:margin-left="-0.191cm" fo:margin-top="0cm" fo:margin-bottom="0cm" table:align="left"/>
    </style:style>
    <style:style style:name="Tableau14.A" style:family="table-column">
      <style:table-column-properties style:column-width="5.643cm"/>
    </style:style>
    <style:style style:name="Tableau14.B" style:family="table-column">
      <style:table-column-properties style:column-width="10.629cm"/>
    </style:style>
    <style:style style:name="Tableau14.1" style:family="table-row">
      <style:table-row-properties style:keep-together="true" fo:keep-together="auto"/>
    </style:style>
    <style:style style:name="Tableau14.A1" style:family="table-cell">
      <style:table-cell-properties style:vertical-align="middle" fo:background-color="#7c3aed" fo:padding-left="0.191cm" fo:padding-right="0.191cm" fo:padding-top="0cm" fo:padding-bottom="0cm" fo:border="0.004cm solid #e2e8f0">
        <style:background-image/>
      </style:table-cell-properties>
    </style:style>
    <style:style style:name="Tableau14.A2" style:family="table-cell">
      <style:table-cell-properties style:vertical-align="middle" fo:padding-left="0.191cm" fo:padding-right="0.191cm" fo:padding-top="0cm" fo:padding-bottom="0cm" fo:border="0.004cm solid #e2e8f0"/>
    </style:style>
    <style:style style:name="Tableau14.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5" style:family="table">
      <style:table-properties style:width="16.274cm" fo:margin-left="-0.191cm" fo:margin-top="0cm" fo:margin-bottom="0cm" table:align="left"/>
    </style:style>
    <style:style style:name="Tableau15.A" style:family="table-column">
      <style:table-column-properties style:column-width="5.643cm"/>
    </style:style>
    <style:style style:name="Tableau15.B" style:family="table-column">
      <style:table-column-properties style:column-width="10.629cm"/>
    </style:style>
    <style:style style:name="Tableau15.1" style:family="table-row">
      <style:table-row-properties style:keep-together="true" fo:keep-together="auto"/>
    </style:style>
    <style:style style:name="Tableau15.A1" style:family="table-cell">
      <style:table-cell-properties style:vertical-align="middle" fo:background-color="#3b82f6" fo:padding-left="0.191cm" fo:padding-right="0.191cm" fo:padding-top="0cm" fo:padding-bottom="0cm" fo:border="0.004cm solid #e2e8f0">
        <style:background-image/>
      </style:table-cell-properties>
    </style:style>
    <style:style style:name="Tableau15.A2" style:family="table-cell">
      <style:table-cell-properties style:vertical-align="middle" fo:padding-left="0.191cm" fo:padding-right="0.191cm" fo:padding-top="0cm" fo:padding-bottom="0cm" fo:border="0.004cm solid #e2e8f0"/>
    </style:style>
    <style:style style:name="Tableau15.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6" style:family="table">
      <style:table-properties style:width="16.274cm" fo:margin-left="-0.191cm" fo:margin-top="0cm" fo:margin-bottom="0cm" table:align="left"/>
    </style:style>
    <style:style style:name="Tableau16.A" style:family="table-column">
      <style:table-column-properties style:column-width="5.643cm"/>
    </style:style>
    <style:style style:name="Tableau16.B" style:family="table-column">
      <style:table-column-properties style:column-width="10.629cm"/>
    </style:style>
    <style:style style:name="Tableau16.1" style:family="table-row">
      <style:table-row-properties style:keep-together="true" fo:keep-together="auto"/>
    </style:style>
    <style:style style:name="Tableau16.A1" style:family="table-cell">
      <style:table-cell-properties style:vertical-align="middle" fo:background-color="#10b981" fo:padding-left="0.191cm" fo:padding-right="0.191cm" fo:padding-top="0cm" fo:padding-bottom="0cm" fo:border="0.004cm solid #e2e8f0">
        <style:background-image/>
      </style:table-cell-properties>
    </style:style>
    <style:style style:name="Tableau16.A2" style:family="table-cell">
      <style:table-cell-properties style:vertical-align="middle" fo:padding-left="0.191cm" fo:padding-right="0.191cm" fo:padding-top="0cm" fo:padding-bottom="0cm" fo:border="0.004cm solid #e2e8f0"/>
    </style:style>
    <style:style style:name="Tableau16.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7" style:family="table">
      <style:table-properties style:width="16.274cm" fo:margin-left="-0.191cm" fo:margin-top="0cm" fo:margin-bottom="0cm" table:align="left"/>
    </style:style>
    <style:style style:name="Tableau17.A" style:family="table-column">
      <style:table-column-properties style:column-width="5.643cm"/>
    </style:style>
    <style:style style:name="Tableau17.B" style:family="table-column">
      <style:table-column-properties style:column-width="10.629cm"/>
    </style:style>
    <style:style style:name="Tableau17.1" style:family="table-row">
      <style:table-row-properties style:keep-together="true" fo:keep-together="auto"/>
    </style:style>
    <style:style style:name="Tableau17.A1" style:family="table-cell">
      <style:table-cell-properties style:vertical-align="middle" fo:background-color="#ef4444" fo:padding-left="0.191cm" fo:padding-right="0.191cm" fo:padding-top="0cm" fo:padding-bottom="0cm" fo:border="0.004cm solid #e2e8f0">
        <style:background-image/>
      </style:table-cell-properties>
    </style:style>
    <style:style style:name="Tableau17.A2" style:family="table-cell">
      <style:table-cell-properties style:vertical-align="middle" fo:padding-left="0.191cm" fo:padding-right="0.191cm" fo:padding-top="0cm" fo:padding-bottom="0cm" fo:border="0.004cm solid #e2e8f0"/>
    </style:style>
    <style:style style:name="Tableau17.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8" style:family="table">
      <style:table-properties style:width="16.274cm" fo:margin-left="-0.191cm" fo:margin-top="0cm" fo:margin-bottom="0cm" table:align="left"/>
    </style:style>
    <style:style style:name="Tableau18.A" style:family="table-column">
      <style:table-column-properties style:column-width="3.526cm"/>
    </style:style>
    <style:style style:name="Tableau18.B" style:family="table-column">
      <style:table-column-properties style:column-width="5.643cm"/>
    </style:style>
    <style:style style:name="Tableau18.C" style:family="table-column">
      <style:table-column-properties style:column-width="7.105cm"/>
    </style:style>
    <style:style style:name="Tableau18.1" style:family="table-row">
      <style:table-row-properties style:keep-together="true" fo:keep-together="auto"/>
    </style:style>
    <style:style style:name="Tableau18.A1" style:family="table-cell">
      <style:table-cell-properties style:vertical-align="middle" fo:background-color="#0d9488" fo:padding-left="0.191cm" fo:padding-right="0.191cm" fo:padding-top="0cm" fo:padding-bottom="0cm" fo:border="0.004cm solid #e2e8f0">
        <style:background-image/>
      </style:table-cell-properties>
    </style:style>
    <style:style style:name="Tableau18.A2" style:family="table-cell">
      <style:table-cell-properties style:vertical-align="middle" fo:padding-left="0.191cm" fo:padding-right="0.191cm" fo:padding-top="0cm" fo:padding-bottom="0cm" fo:border="0.004cm solid #e2e8f0"/>
    </style:style>
    <style:style style:name="Tableau18.A3" style:family="table-cell">
      <style:table-cell-properties style:vertical-align="middle" fo:background-color="#f8fafc" fo:padding-left="0.191cm" fo:padding-right="0.191cm" fo:padding-top="0cm" fo:padding-bottom="0cm" fo:border="0.004cm solid #e2e8f0">
        <style:background-image/>
      </style:table-cell-properties>
    </style:style>
    <style:style style:name="Tableau19" style:family="table">
      <style:table-properties style:width="15.921cm" fo:margin-left="-0.191cm" fo:margin-top="0cm" fo:margin-bottom="0cm" table:align="left"/>
    </style:style>
    <style:style style:name="Tableau19.A" style:family="table-column">
      <style:table-column-properties style:column-width="15.921cm"/>
    </style:style>
    <style:style style:name="Tableau19.1" style:family="table-row">
      <style:table-row-properties style:keep-together="true" fo:keep-together="auto"/>
    </style:style>
    <style:style style:name="Tableau19.A1" style:family="table-cell">
      <style:table-cell-properties fo:background-color="#ede9fe" fo:padding-left="0.191cm" fo:padding-right="0.191cm" fo:padding-top="0cm" fo:padding-bottom="0cm" fo:border="0.004cm solid #e2e8f0">
        <style:background-image/>
      </style:table-cell-properties>
    </style:style>
    <style:style style:name="Tableau19.A2" style:family="table-cell">
      <style:table-cell-properties fo:background-color="#ffffff" fo:padding-left="0.191cm" fo:padding-right="0.191cm" fo:padding-top="0cm" fo:padding-bottom="0cm" fo:border-left="0.004cm solid #e2e8f0" fo:border-right="0.004cm solid #e2e8f0" fo:border-top="none" fo:border-bottom="0.004cm solid #e2e8f0">
        <style:background-image/>
      </style:table-cell-properties>
    </style:style>
    <style:style style:name="Tableau20" style:family="table">
      <style:table-properties style:width="15.921cm" fo:margin-left="-0.191cm" fo:margin-top="0cm" fo:margin-bottom="0cm" table:align="left"/>
    </style:style>
    <style:style style:name="Tableau20.A" style:family="table-column">
      <style:table-column-properties style:column-width="15.921cm"/>
    </style:style>
    <style:style style:name="Tableau20.1" style:family="table-row">
      <style:table-row-properties style:keep-together="true" fo:keep-together="auto"/>
    </style:style>
    <style:style style:name="Tableau20.A1" style:family="table-cell">
      <style:table-cell-properties fo:background-color="#d1fae5" fo:padding-left="0.191cm" fo:padding-right="0.191cm" fo:padding-top="0cm" fo:padding-bottom="0cm" fo:border="0.004cm solid #e2e8f0">
        <style:background-image/>
      </style:table-cell-properties>
    </style:style>
    <style:style style:name="Tableau20.A2" style:family="table-cell">
      <style:table-cell-properties fo:background-color="#ffffff" fo:padding-left="0.191cm" fo:padding-right="0.191cm" fo:padding-top="0cm" fo:padding-bottom="0cm" fo:border-left="0.004cm solid #e2e8f0" fo:border-right="0.004cm solid #e2e8f0" fo:border-top="none" fo:border-bottom="0.004cm solid #e2e8f0">
        <style:background-image/>
      </style:table-cell-properties>
    </style:style>
    <style:style style:name="Tableau21" style:family="table">
      <style:table-properties style:width="15.921cm" fo:margin-left="-0.191cm" fo:margin-top="0cm" fo:margin-bottom="0cm" table:align="left"/>
    </style:style>
    <style:style style:name="Tableau21.A" style:family="table-column">
      <style:table-column-properties style:column-width="15.921cm"/>
    </style:style>
    <style:style style:name="Tableau21.1" style:family="table-row">
      <style:table-row-properties style:keep-together="true" fo:keep-together="auto"/>
    </style:style>
    <style:style style:name="Tableau21.A1" style:family="table-cell">
      <style:table-cell-properties fo:background-color="#fef3c7" fo:padding-left="0.191cm" fo:padding-right="0.191cm" fo:padding-top="0cm" fo:padding-bottom="0cm" fo:border="0.004cm solid #e2e8f0">
        <style:background-image/>
      </style:table-cell-properties>
    </style:style>
    <style:style style:name="Tableau21.A2" style:family="table-cell">
      <style:table-cell-properties fo:background-color="#ffffff" fo:padding-left="0.191cm" fo:padding-right="0.191cm" fo:padding-top="0cm" fo:padding-bottom="0cm" fo:border-left="0.004cm solid #e2e8f0" fo:border-right="0.004cm solid #e2e8f0" fo:border-top="none" fo:border-bottom="0.004cm solid #e2e8f0">
        <style:background-image/>
      </style:table-cell-properties>
    </style:style>
    <style:style style:name="P1" style:family="paragraph" style:parent-style-name="Heading_20_1">
      <style:paragraph-properties fo:break-before="page"/>
    </style:style>
    <style:style style:name="P2" style:family="paragraph" style:parent-style-name="Contents_20_1">
      <style:paragraph-properties>
        <style:tab-stops>
          <style:tab-stop style:position="17.12cm" style:type="right" style:leader-style="dotted" style:leader-text="."/>
        </style:tab-stops>
      </style:paragraph-properties>
    </style:style>
    <style:style style:name="P3" style:family="paragraph" style:parent-style-name="Contents_20_2">
      <style:paragraph-properties>
        <style:tab-stops>
          <style:tab-stop style:position="17.12cm" style:type="right"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master-page-name="Standard">
      <style:paragraph-properties fo:margin-top="0cm" fo:margin-bottom="2.117cm" style:page-number="auto"/>
    </style:style>
    <style:style style:name="P6" style:family="paragraph" style:parent-style-name="Standard">
      <style:paragraph-properties fo:margin-top="0cm" fo:margin-bottom="0.282cm" fo:text-align="center" style:justify-single-word="false"/>
    </style:style>
    <style:style style:name="P7" style:family="paragraph" style:parent-style-name="Standard">
      <style:paragraph-properties fo:margin-top="0.282cm" fo:margin-bottom="0.282cm" fo:text-align="center" style:justify-single-word="false" fo:padding-left="0cm" fo:padding-right="0cm" fo:padding-top="0.282cm" fo:padding-bottom="0.282cm" fo:border-left="none" fo:border-right="none" fo:border-top="0.018cm solid #7c3aed" fo:border-bottom="0.018cm solid #7c3aed"/>
    </style:style>
    <style:style style:name="P8" style:family="paragraph" style:parent-style-name="Standard">
      <style:paragraph-properties fo:margin-top="0cm" fo:margin-bottom="0.141cm"/>
    </style:style>
    <style:style style:name="P9" style:family="paragraph" style:parent-style-name="Standard">
      <style:paragraph-properties fo:margin-top="0cm" fo:margin-bottom="0.106cm"/>
    </style:style>
    <style:style style:name="P10" style:family="paragraph" style:parent-style-name="Standard">
      <style:paragraph-properties fo:margin-top="0cm" fo:margin-bottom="0.106cm" fo:text-align="center" style:justify-single-word="false"/>
    </style:style>
    <style:style style:name="P11" style:family="paragraph" style:parent-style-name="Standard">
      <style:paragraph-properties fo:margin-top="0cm" fo:margin-bottom="0.247cm"/>
    </style:style>
    <style:style style:name="P12" style:family="paragraph" style:parent-style-name="Standard">
      <style:paragraph-properties fo:margin-top="0cm" fo:margin-bottom="0.071cm"/>
    </style:style>
    <style:style style:name="P13" style:family="paragraph" style:parent-style-name="Standard">
      <style:paragraph-properties fo:margin-top="0.106cm" fo:margin-bottom="0.053cm"/>
    </style:style>
    <style:style style:name="P14" style:family="paragraph" style:parent-style-name="Standard">
      <style:paragraph-properties fo:margin-left="0.353cm" fo:margin-right="0cm" fo:margin-top="0cm" fo:margin-bottom="0.141cm" fo:text-indent="0cm" style:auto-text-indent="false"/>
    </style:style>
    <style:style style:name="P15" style:family="paragraph" style:parent-style-name="Standard">
      <style:paragraph-properties fo:margin-top="0cm" fo:margin-bottom="0.353cm"/>
    </style:style>
    <style:style style:name="P16" style:family="paragraph" style:parent-style-name="Standard">
      <style:paragraph-properties fo:margin-top="0cm" fo:margin-bottom="0.176cm" fo:text-align="start" style:justify-single-word="false"/>
    </style:style>
    <style:style style:name="P17" style:family="paragraph" style:parent-style-name="Standard">
      <style:paragraph-properties fo:margin-top="0cm" fo:margin-bottom="0.212cm"/>
    </style:style>
    <style:style style:name="P18" style:family="paragraph" style:parent-style-name="Standard">
      <style:paragraph-properties fo:text-align="end" style:justify-single-word="false" fo:padding-left="0cm" fo:padding-right="0cm" fo:padding-top="0cm" fo:padding-bottom="0.212cm" fo:border-left="none" fo:border-right="none" fo:border-top="none" fo:border-bottom="0.009cm solid #7c3aed"/>
    </style:style>
    <style:style style:name="P19" style:family="paragraph" style:parent-style-name="Standard">
      <style:paragraph-properties fo:text-align="center" style:justify-single-word="false" fo:padding-left="0cm" fo:padding-right="0cm" fo:padding-top="0.212cm" fo:padding-bottom="0cm" fo:border-left="none" fo:border-right="none" fo:border-top="0.004cm solid #e2e8f0" fo:border-bottom="none"/>
    </style:style>
    <style:style style:name="T1" style:family="text">
      <style:text-properties fo:color="#7c3aed" style:font-name="Arial" fo:font-size="40pt" fo:font-weight="bold" style:font-name-asian="Arial2" style:font-size-asian="40pt" style:font-weight-asian="bold" style:font-name-complex="Arial2" style:font-size-complex="40pt" style:font-weight-complex="bold"/>
    </style:style>
    <style:style style:name="T2" style:family="text">
      <style:text-properties fo:color="#7c3aed" style:font-name="Arial" fo:font-size="12pt" fo:font-weight="bold" style:font-name-asian="Arial2" style:font-size-asian="12pt" style:font-weight-asian="bold" style:font-name-complex="Arial2" style:font-size-complex="12pt" style:font-weight-complex="bold"/>
    </style:style>
    <style:style style:name="T3" style:family="text">
      <style:text-properties fo:color="#7c3aed" style:font-name="Arial" fo:font-size="13pt" fo:font-weight="bold" style:font-name-asian="Arial2" style:font-size-asian="13pt" style:font-weight-asian="bold" style:font-name-complex="Arial2" style:font-size-complex="13pt" style:font-weight-complex="bold"/>
    </style:style>
    <style:style style:name="T4" style:family="text">
      <style:text-properties fo:color="#7c3aed" style:font-name="Arial" fo:font-size="9pt" fo:font-weight="bold" style:font-name-asian="Arial2" style:font-size-asian="9pt" style:font-weight-asian="bold" style:font-name-complex="Arial2" style:font-size-complex="9pt" style:font-weight-complex="bold"/>
    </style:style>
    <style:style style:name="T5" style:family="text">
      <style:text-properties fo:color="#ec4899" style:font-name="Arial" fo:font-size="16pt" style:font-name-asian="Arial2" style:font-size-asian="16pt" style:font-name-complex="Arial2" style:font-size-complex="16pt"/>
    </style:style>
    <style:style style:name="T6" style:family="text">
      <style:text-properties fo:color="#ec4899" style:font-name="Arial" fo:font-size="10pt" fo:font-weight="bold" style:font-name-asian="Arial2" style:font-size-asian="10pt" style:font-weight-asian="bold" style:font-name-complex="Arial2" style:font-size-complex="10pt" style:font-weight-complex="bold"/>
    </style:style>
    <style:style style:name="T7" style:family="text">
      <style:text-properties fo:color="#0f172a" style:font-name="Arial" fo:font-size="19pt" fo:font-weight="bold" style:font-name-asian="Arial2" style:font-size-asian="19pt" style:font-weight-asian="bold" style:font-name-complex="Arial2" style:font-size-complex="19pt" style:font-weight-complex="bold"/>
    </style:style>
    <style:style style:name="T8" style:family="text">
      <style:text-properties fo:color="#0f172a" style:font-name="Arial" fo:font-size="11pt" fo:font-weight="bold" style:font-name-asian="Arial2" style:font-size-asian="11pt" style:font-weight-asian="bold" style:font-name-complex="Arial2" style:font-size-complex="11pt" style:font-weight-complex="bold"/>
    </style:style>
    <style:style style:name="T9" style:family="text">
      <style:text-properties fo:color="#0f172a" style:font-name="Arial" fo:font-size="10.5pt" style:font-name-asian="Arial2" style:font-size-asian="10.5pt" style:font-name-complex="Arial2" style:font-size-complex="10.5pt"/>
    </style:style>
    <style:style style:name="T10" style:family="text">
      <style:text-properties fo:color="#0f172a" style:font-name="Arial" fo:font-size="10pt" style:font-name-asian="Arial2" style:font-size-asian="10pt" style:font-name-complex="Arial2" style:font-size-complex="10pt"/>
    </style:style>
    <style:style style:name="T11" style:family="text">
      <style:text-properties fo:color="#334155" style:font-name="Arial" fo:font-size="12pt" style:font-name-asian="Arial2" style:font-size-asian="12pt" style:font-name-complex="Arial2" style:font-size-complex="12pt"/>
    </style:style>
    <style:style style:name="T12" style:family="text">
      <style:text-properties fo:color="#334155" style:font-name="Arial" fo:font-size="10pt" fo:font-weight="normal" style:font-name-asian="Arial2" style:font-size-asian="10pt" style:font-weight-asian="normal" style:font-name-complex="Arial2" style:font-size-complex="10pt" style:font-weight-complex="normal"/>
    </style:style>
    <style:style style:name="T13" style:family="text">
      <style:text-properties fo:color="#334155" style:font-name="Arial" fo:font-size="10pt" fo:font-weight="bold" style:font-name-asian="Arial2" style:font-size-asian="10pt" style:font-weight-asian="bold" style:font-name-complex="Arial2" style:font-size-complex="10pt" style:font-weight-complex="bold"/>
    </style:style>
    <style:style style:name="T14" style:family="text">
      <style:text-properties fo:color="#334155" style:font-name="Arial" fo:font-size="9.5pt" fo:font-weight="normal" style:font-name-asian="Arial2" style:font-size-asian="9.5pt" style:font-weight-asian="normal" style:font-name-complex="Arial2" style:font-size-complex="9.5pt" style:font-weight-complex="normal"/>
    </style:style>
    <style:style style:name="T15" style:family="text">
      <style:text-properties fo:color="#94a3b8" style:font-name="Arial" fo:font-size="11pt" style:font-name-asian="Arial2" style:font-size-asian="11pt" style:font-name-complex="Arial2" style:font-size-complex="11pt"/>
    </style:style>
    <style:style style:name="T16" style:family="text">
      <style:text-properties fo:color="#94a3b8" style:font-name="Arial" fo:font-size="9.5pt" style:font-name-asian="Arial2" style:font-size-asian="9.5pt" style:font-name-complex="Arial2" style:font-size-complex="9.5pt"/>
    </style:style>
    <style:style style:name="T17" style:family="text">
      <style:text-properties fo:color="#94a3b8" style:font-name="Arial" fo:font-size="10.5pt" style:font-name-asian="Arial2" style:font-size-asian="10.5pt" style:font-name-complex="Arial2" style:font-size-complex="10.5pt"/>
    </style:style>
    <style:style style:name="T18" style:family="text">
      <style:text-properties fo:color="#94a3b8" style:font-name="Arial" fo:font-size="8pt" style:font-name-asian="Arial2" style:font-size-asian="8pt" style:font-name-complex="Arial2" style:font-size-complex="8pt"/>
    </style:style>
    <style:style style:name="T19" style:family="text">
      <style:text-properties fo:color="#ffffff" style:font-name="Arial" fo:font-size="14pt" fo:font-weight="bold" style:font-name-asian="Arial2" style:font-size-asian="14pt" style:font-weight-asian="bold" style:font-name-complex="Arial2" style:font-size-complex="14pt" style:font-weight-complex="bold"/>
    </style:style>
    <style:style style:name="T20" style:family="text">
      <style:text-properties fo:color="#ffffff" style:font-name="Arial" fo:font-size="9pt" fo:font-weight="bold" style:font-name-asian="Arial2" style:font-size-asian="9pt" style:font-weight-asian="bold" style:font-name-complex="Arial2" style:font-size-complex="9pt" style:font-weight-complex="bold"/>
    </style:style>
    <style:style style:name="T21" style:family="text">
      <style:text-properties fo:color="#ffffff" style:font-name="Arial" fo:font-size="10pt" fo:font-weight="bold" style:font-name-asian="Arial2" style:font-size-asian="10pt" style:font-weight-asian="bold" style:font-name-complex="Arial2" style:font-size-complex="10pt" style:font-weight-complex="bold"/>
    </style:style>
    <style:style style:name="T22" style:family="text">
      <style:text-properties fo:color="#f59e0b" style:font-name="Arial" fo:font-size="9pt" fo:font-weight="bold" style:font-name-asian="Arial2" style:font-size-asian="9pt" style:font-weight-asian="bold" style:font-name-complex="Arial2" style:font-size-complex="9pt" style:font-weight-complex="bold"/>
    </style:style>
    <style:style style:name="T23" style:family="text">
      <style:text-properties fo:color="#f59e0b" style:font-name="Arial" fo:font-size="10.5pt" style:font-name-asian="Arial2" style:font-size-asian="10.5pt" style:font-name-complex="Arial2" style:font-size-complex="10.5pt"/>
    </style:style>
    <style:style style:name="T24" style:family="text">
      <style:text-properties fo:color="#065f46" style:font-name="Arial" fo:font-size="10.5pt" style:font-name-asian="Arial2" style:font-size-asian="10.5pt" style:font-name-complex="Arial2" style:font-size-complex="10.5pt"/>
    </style:style>
    <style:style style:name="T25" style:family="text">
      <style:text-properties fo:color="#10b981" style:font-name="Arial" fo:font-size="10pt" fo:font-weight="bold" style:font-name-asian="Arial2" style:font-size-asian="10pt" style:font-weight-asian="bold" style:font-name-complex="Arial2" style:font-size-complex="10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1">PULSAR</text:span></text:p>
      <text:p text:style-name="P6"><text:span text:style-name="T5">by Neptune</text:span></text:p>
      <text:p text:style-name="P7"><text:span text:style-name="T7">FEUILLE DE RÉVISION — SOUTENANCE ORALE</text:span></text:p>
      <text:p text:style-name="P8"/>
      <text:p text:style-name="P10"><text:span text:style-name="T11">10 slides · Script oral · Questions jury · Points clés · Réflexes à avoir</text:span></text:p>
      <text:p text:style-name="P4"><text:span text:style-name="T15">Équipe Neptune — Tom Farge · Islem · Manon · Seife — Mai 2026</text:span></text:p>
      <text:p text:style-name="Standard"/>
      <text:h text:style-name="P1" text:outline-level="1"><text:bookmark-start text:name="__RefHeading__7073_930615432"/>Sommaire<text:bookmark-end text:name="__RefHeading__7073_930615432"/></text:h>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text:a xlink:type="simple" xlink:href="#__RefHeading__7073_930615432">Sommaire<text:tab/>2</text:a></text:p>
          <text:p text:style-name="P2"><text:a xlink:type="simple" xlink:href="#__RefHeading__7075_930615432">1. Guide de survie — Avant d'entrer dans la salle<text:tab/>3</text:a></text:p>
          <text:p text:style-name="P2"><text:a xlink:type="simple" xlink:href="#__RefHeading__7077_930615432">2. Script oral — Slide par slide<text:tab/>4</text:a></text:p>
          <text:p text:style-name="P2"><text:a xlink:type="simple" xlink:href="#__RefHeading__7079_930615432">3. Banque de questions — Toutes catégories<text:tab/>11</text:a></text:p>
          <text:p text:style-name="P3"><text:a xlink:type="simple" xlink:href="#__RefHeading__7081_930615432">3.1 Questions techniques<text:tab/>11</text:a></text:p>
          <text:p text:style-name="P3"><text:a xlink:type="simple" xlink:href="#__RefHeading__7083_930615432">3.2 Questions sur les diagrammes<text:tab/>11</text:a></text:p>
          <text:p text:style-name="P3"><text:a xlink:type="simple" xlink:href="#__RefHeading__7085_930615432">3.3 Questions sur l'architecture et les choix projet<text:tab/>12</text:a></text:p>
          <text:p text:style-name="P3"><text:a xlink:type="simple" xlink:href="#__RefHeading__7087_930615432">3.4 Questions pièges — Réponses à ne pas rater<text:tab/>13</text:a></text:p>
          <text:p text:style-name="P2"><text:a xlink:type="simple" xlink:href="#__RefHeading__7089_930615432">4. Glossaire éclair — 40 termes en 2 mots<text:tab/>14</text:a></text:p>
          <text:p text:style-name="P2"><text:a xlink:type="simple" xlink:href="#__RefHeading__7091_930615432">5. Checklist — Le jour J<text:tab/>16</text:a></text:p>
        </text:index-body>
      </text:table-of-content>
      <text:p text:style-name="Standard"/>
      <text:p text:style-name="Standard"/>
      <text:h text:style-name="P1" text:outline-level="1"><text:bookmark-start text:name="__RefHeading__7075_930615432"/>1. Guide de survie — Avant d'entrer dans la salle<text:bookmark-end text:name="__RefHeading__7075_930615432"/></text:h>
      <text:p text:style-name="P9"/>
      <table:table table:name="Tableau1" table:style-name="Tableau1">
        <table:table-column table:style-name="Tableau1.A"/>
        <table:table-row table:style-name="Tableau1.1">
          <table:table-cell table:style-name="Tableau1.A1" office:value-type="string">
            <text:p text:style-name="Standard"><text:span text:style-name="T8">⏱️ Chrono de présentation (8 min max)</text:span></text:p>
          </table:table-cell>
        </table:table-row>
        <table:table-row table:style-name="Tableau1.1">
          <table:table-cell table:style-name="Tableau1.A2" office:value-type="string">
            <text:p text:style-name="Standard"><text:span text:style-name="T12">Slide 1 — Titre : 20 secondes (juste une accroche)</text:span></text:p>
          </table:table-cell>
        </table:table-row>
        <table:table-row table:style-name="Tableau1.1">
          <table:table-cell table:style-name="Tableau1.A2" office:value-type="string">
            <text:p text:style-name="Standard"><text:span text:style-name="T12">Slide 2 — Problème/Solution : 45 secondes</text:span></text:p>
          </table:table-cell>
        </table:table-row>
        <table:table-row table:style-name="Tableau1.1">
          <table:table-cell table:style-name="Tableau1.A2" office:value-type="string">
            <text:p text:style-name="Standard"><text:span text:style-name="T12">Slide 3 — Flutter : 60 secondes</text:span></text:p>
          </table:table-cell>
        </table:table-row>
        <table:table-row table:style-name="Tableau1.1">
          <table:table-cell table:style-name="Tableau1.A2" office:value-type="string">
            <text:p text:style-name="Standard"><text:span text:style-name="T12">Slide 4 — Architecture : 60 secondes</text:span></text:p>
          </table:table-cell>
        </table:table-row>
        <table:table-row table:style-name="Tableau1.1">
          <table:table-cell table:style-name="Tableau1.A2" office:value-type="string">
            <text:p text:style-name="Standard"><text:span text:style-name="T12">Slide 5 — ERD : 60 secondes</text:span></text:p>
          </table:table-cell>
        </table:table-row>
        <table:table-row table:style-name="Tableau1.1">
          <table:table-cell table:style-name="Tableau1.A2" office:value-type="string">
            <text:p text:style-name="Standard"><text:span text:style-name="T12">Slide 6 — MCD/MLD : 60 secondes</text:span></text:p>
          </table:table-cell>
        </table:table-row>
        <table:table-row table:style-name="Tableau1.1">
          <table:table-cell table:style-name="Tableau1.A2" office:value-type="string">
            <text:p text:style-name="Standard"><text:span text:style-name="T12">Slide 7 — Classes + Activité : 60 secondes</text:span></text:p>
          </table:table-cell>
        </table:table-row>
        <table:table-row table:style-name="Tableau1.1">
          <table:table-cell table:style-name="Tableau1.A2" office:value-type="string">
            <text:p text:style-name="Standard"><text:span text:style-name="T12">Slide 8 — Parcours utilisateurs : 45 secondes</text:span></text:p>
          </table:table-cell>
        </table:table-row>
        <table:table-row table:style-name="Tableau1.1">
          <table:table-cell table:style-name="Tableau1.A2" office:value-type="string">
            <text:p text:style-name="Standard"><text:span text:style-name="T12">Slide 9 — Sécurité : 45 secondes</text:span></text:p>
          </table:table-cell>
        </table:table-row>
        <table:table-row table:style-name="Tableau1.1">
          <table:table-cell table:style-name="Tableau1.A2" office:value-type="string">
            <text:p text:style-name="Standard"><text:span text:style-name="T12">Slide 10 — Conclusion : 30 secondes</text:span></text:p>
          </table:table-cell>
        </table:table-row>
        <table:table-row table:style-name="Tableau1.1">
          <table:table-cell table:style-name="Tableau1.A2" office:value-type="string">
            <text:p text:style-name="Standard"><text:span text:style-name="T12">→ TOTAL : ~8 minutes. Rester sous 8'30. Ne jamais lire les slides.</text:span></text:p>
          </table:table-cell>
        </table:table-row>
      </table:table>
      <text:p text:style-name="P11"/>
      <table:table table:name="Tableau2" table:style-name="Tableau2">
        <table:table-column table:style-name="Tableau2.A"/>
        <table:table-row table:style-name="Tableau2.1">
          <table:table-cell table:style-name="Tableau2.A1" office:value-type="string">
            <text:p text:style-name="Standard"><text:span text:style-name="T8">🧠 Les 5 messages à retenir absolument</text:span></text:p>
          </table:table-cell>
        </table:table-row>
        <table:table-row table:style-name="Tableau2.1">
          <table:table-cell table:style-name="Tableau2.A2" office:value-type="string">
            <text:p text:style-name="Standard"><text:span text:style-name="T13">1. Un seul code Flutter → Android + iOS + Web. Impossible à 4 personnes sinon.</text:span></text:p>
          </table:table-cell>
        </table:table-row>
        <table:table-row table:style-name="Tableau2.1">
          <table:table-cell table:style-name="Tableau2.A2" office:value-type="string">
            <text:p text:style-name="Standard"><text:span text:style-name="T13">2. Offline-first : les billets QR fonctionnent SANS réseau (Isar local + HMAC-SHA256).</text:span></text:p>
          </table:table-cell>
        </table:table-row>
        <table:table-row table:style-name="Tableau2.1">
          <table:table-cell table:style-name="Tableau2.A2" office:value-type="string">
            <text:p text:style-name="Standard"><text:span text:style-name="T13">3. Clean Architecture : chaque feature est indépendante, le métier ne connaît pas la BDD.</text:span></text:p>
          </table:table-cell>
        </table:table-row>
        <table:table-row table:style-name="Tableau2.1">
          <table:table-cell table:style-name="Tableau2.A2" office:value-type="string">
            <text:p text:style-name="Standard"><text:span text:style-name="T13">4. Dénormalisation intentionnelle dans Isar : un billet est un snapshot transactionnel.</text:span></text:p>
          </table:table-cell>
        </table:table-row>
        <table:table-row table:style-name="Tableau2.1">
          <table:table-cell table:style-name="Tableau2.A2" office:value-type="string">
            <text:p text:style-name="Standard"><text:span text:style-name="T13">5. MCD → MLD → ERD : 3 niveaux cohérents, 5 entités, les mêmes dans tous les schémas.</text:span></text:p>
          </table:table-cell>
        </table:table-row>
      </table:table>
      <text:p text:style-name="P11"/>
      <table:table table:name="Tableau3" table:style-name="Tableau3">
        <table:table-column table:style-name="Tableau3.A"/>
        <table:table-row table:style-name="Tableau3.1">
          <table:table-cell table:style-name="Tableau3.A1" office:value-type="string">
            <text:p text:style-name="Standard"><text:span text:style-name="T8">🎯 Réflexes de présentation</text:span></text:p>
          </table:table-cell>
        </table:table-row>
        <table:table-row table:style-name="Tableau3.1">
          <table:table-cell table:style-name="Tableau3.A2" office:value-type="string">
            <text:p text:style-name="Standard"><text:span text:style-name="T12">✅ Toujours pointer le diagramme avec la souris/pointeur pendant qu'on explique</text:span></text:p>
          </table:table-cell>
        </table:table-row>
        <table:table-row table:style-name="Tableau3.1">
          <table:table-cell table:style-name="Tableau3.A2" office:value-type="string">
            <text:p text:style-name="Standard"><text:span text:style-name="T12">✅ Utiliser des analogies : 'C'est comme...', 'Imaginez que...'</text:span></text:p>
          </table:table-cell>
        </table:table-row>
        <table:table-row table:style-name="Tableau3.1">
          <table:table-cell table:style-name="Tableau3.A2" office:value-type="string">
            <text:p text:style-name="Standard"><text:span text:style-name="T12">✅ Avant de répondre à une question difficile : 'Bonne question, laissez-moi reformuler...'</text:span></text:p>
          </table:table-cell>
        </table:table-row>
        <table:table-row table:style-name="Tableau3.1">
          <table:table-cell table:style-name="Tableau3.A2" office:value-type="string">
            <text:p text:style-name="Standard"><text:span text:style-name="T12">✅ Si on ne sait pas : 'Ça n'est pas dans le MVP V1, mais voici comment on l'aborderait...'</text:span></text:p>
          </table:table-cell>
        </table:table-row>
        <table:table-row table:style-name="Tableau3.1">
          <table:table-cell table:style-name="Tableau3.A2" office:value-type="string">
            <text:p text:style-name="Standard"><text:span text:style-name="T12">❌ Ne jamais lire le slide mot pour mot</text:span></text:p>
          </table:table-cell>
        </table:table-row>
        <table:table-row table:style-name="Tableau3.1">
          <table:table-cell table:style-name="Tableau3.A2" office:value-type="string">
            <text:p text:style-name="Standard"><text:span text:style-name="T12">❌ Ne jamais dire 'je ne sais pas' sans proposer une piste</text:span></text:p>
          </table:table-cell>
        </table:table-row>
        <table:table-row table:style-name="Tableau3.1">
          <table:table-cell table:style-name="Tableau3.A2" office:value-type="string">
            <text:p text:style-name="Standard"><text:span text:style-name="T12">❌ Ne pas s'excuser de ne pas avoir implémenté une feature — expliquer la priorisation MoSCoW</text:span></text:p>
          </table:table-cell>
        </table:table-row>
      </table:table>
      <text:p text:style-name="Standard"/>
      <text:h text:style-name="P1" text:outline-level="1"><text:bookmark-start text:name="__RefHeading__7077_930615432"/>2. Script oral — Slide par slide<text:bookmark-end text:name="__RefHeading__7077_930615432"/></text:h>
      <text:p text:style-name="P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text:span text:style-name="T19">1</text:span></text:p>
          </table:table-cell>
          <table:table-cell table:style-name="Tableau4.B1" table:number-columns-spanned="2" office:value-type="string">
            <text:p text:style-name="Standard"><text:span text:style-name="T2">Titre — Pulsar by Neptune</text:span></text:p>
          </table:table-cell>
          <table:covered-table-cell/>
          <table:table-cell table:style-name="Tableau4.B1" office:value-type="string">
            <text:p text:style-name="P4"><text:span text:style-name="T16">~20 sec</text:span></text:p>
          </table:table-cell>
        </table:table-row>
        <table:table-row>
          <table:table-cell table:style-name="Tableau4.A2" table:number-columns-spanned="2" office:value-type="string">
            <text:p text:style-name="P4"><text:span text:style-name="T22">📌 POINTS CLÉS</text:span></text:p>
          </table:table-cell>
          <table:covered-table-cell/>
          <table:table-cell table:style-name="Tableau4.C2" table:number-columns-spanned="2" office:value-type="string">
            <text:p text:style-name="P12"><text:span text:style-name="T23">▸ </text:span><text:span text:style-name="T9">Pas besoin de tout expliquer ici, juste poser le contexte</text:span></text:p>
            <text:p text:style-name="P12"><text:span text:style-name="T23">▸ </text:span><text:span text:style-name="T9">Mentionner l'équipe : Tom, Islem, Manon, Seife</text:span></text:p>
            <text:p text:style-name="P12"><text:span text:style-name="T23">▸ </text:span><text:span text:style-name="T9">Annoncer le plan en 1 phrase</text:span></text:p>
          </table:table-cell>
          <table:covered-table-cell/>
        </table:table-row>
        <table:table-row>
          <table:table-cell table:style-name="Tableau4.A3" table:number-columns-spanned="2" office:value-type="string">
            <text:p text:style-name="P4"><text:span text:style-name="T20">🎤 À DIRE</text:span></text:p>
          </table:table-cell>
          <table:covered-table-cell/>
          <table:table-cell table:style-name="Tableau4.C3" table:number-columns-spanned="2" office:value-type="string">
            <text:p text:style-name="Standard"><text:span text:style-name="T24">" Bonjour à tous. Je suis [Prénom], membre de l'équipe Neptune. Nous allons vous présenter Pulsar, notre application mobile de billetterie événementielle éco-responsable. En 8 minutes, je vous montrerai nos choix techniques et comment nos diagrammes s'articulent. "</text:span></text:p>
          </table:table-cell>
          <table:covered-table-cell/>
        </table:table-row>
        <table:table-row>
          <table:table-cell table:style-name="Tableau4.A4" table:number-columns-spanned="2" office:value-type="string">
            <text:p text:style-name="P4"><text:span text:style-name="T20">❓ Q. JURY</text:span></text:p>
          </table:table-cell>
          <table:covered-table-cell/>
          <table:table-cell table:style-name="Tableau4.C4" table:number-columns-spanned="2" office:value-type="string">
            <text:p text:style-name="P13"><text:span text:style-name="T6">Q : C'est un projet scolaire ou réel ?</text:span></text:p>
            <text:p text:style-name="P14"><text:span text:style-name="T25">→ </text:span><text:span text:style-name="T10">Un projet de formation traité comme un projet professionnel : vraie architecture, vrai CDC, choix technologiques justifiés.</text:span></text:p>
          </table:table-cell>
          <table:covered-table-cell/>
        </table:table-row>
      </table:table>
      <text:p text:style-name="P15"/>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text:span text:style-name="T19">2</text:span></text:p>
          </table:table-cell>
          <table:table-cell table:style-name="Tableau5.B1" table:number-columns-spanned="2" office:value-type="string">
            <text:p text:style-name="Standard"><text:span text:style-name="T2">Le problème — La solution</text:span></text:p>
          </table:table-cell>
          <table:covered-table-cell/>
          <table:table-cell table:style-name="Tableau5.B1" office:value-type="string">
            <text:p text:style-name="P4"><text:span text:style-name="T16">~45 sec</text:span></text:p>
          </table:table-cell>
        </table:table-row>
        <table:table-row>
          <table:table-cell table:style-name="Tableau5.A2" table:number-columns-spanned="2" office:value-type="string">
            <text:p text:style-name="P4"><text:span text:style-name="T22">📌 POINTS CLÉS</text:span></text:p>
          </table:table-cell>
          <table:covered-table-cell/>
          <table:table-cell table:style-name="Tableau5.C2" table:number-columns-spanned="2" office:value-type="string">
            <text:p text:style-name="P12"><text:span text:style-name="T23">▸ </text:span><text:span text:style-name="T9">4-5 apps nécessaires aujourd'hui pour organiser une sortie = friction</text:span></text:p>
            <text:p text:style-name="P12"><text:span text:style-name="T23">▸ </text:span><text:span text:style-name="T9">Aucun concurrent ne combine billet + transport + hébergement + CO₂</text:span></text:p>
            <text:p text:style-name="P12"><text:span text:style-name="T23">▸ </text:span><text:span text:style-name="T9">Offline-first = billets disponibles même en zone blanche (festival)</text:span></text:p>
            <text:p text:style-name="P12"><text:span text:style-name="T23">▸ </text:span><text:span text:style-name="T9">Différenciateurs vs Shotgun/Eventbrite : transport intégré + éco-score + offline</text:span></text:p>
          </table:table-cell>
          <table:covered-table-cell/>
        </table:table-row>
        <table:table-row>
          <table:table-cell table:style-name="Tableau5.A3" table:number-columns-spanned="2" office:value-type="string">
            <text:p text:style-name="P4"><text:span text:style-name="T20">🎤 À DIRE</text:span></text:p>
          </table:table-cell>
          <table:covered-table-cell/>
          <table:table-cell table:style-name="Tableau5.C3" table:number-columns-spanned="2" office:value-type="string">
            <text:p text:style-name="Standard"><text:span text:style-name="T24">" Aujourd'hui, pour aller à un concert, vous utilisez Shotgun pour le billet, Google Maps pour le trajet, Booking pour l'hôtel. Trois apps, trois comptes, trois parcours séparés. Pulsar résout ça en un seul endroit — et il calcule automatiquement votre impact carbone selon les référentiels ADEME. "</text:span></text:p>
          </table:table-cell>
          <table:covered-table-cell/>
        </table:table-row>
        <table:table-row>
          <table:table-cell table:style-name="Tableau5.A4" table:number-columns-spanned="2" office:value-type="string">
            <text:p text:style-name="P4"><text:span text:style-name="T20">❓ Q. JURY</text:span></text:p>
          </table:table-cell>
          <table:covered-table-cell/>
          <table:table-cell table:style-name="Tableau5.C4" table:number-columns-spanned="2" office:value-type="string">
            <text:p text:style-name="P13"><text:span text:style-name="T6">Q : En quoi Pulsar est différent de Shotgun ou Eventbrite ?</text:span></text:p>
            <text:p text:style-name="P14"><text:span text:style-name="T25">→ </text:span><text:span text:style-name="T10">Shotgun = billetterie pure. Eventbrite = même chose. Pulsar est le seul à intégrer transport bas carbone + hébergement dans le même flux, avec calcul CO₂ ADEME natif et mode offline-first.</text:span></text:p>
            <text:p text:style-name="P13"><text:span text:style-name="T6">Q : Le mode offline, comment ça marche concrètement ?</text:span></text:p>
            <text:p text:style-name="P14"><text:span text:style-name="T25">→ </text:span><text:span text:style-name="T10">Les données sont stockées dans Isar, une base NoSQL sur le téléphone. Billet QR généré localement avec signature HMAC. Pas besoin de réseau pour entrer dans un festival.</text:span></text:p>
            <text:p text:style-name="P13"><text:span text:style-name="T6">Q : Qui sont vos concurrents directs ?</text:span></text:p>
            <text:p text:style-name="P14"><text:span text:style-name="T25">→ </text:span><text:span text:style-name="T10">Shotgun et Dice pour la billetterie, BlaBlaCar pour le covoiturage, Booking pour l'hébergement. Notre différenciateur : l'intégration des 3 en un seul parcours avec la dimension éco.</text:span></text:p>
          </table:table-cell>
          <table:covered-table-cell/>
        </table:table-row>
      </table:table>
      <text:p text:style-name="P15"/>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4"><text:span text:style-name="T19">3</text:span></text:p>
          </table:table-cell>
          <table:table-cell table:style-name="Tableau6.B1" table:number-columns-spanned="2" office:value-type="string">
            <text:p text:style-name="Standard"><text:span text:style-name="T2">Pourquoi Flutter ?</text:span></text:p>
          </table:table-cell>
          <table:covered-table-cell/>
          <table:table-cell table:style-name="Tableau6.B1" office:value-type="string">
            <text:p text:style-name="P4"><text:span text:style-name="T16">~60 sec</text:span></text:p>
          </table:table-cell>
        </table:table-row>
        <table:table-row>
          <table:table-cell table:style-name="Tableau6.A2" table:number-columns-spanned="2" office:value-type="string">
            <text:p text:style-name="P4"><text:span text:style-name="T22">📌 POINTS CLÉS</text:span></text:p>
          </table:table-cell>
          <table:covered-table-cell/>
          <table:table-cell table:style-name="Tableau6.C2" table:number-columns-spanned="2" office:value-type="string">
            <text:p text:style-name="P12"><text:span text:style-name="T23">▸ </text:span><text:span text:style-name="T9">Flutter = 1 code Dart → Android + iOS + Web (compilation AOT)</text:span></text:p>
            <text:p text:style-name="P12"><text:span text:style-name="T23">▸ </text:span><text:span text:style-name="T9">AOT = code traduit en langage machine AVANT installation (≠ bridge JS de React Native)</text:span></text:p>
            <text:p text:style-name="P12"><text:soft-page-break/><text:span text:style-name="T23">▸ </text:span><text:span text:style-name="T9">60 FPS garantis, QR code &lt; 500ms offline</text:span></text:p>
            <text:p text:style-name="P12"><text:span text:style-name="T23">▸ </text:span><text:span text:style-name="T9">Riverpod pour le state management : compile-safe, sans BuildContext, testable</text:span></text:p>
            <text:p text:style-name="P12"><text:span text:style-name="T23">▸ </text:span><text:span text:style-name="T9">Freezed pour modèles immutables : copyWith, toJson, ==, hashCode automatiques</text:span></text:p>
          </table:table-cell>
          <table:covered-table-cell/>
        </table:table-row>
        <table:table-row>
          <table:table-cell table:style-name="Tableau6.A3" table:number-columns-spanned="2" office:value-type="string">
            <text:p text:style-name="P4"><text:span text:style-name="T20">🎤 À DIRE</text:span></text:p>
          </table:table-cell>
          <table:covered-table-cell/>
          <table:table-cell table:style-name="Tableau6.C3" table:number-columns-spanned="2" office:value-type="string">
            <text:p text:style-name="Standard"><text:span text:style-name="T24">" On a choisi Flutter pour une raison simple : à 4 personnes, on ne peut pas maintenir 3 codebases séparées. Flutter nous donne Android, iOS et Web à partir d'un seul code Dart. Et contrairement à React Native qui utilise un bridge JavaScript, Flutter compile directement en code machine — résultat : 60 images par seconde sans effort. "</text:span></text:p>
          </table:table-cell>
          <table:covered-table-cell/>
        </table:table-row>
        <table:table-row>
          <table:table-cell table:style-name="Tableau6.A4" table:number-columns-spanned="2" office:value-type="string">
            <text:p text:style-name="P4"><text:span text:style-name="T20">❓ Q. JURY</text:span></text:p>
          </table:table-cell>
          <table:covered-table-cell/>
          <table:table-cell table:style-name="Tableau6.C4" table:number-columns-spanned="2" office:value-type="string">
            <text:p text:style-name="P13"><text:span text:style-name="T6">Q : Pourquoi pas React Native, c'est plus populaire ?</text:span></text:p>
            <text:p text:style-name="P14"><text:span text:style-name="T25">→ </text:span><text:span text:style-name="T10">React Native a un bridge JavaScript qui introduit de la latence. Il ne supporte pas le web nativement. Pour nos contraintes (60 FPS, QR offline &lt; 500ms, 3 plateformes), Flutter est objectivement supérieur.</text:span></text:p>
            <text:p text:style-name="P13"><text:span text:style-name="T6">Q : Dart, c'est un langage que vous connaissiez ?</text:span></text:p>
            <text:p text:style-name="P14"><text:span text:style-name="T25">→ </text:span><text:span text:style-name="T10">Non, appris sur ce projet. Syntaxe proche de TypeScript/Java. Null-safety strict : les erreurs de valeur manquante sont détectées à la compilation, pas en prod.</text:span></text:p>
            <text:p text:style-name="P13"><text:span text:style-name="T6">Q : Flutter Web est-il production-ready ?</text:span></text:p>
            <text:p text:style-name="P14"><text:span text:style-name="T25">→ </text:span><text:span text:style-name="T10">Pour notre usage oui : la version web est le back-office organisateur (B2B), pas un site vitrine SEO. Le SEO n'est pas un enjeu car l'acquisition se fait via les stores.</text:span></text:p>
            <text:p text:style-name="P13"><text:span text:style-name="T6">Q : Qu'est-ce que la compilation AOT ?</text:span></text:p>
            <text:p text:style-name="P14"><text:span text:style-name="T25">→ </text:span><text:span text:style-name="T10">Ahead Of Time : le code Dart est traduit en code machine AVANT l'installation de l'app. Comme traduire un livre entier avant de le donner au lecteur, plutôt que de le traduire page par page au moment de la lecture.</text:span></text:p>
          </table:table-cell>
          <table:covered-table-cell/>
        </table:table-row>
      </table:table>
      <text:p text:style-name="P15"/>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text:span text:style-name="T19">4</text:span></text:p>
          </table:table-cell>
          <table:table-cell table:style-name="Tableau7.B1" table:number-columns-spanned="2" office:value-type="string">
            <text:p text:style-name="Standard"><text:span text:style-name="T2">Architecture — Feature-First Clean Architecture</text:span></text:p>
          </table:table-cell>
          <table:covered-table-cell/>
          <table:table-cell table:style-name="Tableau7.B1" office:value-type="string">
            <text:p text:style-name="P4"><text:span text:style-name="T16">~60 sec</text:span></text:p>
          </table:table-cell>
        </table:table-row>
        <table:table-row>
          <table:table-cell table:style-name="Tableau7.A2" table:number-columns-spanned="2" office:value-type="string">
            <text:p text:style-name="P4"><text:span text:style-name="T22">📌 POINTS CLÉS</text:span></text:p>
          </table:table-cell>
          <table:covered-table-cell/>
          <table:table-cell table:style-name="Tableau7.C2" table:number-columns-spanned="2" office:value-type="string">
            <text:p text:style-name="P12"><text:span text:style-name="T23">▸ </text:span><text:span text:style-name="T9">3 couches par feature : Présentation (UI) → Données (Repositories) → Métier (Modèles)</text:span></text:p>
            <text:p text:style-name="P12"><text:span text:style-name="T23">▸ </text:span><text:span text:style-name="T9">Règle de dépendance : le Métier ne connaît ni la BDD ni l'UI</text:span></text:p>
            <text:p text:style-name="P12"><text:span text:style-name="T23">▸ </text:span><text:span text:style-name="T9">Feature-First : chaque module (events/, tickets/, cart/...) contient ses 3 couches</text:span></text:p>
            <text:p text:style-name="P12"><text:span text:style-name="T23">▸ </text:span><text:span text:style-name="T9">9 modules : events, tickets, cart, profile, transport, hebergement, social, b2b, core</text:span></text:p>
            <text:p text:style-name="P12"><text:span text:style-name="T23">▸ </text:span><text:span text:style-name="T9">Riverpod = gestionnaire d'état (données réactives partagées entre écrans)</text:span></text:p>
          </table:table-cell>
          <table:covered-table-cell/>
        </table:table-row>
        <table:table-row>
          <table:table-cell table:style-name="Tableau7.A3" table:number-columns-spanned="2" office:value-type="string">
            <text:p text:style-name="P4"><text:span text:style-name="T20">🎤 À DIRE</text:span></text:p>
          </table:table-cell>
          <table:covered-table-cell/>
          <table:table-cell table:style-name="Tableau7.C3" table:number-columns-spanned="2" office:value-type="string">
            <text:p text:style-name="Standard"><text:span text:style-name="T24">" L'application est organisée en Clean Architecture. 3 couches séparées : la Présentation — ce que l'utilisateur voit, les Données — comment on accède à Isar et aux APIs, et le Métier — les règles de l'application. La règle fondamentale : le Métier ne sait pas comment les données sont stockées. Si on change de base de données demain, seule la couche Données change. "</text:span></text:p>
          </table:table-cell>
          <table:covered-table-cell/>
        </table:table-row>
        <table:table-row>
          <table:table-cell table:style-name="Tableau7.A4" table:number-columns-spanned="2" office:value-type="string">
            <text:p text:style-name="P4"><text:span text:style-name="T20">❓ Q. JURY</text:span></text:p>
          </table:table-cell>
          <table:covered-table-cell/>
          <table:table-cell table:style-name="Tableau7.C4" table:number-columns-spanned="2" office:value-type="string">
            <text:p text:style-name="P13"><text:span text:style-name="T6">Q : C'est de la sur-ingénierie pour un projet scolaire ?</text:span></text:p>
            <text:p text:style-name="P14"><text:span text:style-name="T25">→ </text:span><text:span text:style-name="T10">On a 9 features dans le CDC. Sans cette structure, chaque ajout crée des effets de bord. Le coût initial est 2-3h de setup, récupéré dès la 2e feature. C'est le standard Flutter en production (Google, Uber, BMW).</text:span></text:p>
            <text:p text:style-name="P13"><text:span text:style-name="T6">Q : Qu'est-ce que Riverpod concrètement ?</text:span></text:p>
            <text:p text:style-name="P14"><text:span text:style-name="T25">→ </text:span><text:span text:style-name="T10">Un Provider Riverpod expose une donnée réactive. Quand le panier change, tous les écrans abonnés se rebuild </text:span><text:soft-page-break/><text:span text:style-name="T10">automatiquement. Avantage : erreurs détectées à la compilation (compile-safe), pas besoin du BuildContext.</text:span></text:p>
            <text:p text:style-name="P13"><text:span text:style-name="T6">Q : Pourquoi Feature-First et pas Layer-First ?</text:span></text:p>
            <text:p text:style-name="P14"><text:span text:style-name="T25">→ </text:span><text:span text:style-name="T10">En Layer-First, ajouter une feature touche 3-4 dossiers différents. En Feature-First, tout est colocalisé : quand Islem travaille sur transport/ et Manon sur profile/, ils ne sont jamais dans le même fichier.</text:span></text:p>
            <text:p text:style-name="P13"><text:span text:style-name="T6">Q : Qu'est-ce que Freezed ?</text:span></text:p>
            <text:p text:style-name="P14"><text:span text:style-name="T25">→ </text:span><text:span text:style-name="T10">Un générateur de code qui produit automatiquement copyWith(), toJson(), fromJson(), ==, hashCode pour chaque modèle. Évite 80-100 lignes de boilerplate par classe et élimine les bugs de comparaison.</text:span></text:p>
          </table:table-cell>
          <table:covered-table-cell/>
        </table:table-row>
      </table:table>
      <text:p text:style-name="P15"/>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4"><text:span text:style-name="T19">5</text:span></text:p>
          </table:table-cell>
          <table:table-cell table:style-name="Tableau8.B1" table:number-columns-spanned="2" office:value-type="string">
            <text:p text:style-name="Standard"><text:span text:style-name="T2">ERD — Base de données Isar</text:span></text:p>
          </table:table-cell>
          <table:covered-table-cell/>
          <table:table-cell table:style-name="Tableau8.B1" office:value-type="string">
            <text:p text:style-name="P4"><text:span text:style-name="T16">~60 sec</text:span></text:p>
          </table:table-cell>
        </table:table-row>
        <table:table-row>
          <table:table-cell table:style-name="Tableau8.A2" table:number-columns-spanned="2" office:value-type="string">
            <text:p text:style-name="P4"><text:span text:style-name="T22">📌 POINTS CLÉS</text:span></text:p>
          </table:table-cell>
          <table:covered-table-cell/>
          <table:table-cell table:style-name="Tableau8.C2" table:number-columns-spanned="2" office:value-type="string">
            <text:p text:style-name="P12"><text:span text:style-name="T23">▸ </text:span><text:span text:style-name="T9">Isar = base NoSQL locale sur le téléphone (250 000 ops/sec, offline-first)</text:span></text:p>
            <text:p text:style-name="P12"><text:span text:style-name="T23">▸ </text:span><text:span text:style-name="T9">5 collections : IsarUserProfile, IsarEvent, IsarTicket, IsarCartItem, IsarFavorite</text:span></text:p>
            <text:p text:style-name="P12"><text:span text:style-name="T23">▸ </text:span><text:span text:style-name="T9">IsarEvent : dénormalisé intentionnellement → affichage offline sans jointure</text:span></text:p>
            <text:p text:style-name="P12"><text:span text:style-name="T23">▸ </text:span><text:span text:style-name="T9">IsarTicket : billet avec QR code signé HMAC-SHA256 → impossible à falsifier</text:span></text:p>
            <text:p text:style-name="P12"><text:span text:style-name="T23">▸ </text:span><text:span text:style-name="T9">IsarCartItem → devient IsarTicket après checkout (transition transactionnelle)</text:span></text:p>
            <text:p text:style-name="P12"><text:span text:style-name="T23">▸ </text:span><text:span text:style-name="T9">ATTENTION : Isar ne supporte pas Flutter Web → mitigation = couche Repository abstraite</text:span></text:p>
          </table:table-cell>
          <table:covered-table-cell/>
        </table:table-row>
        <table:table-row>
          <table:table-cell table:style-name="Tableau8.A3" table:number-columns-spanned="2" office:value-type="string">
            <text:p text:style-name="P4"><text:span text:style-name="T20">🎤 À DIRE</text:span></text:p>
          </table:table-cell>
          <table:covered-table-cell/>
          <table:table-cell table:style-name="Tableau8.C3" table:number-columns-spanned="2" office:value-type="string">
            <text:p text:style-name="Standard"><text:span text:style-name="T24">" Notre base de données locale utilise Isar — une base NoSQL directement sur le téléphone. 5 collections. Le point le plus important : IsarEvent est dénormalisé, c'est-à-dire que chaque événement porte toutes ses informations pour être affichable sans réseau. IsarTicket contient le billet avec son QR code signé cryptographiquement — impossible à falsifier sans la clé secrète du serveur. "</text:span></text:p>
          </table:table-cell>
          <table:covered-table-cell/>
        </table:table-row>
        <table:table-row>
          <table:table-cell table:style-name="Tableau8.A4" table:number-columns-spanned="2" office:value-type="string">
            <text:p text:style-name="P4"><text:span text:style-name="T20">❓ Q. JURY</text:span></text:p>
          </table:table-cell>
          <table:covered-table-cell/>
          <table:table-cell table:style-name="Tableau8.C4" table:number-columns-spanned="2" office:value-type="string">
            <text:p text:style-name="P13"><text:span text:style-name="T6">Q : Pourquoi NoSQL et pas SQL ?</text:span></text:p>
            <text:p text:style-name="P14"><text:span text:style-name="T25">→ </text:span><text:span text:style-name="T10">Isar = 250k ops/sec sur mobile. En offline-first, chaque document doit être auto-suffisant : pas de jointures sans réseau. C'est le pattern MongoDB/Firestore. Le MLD montre comment on le modéliserait en SQL si nécessaire.</text:span></text:p>
            <text:p text:style-name="P13"><text:span text:style-name="T6">Q : La dénormalisation de IsarEvent, c'est pas une faute de modélisation ?</text:span></text:p>
            <text:p text:style-name="P14"><text:span text:style-name="T25">→ </text:span><text:span text:style-name="T10">En SQL pur, oui. Mais ici c'est voulu : IsarTicket copie nom+lieu de l'événement car c'est un snapshot transactionnel — si l'organisateur change le nom après la vente, le billet doit garder l'ancienne info.</text:span></text:p>
            <text:p text:style-name="P13"><text:span text:style-name="T6">Q : Isar ne supporte pas Flutter Web — vous l'avez anticipé ?</text:span></text:p>
            <text:p text:style-name="P14"><text:span text:style-name="T25">→ </text:span><text:span text:style-name="T10">Oui, c'est le risque n°1 documenté dans notre CDC. Mitigation : couche Repository abstraite. Si on migre vers Hive CE, on modifie uniquement le Repository — les 8 autres modules ne bougent pas. Estimé à 2-3 jours.</text:span></text:p>
            <text:p text:style-name="P13"><text:span text:style-name="T6">Q : C'est quoi la différence entre ERD, MCD et MLD ?</text:span></text:p>
            <text:p text:style-name="P14"><text:span text:style-name="T25">→ </text:span><text:span text:style-name="T10">MCD = conceptuel Merise (entités métier, indépendant de la techno). MLD = transposition en tables SQL avec clés PK/FK. ERD = le schéma réel implémenté dans Isar avec les types Dart. Les 3 ont les mêmes 5 entités : cohérence totale.</text:span></text:p>
          </table:table-cell>
          <table:covered-table-cell/>
        </table:table-row>
      </table:table>
      <text:p text:style-name="P15"/>
      <table:table table:name="Tableau9" table:style-name="Tableau9">
        <table:table-column table:style-name="Tableau9.A"/>
        <table:table-column table:style-name="Tableau9.B"/>
        <table:table-column table:style-name="Tableau9.C"/>
        <table:table-column table:style-name="Tableau9.D"/>
        <text:soft-page-break/>
        <table:table-row table:style-name="Tableau9.1">
          <table:table-cell table:style-name="Tableau9.A1" office:value-type="string">
            <text:p text:style-name="P4"><text:span text:style-name="T19">6</text:span></text:p>
          </table:table-cell>
          <table:table-cell table:style-name="Tableau9.B1" table:number-columns-spanned="2" office:value-type="string">
            <text:p text:style-name="Standard"><text:span text:style-name="T2">MCD &amp; MLD — Modélisation Merise</text:span></text:p>
          </table:table-cell>
          <table:covered-table-cell/>
          <table:table-cell table:style-name="Tableau9.B1" office:value-type="string">
            <text:p text:style-name="P4"><text:span text:style-name="T16">~60 sec</text:span></text:p>
          </table:table-cell>
        </table:table-row>
        <table:table-row>
          <table:table-cell table:style-name="Tableau9.A2" table:number-columns-spanned="2" office:value-type="string">
            <text:p text:style-name="P4"><text:span text:style-name="T22">📌 POINTS CLÉS</text:span></text:p>
          </table:table-cell>
          <table:covered-table-cell/>
          <table:table-cell table:style-name="Tableau9.C2" table:number-columns-spanned="2" office:value-type="string">
            <text:p text:style-name="P12"><text:span text:style-name="T23">▸ </text:span><text:span text:style-name="T9">MCD = Modèle Conceptuel : entités + associations + cardinalités (sans techno)</text:span></text:p>
            <text:p text:style-name="P12"><text:span text:style-name="T23">▸ </text:span><text:span text:style-name="T9">5 entités : UTILISATEUR, ÉVÉNEMENT, BILLET, PANIER, FAVORI</text:span></text:p>
            <text:p text:style-name="P12"><text:span text:style-name="T23">▸ </text:span><text:span text:style-name="T9">Associations : ACHÈTE (1,N), CONCERNE (1,1), CONTIENT (1,N), AJOUTE (0,N), RÉFÉRENCE</text:span></text:p>
            <text:p text:style-name="P12"><text:span text:style-name="T23">▸ </text:span><text:span text:style-name="T9">3 règles de passage MCD→MLD : entité→table, identifiant→PK, association 1,N→FK</text:span></text:p>
            <text:p text:style-name="P12"><text:span text:style-name="T23">▸ </text:span><text:span text:style-name="T9">MLD : 5 tables SQL avec types VARCHAR/DECIMAL/BOOLEAN/JSON/DATETIME</text:span></text:p>
            <text:p text:style-name="P12"><text:span text:style-name="T23">▸ </text:span><text:span text:style-name="T9">Dénormalisation intentionnelle documentée (note dans le MLD)</text:span></text:p>
          </table:table-cell>
          <table:covered-table-cell/>
        </table:table-row>
        <table:table-row>
          <table:table-cell table:style-name="Tableau9.A3" table:number-columns-spanned="2" office:value-type="string">
            <text:p text:style-name="P4"><text:span text:style-name="T20">🎤 À DIRE</text:span></text:p>
          </table:table-cell>
          <table:covered-table-cell/>
          <table:table-cell table:style-name="Tableau9.C3" table:number-columns-spanned="2" office:value-type="string">
            <text:p text:style-name="Standard"><text:span text:style-name="T24">" La méthode Merise demande de modéliser en deux étapes. D'abord le MCD : les entités métier et leurs associations, sans penser à la technologie. Ensuite, 3 règles mécaniques pour obtenir le MLD. Règle 1 : chaque entité devient une table. Règle 2 : son identifiant devient la clé primaire. Règle 3 : chaque association 1 à N se traduit par une clé étrangère dans la table côté N. "</text:span></text:p>
          </table:table-cell>
          <table:covered-table-cell/>
        </table:table-row>
        <table:table-row>
          <table:table-cell table:style-name="Tableau9.A4" table:number-columns-spanned="2" office:value-type="string">
            <text:p text:style-name="P4"><text:span text:style-name="T20">❓ Q. JURY</text:span></text:p>
          </table:table-cell>
          <table:covered-table-cell/>
          <table:table-cell table:style-name="Tableau9.C4" table:number-columns-spanned="2" office:value-type="string">
            <text:p text:style-name="P13"><text:span text:style-name="T6">Q : Pourquoi faire un MLD si vous utilisez du NoSQL ?</text:span></text:p>
            <text:p text:style-name="P14"><text:span text:style-name="T25">→ </text:span><text:span text:style-name="T10">3 raisons : démontrer la maîtrise relationnelle, préparer un éventuel back-end PostgreSQL en V2, et valider les types de données (les VARCHAR du MLD correspondent aux String de Dart dans l'ERD).</text:span></text:p>
            <text:p text:style-name="P13"><text:span text:style-name="T6">Q : La cardinalité de l'association FAVORI est-elle correcte ?</text:span></text:p>
            <text:p text:style-name="P14"><text:span text:style-name="T25">→ </text:span><text:span text:style-name="T10">Oui. C'est une N:N avec attribut propre (dateAjout), donc on la modélise comme entité-association. Un utilisateur a 0,N favoris, un événement est favori de 0,N utilisateurs.</text:span></text:p>
            <text:p text:style-name="P13"><text:span text:style-name="T6">Q : Quelle est la différence entre PK et UK ?</text:span></text:p>
            <text:p text:style-name="P14"><text:span text:style-name="T25">→ </text:span><text:span text:style-name="T10">PK (Primary Key) = identifiant auto-incrémenté par Isar. UK (Unique Key) = contrainte d'unicité sur un champ métier (ex: eventId). On peut chercher par eventId sans utiliser l'id technique de Isar.</text:span></text:p>
            <text:p text:style-name="P13"><text:span text:style-name="T6">Q : Que représente la cardinalité 0,N pour BILLET ?</text:span></text:p>
            <text:p text:style-name="P14"><text:span text:style-name="T25">→ </text:span><text:span text:style-name="T10">Un événement peut avoir 0 billet (créé mais pas encore vendu) à N billets (toutes les places vendues). Le 0 est important : l'événement existe dans le catalogue avant toute vente.</text:span></text:p>
          </table:table-cell>
          <table:covered-table-cell/>
        </table:table-row>
      </table:table>
      <text:p text:style-name="P1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text:span text:style-name="T19">7</text:span></text:p>
          </table:table-cell>
          <table:table-cell table:style-name="Tableau10.B1" table:number-columns-spanned="2" office:value-type="string">
            <text:p text:style-name="Standard"><text:span text:style-name="T2">Diagramme de Classes + Activité UML</text:span></text:p>
          </table:table-cell>
          <table:covered-table-cell/>
          <table:table-cell table:style-name="Tableau10.B1" office:value-type="string">
            <text:p text:style-name="P4"><text:span text:style-name="T16">~60 sec</text:span></text:p>
          </table:table-cell>
        </table:table-row>
        <table:table-row>
          <table:table-cell table:style-name="Tableau10.A2" table:number-columns-spanned="2" office:value-type="string">
            <text:p text:style-name="P4"><text:span text:style-name="T22">📌 POINTS CLÉS</text:span></text:p>
          </table:table-cell>
          <table:covered-table-cell/>
          <table:table-cell table:style-name="Tableau10.C2" table:number-columns-spanned="2" office:value-type="string">
            <text:p text:style-name="P12"><text:span text:style-name="T23">▸ </text:span><text:span text:style-name="T9">Classes : 5 modèles Freezed (domain) + 3 repositories (data) + 1 IsarService (core)</text:span></text:p>
            <text:p text:style-name="P12"><text:span text:style-name="T23">▸ </text:span><text:span text:style-name="T9">Stéréotypes UML : «domain/models», «data/repositories», «core/database»</text:span></text:p>
            <text:p text:style-name="P12"><text:span text:style-name="T23">▸ </text:span><text:span text:style-name="T9">Relations : 1:* (UserProfile→Ticket), «manages» (Repo→Model), «uses» (Repo→IsarService)</text:span></text:p>
            <text:p text:style-name="P12"><text:span text:style-name="T23">▸ </text:span><text:span text:style-name="T9">CartItem→Ticket = transition «checkout» (flèche pointillée, pas une association permanente)</text:span></text:p>
            <text:p text:style-name="P12"><text:span text:style-name="T23">▸ </text:span><text:span text:style-name="T9">Activité : 3 swimlanes (Utilisateur, Système, Organisateur/Hôte)</text:span></text:p>
            <text:p text:style-name="P12"><text:span text:style-name="T23">▸ </text:span><text:span text:style-name="T9">Fork/Join = transport + hébergement sont indépendants (pas de dépendance entre eux)</text:span></text:p>
          </table:table-cell>
          <table:covered-table-cell/>
        </table:table-row>
        <table:table-row>
          <table:table-cell table:style-name="Tableau10.A3" table:number-columns-spanned="2" office:value-type="string">
            <text:p text:style-name="P4"><text:span text:style-name="T20">🎤 À DIRE</text:span></text:p>
          </table:table-cell>
          <table:covered-table-cell/>
          <table:table-cell table:style-name="Tableau10.C3" table:number-columns-spanned="2" office:value-type="string">
            <text:p text:style-name="Standard"><text:span text:style-name="T24">" Le diagramme de classes montre l'organisation objet du </text:span><text:soft-page-break/><text:span text:style-name="T24">code Flutter. 5 modèles Freezed immutables — ils ne peuvent pas être modifiés accidentellement. 3 repositories qui orchestrent l'accès à Isar via le service singleton. Le diagramme d'activité montre le même parcours côté flux : les 3 swimlanes séparent les responsabilités de chaque acteur. "</text:span></text:p>
          </table:table-cell>
          <table:covered-table-cell/>
        </table:table-row>
        <table:table-row>
          <table:table-cell table:style-name="Tableau10.A4" table:number-columns-spanned="2" office:value-type="string">
            <text:p text:style-name="P4"><text:span text:style-name="T20">❓ Q. JURY</text:span></text:p>
          </table:table-cell>
          <table:covered-table-cell/>
          <table:table-cell table:style-name="Tableau10.C4" table:number-columns-spanned="2" office:value-type="string">
            <text:p text:style-name="P13"><text:span text:style-name="T6">Q : Pourquoi des modèles immutables ?</text:span></text:p>
            <text:p text:style-name="P14"><text:span text:style-name="T25">→ </text:span><text:span text:style-name="T10">Un objet immutable ne peut pas être modifié après création. Pour changer un champ, on crée une copie avec copyWith(). Ça garantit qu'un widget ne modifie pas accidentellement une donnée partagée dans l'arbre Flutter.</text:span></text:p>
            <text:p text:style-name="P13"><text:span text:style-name="T6">Q : Le fork dans le diagramme d'activité, c'est du multi-threading ?</text:span></text:p>
            <text:p text:style-name="P14"><text:span text:style-name="T25">→ </text:span><text:span text:style-name="T10">Non. C'est une notation UML qui dit que transport et hébergement sont indépendants fonctionnellement. L'utilisateur les fait l'un après l'autre dans l'UI. Le fork montre l'absence de dépendance, pas une exécution simultanée.</text:span></text:p>
            <text:p text:style-name="P13"><text:span text:style-name="T6">Q : Où sont les Providers Riverpod dans le diagramme de classes ?</text:span></text:p>
            <text:p text:style-name="P14"><text:span text:style-name="T25">→ </text:span><text:span text:style-name="T10">Les Providers ne sont pas des classes UML — ce sont des fonctions réactives. Ils vivent dans la couche Présentation et font le lien entre Repositories et Screens. Un diagramme de composants les modéliserait mieux.</text:span></text:p>
            <text:p text:style-name="P13"><text:span text:style-name="T6">Q : Que représente la flèche CartItem → Ticket en pointillé ?</text:span></text:p>
            <text:p text:style-name="P14"><text:span text:style-name="T25">→ </text:span><text:span text:style-name="T10">Une relation de transition, pas d'association permanente. Au checkout, chaque CartItem est transformé en Ticket. La table IsarCartItem est ensuite vidée. Le stéréotype «checkout» documente ce processus métier.</text:span></text:p>
          </table:table-cell>
          <table:covered-table-cell/>
        </table:table-row>
      </table:table>
      <text:p text:style-name="P15"/>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4"><text:span text:style-name="T19">8</text:span></text:p>
          </table:table-cell>
          <table:table-cell table:style-name="Tableau11.B1" table:number-columns-spanned="2" office:value-type="string">
            <text:p text:style-name="Standard"><text:span text:style-name="T2">Parcours Utilisateurs — 5 flowcharts</text:span></text:p>
          </table:table-cell>
          <table:covered-table-cell/>
          <table:table-cell table:style-name="Tableau11.B1" office:value-type="string">
            <text:p text:style-name="P4"><text:span text:style-name="T16">~45 sec</text:span></text:p>
          </table:table-cell>
        </table:table-row>
        <table:table-row>
          <table:table-cell table:style-name="Tableau11.A2" table:number-columns-spanned="2" office:value-type="string">
            <text:p text:style-name="P4"><text:span text:style-name="T22">📌 POINTS CLÉS</text:span></text:p>
          </table:table-cell>
          <table:covered-table-cell/>
          <table:table-cell table:style-name="Tableau11.C2" table:number-columns-spanned="2" office:value-type="string">
            <text:p text:style-name="P12"><text:span text:style-name="T23">▸ </text:span><text:span text:style-name="T9">5 parcours : Achat (8 étapes), Transport (5+3 branches), Hébergement (6), Jour J (7), Global</text:span></text:p>
            <text:p text:style-name="P12"><text:span text:style-name="T23">▸ </text:span><text:span text:style-name="T9">Centrés utilisateur mais incluent Système, Organisateur, Hôte aux moments clés</text:span></text:p>
            <text:p text:style-name="P12"><text:span text:style-name="T23">▸ </text:span><text:span text:style-name="T9">Chaque étape = 1 user story du CDC (traçabilité bidirectionnelle)</text:span></text:p>
            <text:p text:style-name="P12"><text:span text:style-name="T23">▸ </text:span><text:span text:style-name="T9">Émotion cible par phase : curiosité → satisfaction → fierté → immersion → nostalgie</text:span></text:p>
            <text:p text:style-name="P12"><text:span text:style-name="T23">▸ </text:span><text:span text:style-name="T9">KPIs associés : taux conversion &gt; 8%, checkout &lt; 90sec, CO₂ par trajet, % choix bas carbone</text:span></text:p>
          </table:table-cell>
          <table:covered-table-cell/>
        </table:table-row>
        <table:table-row>
          <table:table-cell table:style-name="Tableau11.A3" table:number-columns-spanned="2" office:value-type="string">
            <text:p text:style-name="P4"><text:span text:style-name="T20">🎤 À DIRE</text:span></text:p>
          </table:table-cell>
          <table:covered-table-cell/>
          <table:table-cell table:style-name="Tableau11.C3" table:number-columns-spanned="2" office:value-type="string">
            <text:p text:style-name="Standard"><text:span text:style-name="T24">" Pour chaque module important, on a modélisé le parcours utilisateur complet. Le parcours 1 montre l'achat en 8 étapes — de l'ouverture de l'app au QR code. Le système intervient à l'étape 7 pour générer le QR et notifier. Les 5 parcours couvrent ensemble les 9 modules du CDC. "</text:span></text:p>
          </table:table-cell>
          <table:covered-table-cell/>
        </table:table-row>
        <table:table-row>
          <table:table-cell table:style-name="Tableau11.A4" table:number-columns-spanned="2" office:value-type="string">
            <text:p text:style-name="P4"><text:span text:style-name="T20">❓ Q. JURY</text:span></text:p>
          </table:table-cell>
          <table:covered-table-cell/>
          <table:table-cell table:style-name="Tableau11.C4" table:number-columns-spanned="2" office:value-type="string">
            <text:p text:style-name="P13"><text:span text:style-name="T6">Q : Pourquoi 5 parcours et pas 1 seul ?</text:span></text:p>
            <text:p text:style-name="P14"><text:span text:style-name="T25">→ </text:span><text:span text:style-name="T10">Un parcours de 30 étapes serait illisible et intenable. La décomposition correspond à notre architecture Feature-First, facilite les tests (transport testable indépendamment), et permet à chaque membre d'avoir un périmètre.</text:span></text:p>
            <text:p text:style-name="P13"><text:span text:style-name="T6">Q : Comment vous assurez la cohérence entre parcours et code ?</text:span></text:p>
            <text:p text:style-name="P14"><text:span text:style-name="T25">→ </text:span><text:span text:style-name="T10">Chaque étape renvoie à une user story du CDC. Ex : étape 7 parcours 1 (paiement) = US-PAY-01 + US-PAY-02 + US-BILL-03. C'est une traçabilité bidirectionnelle.</text:span></text:p>
            <text:p text:style-name="P13"><text:span text:style-name="T6">Q : C'est quoi l'éco-score ?</text:span></text:p>
            <text:p text:style-name="P14"><text:soft-page-break/><text:span text:style-name="T25">→ </text:span><text:span text:style-name="T10">Un score personnel calculé à partir des CO₂ économisés sur chaque trajet vs voiture individuelle (référentiels ADEME). Il alimente un classement communautaire et des badges de progression.</text:span></text:p>
          </table:table-cell>
          <table:covered-table-cell/>
        </table:table-row>
      </table:table>
      <text:p text:style-name="P15"/>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4"><text:span text:style-name="T19">9</text:span></text:p>
          </table:table-cell>
          <table:table-cell table:style-name="Tableau12.B1" table:number-columns-spanned="2" office:value-type="string">
            <text:p text:style-name="Standard"><text:span text:style-name="T2">Sécurité — 6 couches</text:span></text:p>
          </table:table-cell>
          <table:covered-table-cell/>
          <table:table-cell table:style-name="Tableau12.B1" office:value-type="string">
            <text:p text:style-name="P4"><text:span text:style-name="T16">~45 sec</text:span></text:p>
          </table:table-cell>
        </table:table-row>
        <table:table-row>
          <table:table-cell table:style-name="Tableau12.A2" table:number-columns-spanned="2" office:value-type="string">
            <text:p text:style-name="P4"><text:span text:style-name="T22">📌 POINTS CLÉS</text:span></text:p>
          </table:table-cell>
          <table:covered-table-cell/>
          <table:table-cell table:style-name="Tableau12.C2" table:number-columns-spanned="2" office:value-type="string">
            <text:p text:style-name="P12"><text:span text:style-name="T23">▸ </text:span><text:span text:style-name="T9">QR code HMAC-SHA256 : signé côté serveur, vérifiable à l'entrée, infalsifiable</text:span></text:p>
            <text:p text:style-name="P12"><text:span text:style-name="T23">▸ </text:span><text:span text:style-name="T9">Stripe (PCI-DSS) : aucune donnée bancaire sur nos serveurs</text:span></text:p>
            <text:p text:style-name="P12"><text:span text:style-name="T23">▸ </text:span><text:span text:style-name="T9">Firebase Auth + JWT : tokens signés avec rôles (user/organizer/host)</text:span></text:p>
            <text:p text:style-name="P12"><text:span text:style-name="T23">▸ </text:span><text:span text:style-name="T9">AES-256 : base Isar locale chiffrée (perte téléphone ≠ fuite données)</text:span></text:p>
            <text:p text:style-name="P12"><text:span text:style-name="T23">▸ </text:span><text:span text:style-name="T9">TLS 1.3 + certificate pinning : communications chiffrées</text:span></text:p>
            <text:p text:style-name="P12"><text:span text:style-name="T23">▸ </text:span><text:span text:style-name="T9">RGPD Privacy by Design : accès, rectification, suppression, export dès V1</text:span></text:p>
          </table:table-cell>
          <table:covered-table-cell/>
        </table:table-row>
        <table:table-row>
          <table:table-cell table:style-name="Tableau12.A3" table:number-columns-spanned="2" office:value-type="string">
            <text:p text:style-name="P4"><text:span text:style-name="T20">🎤 À DIRE</text:span></text:p>
          </table:table-cell>
          <table:covered-table-cell/>
          <table:table-cell table:style-name="Tableau12.C3" table:number-columns-spanned="2" office:value-type="string">
            <text:p text:style-name="Standard"><text:span text:style-name="T24">" La sécurité est traitée à chaque couche. Le point le plus technique : le QR code est signé avec HMAC-SHA256. Le serveur calcule une signature à partir du contenu du billet et d'une clé secrète. À l'entrée, on recalcule — si les signatures correspondent, le billet est authentique. Personne ne peut fabriquer un faux QR sans la clé serveur. "</text:span></text:p>
          </table:table-cell>
          <table:covered-table-cell/>
        </table:table-row>
        <table:table-row>
          <table:table-cell table:style-name="Tableau12.A4" table:number-columns-spanned="2" office:value-type="string">
            <text:p text:style-name="P4"><text:span text:style-name="T20">❓ Q. JURY</text:span></text:p>
          </table:table-cell>
          <table:covered-table-cell/>
          <table:table-cell table:style-name="Tableau12.C4" table:number-columns-spanned="2" office:value-type="string">
            <text:p text:style-name="P13"><text:span text:style-name="T6">Q : Comment ça marche le HMAC concrètement ?</text:span></text:p>
            <text:p text:style-name="P14"><text:span text:style-name="T25">→ </text:span><text:span text:style-name="T10">Le QR contient ticketId + eventId + userId + timestamp + HMAC(tous ces champs, clé secrète serveur). Au scan, on refait le calcul. Si HMAC identique → billet valide. Comme un sceau royal : on peut lire le document, mais pas le reproduire sans le sceau.</text:span></text:p>
            <text:p text:style-name="P13"><text:span text:style-name="T6">Q : Pourquoi déléguer le paiement à Stripe ?</text:span></text:p>
            <text:p text:style-name="P14"><text:span text:style-name="T25">→ </text:span><text:span text:style-name="T10">Stripe est certifié PCI-DSS : norme bancaire internationale. Gérer nous-mêmes les CB imposerait un audit PCI-DSS à ~50k€. On délègue à Stripe — nos serveurs ne voient jamais un numéro de CB.</text:span></text:p>
            <text:p text:style-name="P13"><text:span text:style-name="T6">Q : Comment garantissez-vous le RGPD ?</text:span></text:p>
            <text:p text:style-name="P14"><text:span text:style-name="T25">→ </text:span><text:span text:style-name="T10">Privacy by Design dès le CDC : consentement granulaire (un toggle par traitement), droit d'export en JSON, suppression cascade dans Isar, aucune donnée partagée entre utilisateurs via la messagerie interne.</text:span></text:p>
            <text:p text:style-name="P13"><text:span text:style-name="T6">Q : AES-256, c'est réellement utile sur mobile ?</text:span></text:p>
            <text:p text:style-name="P14"><text:span text:style-name="T25">→ </text:span><text:span text:style-name="T10">Oui — si quelqu'un vole le téléphone, il ne peut pas lire les billets et données sans la clé dérivée du PIN biométrique. Standard ANSSI / NIST. Isar le propose nativement.</text:span></text:p>
          </table:table-cell>
          <table:covered-table-cell/>
        </table:table-row>
      </table:table>
      <text:p text:style-name="P15"/>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office:value-type="string">
            <text:p text:style-name="P4"><text:span text:style-name="T19">10</text:span></text:p>
          </table:table-cell>
          <table:table-cell table:style-name="Tableau13.B1" table:number-columns-spanned="2" office:value-type="string">
            <text:p text:style-name="Standard"><text:span text:style-name="T2">Conclusion — Ce qu'on a livré</text:span></text:p>
          </table:table-cell>
          <table:covered-table-cell/>
          <table:table-cell table:style-name="Tableau13.B1" office:value-type="string">
            <text:p text:style-name="P4"><text:span text:style-name="T16">~30 sec</text:span></text:p>
          </table:table-cell>
        </table:table-row>
        <table:table-row>
          <table:table-cell table:style-name="Tableau13.A2" table:number-columns-spanned="2" office:value-type="string">
            <text:p text:style-name="P4"><text:span text:style-name="T22">📌 POINTS CLÉS</text:span></text:p>
          </table:table-cell>
          <table:covered-table-cell/>
          <table:table-cell table:style-name="Tableau13.C2" table:number-columns-spanned="2" office:value-type="string">
            <text:p text:style-name="P12"><text:span text:style-name="T23">▸ </text:span><text:span text:style-name="T9">App Flutter : 42 fichiers, Clean Architecture, 6 écrans, Android+iOS+Web</text:span></text:p>
            <text:p text:style-name="P12"><text:span text:style-name="T23">▸ </text:span><text:span text:style-name="T9">CDC : 60 user stories, 9 modules, 6 phases de planning, 6 risques</text:span></text:p>
            <text:p text:style-name="P12"><text:span text:style-name="T23">▸ </text:span><text:span text:style-name="T9">Schémas : ERD + MCD + MLD + Diagramme Classes + Diagramme Activité + 5 Parcours</text:span></text:p>
            <text:p text:style-name="P12"><text:span text:style-name="T23">▸ </text:span><text:span text:style-name="T9">Fichier draw.io : 8 onglets 100% éditables</text:span></text:p>
            <text:p text:style-name="P12"><text:span text:style-name="T23">▸ </text:span><text:span text:style-name="T9">Dossier présentation : 25 pages, 25 Q&amp;R, glossaire 65 termes</text:span></text:p>
          </table:table-cell>
          <table:covered-table-cell/>
        </table:table-row>
        <text:soft-page-break/>
        <table:table-row>
          <table:table-cell table:style-name="Tableau13.A3" table:number-columns-spanned="2" office:value-type="string">
            <text:p text:style-name="P4"><text:span text:style-name="T20">🎤 À DIRE</text:span></text:p>
          </table:table-cell>
          <table:covered-table-cell/>
          <table:table-cell table:style-name="Tableau13.C3" table:number-columns-spanned="2" office:value-type="string">
            <text:p text:style-name="Standard"><text:span text:style-name="T24">" Pour résumer : une application Flutter complète, un CDC de 60 user stories, une modélisation rigoureuse sur 3 niveaux, et tous les diagrammes 100% éditables dans draw.io. Nous avons traité ce projet comme un vrai projet professionnel, avec les standards de l'industrie. Merci de votre attention. "</text:span></text:p>
          </table:table-cell>
          <table:covered-table-cell/>
        </table:table-row>
        <table:table-row>
          <table:table-cell table:style-name="Tableau13.A4" table:number-columns-spanned="2" office:value-type="string">
            <text:p text:style-name="P4"><text:span text:style-name="T20">❓ Q. JURY</text:span></text:p>
          </table:table-cell>
          <table:covered-table-cell/>
          <table:table-cell table:style-name="Tableau13.C4" table:number-columns-spanned="2" office:value-type="string">
            <text:p text:style-name="P13"><text:span text:style-name="T6">Q : Si Firebase tombe en panne, que se passe-t-il ?</text:span></text:p>
            <text:p text:style-name="P14"><text:span text:style-name="T25">→ </text:span><text:span text:style-name="T10">L'app continue en offline (Isar local). Les nouvelles données ne se synchronisent pas mais tout l'existant reste accessible. Resynchronisation automatique dès que Firebase revient.</text:span></text:p>
            <text:p text:style-name="P13"><text:span text:style-name="T6">Q : Si vous refaisiez le projet, que changeriez-vous ?</text:span></text:p>
            <text:p text:style-name="P14"><text:span text:style-name="T25">→ </text:span><text:span text:style-name="T10">1. Démarrer avec Hive CE au lieu d'Isar (compatible web dès le départ). 2. Tests d'intégration dès le sprint 1 — les bugs détectés tard coûtent plus cher à corriger.</text:span></text:p>
            <text:p text:style-name="P13"><text:span text:style-name="T6">Q : Quel est votre KPI le plus important ?</text:span></text:p>
            <text:p text:style-name="P14"><text:span text:style-name="T25">→ </text:span><text:span text:style-name="T10">Le taux de conversion catalogue → achat, cible &gt; 8%. C'est le KPI qui valide la proposition de valeur principale : est-ce que les utilisateurs passent à l'acte ?</text:span></text:p>
            <text:p text:style-name="P13"><text:span text:style-name="T6">Q : Comment vous répartissez le travail ?</text:span></text:p>
            <text:p text:style-name="P14"><text:span text:style-name="T25">→ </text:span><text:span text:style-name="T10">Tom : architecture + coordination. Islem : Firebase/Stripe/notifications. Manon : design Figma + intégration UI. Seife : features sociales + B2B + QA. Sprints de 2 semaines avec revue bi-hebdomadaire.</text:span></text:p>
          </table:table-cell>
          <table:covered-table-cell/>
        </table:table-row>
      </table:table>
      <text:p text:style-name="P15"/>
      <text:p text:style-name="Standard"/>
      <text:h text:style-name="P1" text:outline-level="1"><text:bookmark-start text:name="__RefHeading__7079_930615432"/>3. Banque de questions — Toutes catégories<text:bookmark-end text:name="__RefHeading__7079_930615432"/></text:h>
      <text:p text:style-name="P9"/>
      <text:h text:style-name="Heading_20_2" text:outline-level="2"><text:bookmark-start text:name="__RefHeading__7081_930615432"/>3.1 Questions techniques<text:bookmark-end text:name="__RefHeading__7081_930615432"/></text:h>
      <text:p text:style-name="P12"/>
      <table:table table:name="Tableau14" table:style-name="Tableau14">
        <table:table-column table:style-name="Tableau14.A"/>
        <table:table-column table:style-name="Tableau14.B"/>
        <table:table-row table:style-name="Tableau14.1">
          <table:table-cell table:style-name="Tableau14.A1" office:value-type="string">
            <text:p text:style-name="Standard"><text:span text:style-name="T21">Question</text:span></text:p>
          </table:table-cell>
          <table:table-cell table:style-name="Tableau14.A1" office:value-type="string">
            <text:p text:style-name="Standard"><text:span text:style-name="T21">Réponse à donner</text:span></text:p>
          </table:table-cell>
        </table:table-row>
        <table:table-row table:style-name="Tableau14.1">
          <table:table-cell table:style-name="Tableau14.A2" office:value-type="string">
            <text:p text:style-name="Standard"><text:span text:style-name="T14">Qu'est-ce que la compilation AOT ?</text:span></text:p>
          </table:table-cell>
          <table:table-cell table:style-name="Tableau14.A2" office:value-type="string">
            <text:p text:style-name="Standard"><text:span text:style-name="T14">Ahead Of Time : le code Dart est traduit en code machine avant l'installation. L'app démarre et tourne aussi vite qu'une app native. À comparer avec React Native qui traduit le JavaScript en temps réel via un bridge (latence).</text:span></text:p>
          </table:table-cell>
        </table:table-row>
        <table:table-row table:style-name="Tableau14.1">
          <table:table-cell table:style-name="Tableau14.A3" office:value-type="string">
            <text:p text:style-name="Standard"><text:span text:style-name="T14">C'est quoi Riverpod ?</text:span></text:p>
          </table:table-cell>
          <table:table-cell table:style-name="Tableau14.A3" office:value-type="string">
            <text:p text:style-name="Standard"><text:span text:style-name="T14">Gestionnaire d'état Flutter. Un Provider expose une donnée réactive — quand elle change, tous les écrans abonnés se rebuild. Avantages sur BLoC : moins de boilerplate, compile-safe (erreurs à la compilation), sans BuildContext.</text:span></text:p>
          </table:table-cell>
        </table:table-row>
        <table:table-row table:style-name="Tableau14.1">
          <table:table-cell table:style-name="Tableau14.A2" office:value-type="string">
            <text:p text:style-name="Standard"><text:span text:style-name="T14">Pourquoi Freezed ?</text:span></text:p>
          </table:table-cell>
          <table:table-cell table:style-name="Tableau14.A2" office:value-type="string">
            <text:p text:style-name="Standard"><text:span text:style-name="T14">Génère automatiquement copyWith(), toJson(), fromJson(), ==, hashCode pour chaque modèle Dart. Sans Freezed : 80-100 lignes par classe, source de bugs. Avec Freezed : 5 lignes d'annotation, le reste est généré.</text:span></text:p>
          </table:table-cell>
        </table:table-row>
        <table:table-row table:style-name="Tableau14.1">
          <table:table-cell table:style-name="Tableau14.A3" office:value-type="string">
            <text:p text:style-name="Standard"><text:span text:style-name="T14">C'est quoi le null-safety en Dart ?</text:span></text:p>
          </table:table-cell>
          <table:table-cell table:style-name="Tableau14.A3" office:value-type="string">
            <text:p text:style-name="Standard"><text:span text:style-name="T14">Mécanisme qui empêche les NullPointerException. Une variable doit être déclarée nullable (String?) si elle peut être null. Le compilateur refuse tout code qui pourrait planter à cause d'une valeur absente.</text:span></text:p>
          </table:table-cell>
        </table:table-row>
        <table:table-row table:style-name="Tableau14.1">
          <table:table-cell table:style-name="Tableau14.A2" office:value-type="string">
            <text:p text:style-name="Standard"><text:span text:style-name="T14">Qu'est-ce qu'un Repository dans votre code ?</text:span></text:p>
          </table:table-cell>
          <table:table-cell table:style-name="Tableau14.A2" office:value-type="string">
            <text:p text:style-name="Standard"><text:span text:style-name="T14">Une classe qui encapsule l'accès aux données. EventRepository expose getAll(), search(), toggleFavorite() — les Screens ne savent pas si les données viennent d'Isar ou d'une API. Si on change de source, seul le Repository change.</text:span></text:p>
          </table:table-cell>
        </table:table-row>
        <table:table-row table:style-name="Tableau14.1">
          <table:table-cell table:style-name="Tableau14.A3" office:value-type="string">
            <text:p text:style-name="Standard"><text:span text:style-name="T14">Qu'est-ce que GoRouter apporte ?</text:span></text:p>
          </table:table-cell>
          <table:table-cell table:style-name="Tableau14.A3" office:value-type="string">
            <text:p text:style-name="Standard"><text:span text:style-name="T14">Deep linking (liens directs vers un écran), ShellRoute (barre de navigation persistante), typed routes (paramètres vérifiés à la compilation), guards (authentification avant accès). Alternative au Navigator 2.0 natif qui est trop verbeux.</text:span></text:p>
          </table:table-cell>
        </table:table-row>
        <table:table-row table:style-name="Tableau14.1">
          <table:table-cell table:style-name="Tableau14.A2" office:value-type="string">
            <text:p text:style-name="Standard"><text:span text:style-name="T14">Pourquoi Isar plutôt que SQLite ?</text:span></text:p>
          </table:table-cell>
          <table:table-cell table:style-name="Tableau14.A2" office:value-type="string">
            <text:p text:style-name="Standard"><text:span text:style-name="T14">250k ops/sec vs ~50k pour SQLite. Queries typées en Dart (pas de SQL en string). Indexation multi-champs. Intégration native Flutter. Inconvénient : pas de support Flutter Web → mitigation avec couche Repository abstraite.</text:span></text:p>
          </table:table-cell>
        </table:table-row>
        <table:table-row table:style-name="Tableau14.1">
          <table:table-cell table:style-name="Tableau14.A3" office:value-type="string">
            <text:p text:style-name="Standard"><text:span text:style-name="T14">C'est quoi la dénormalisation ?</text:span></text:p>
          </table:table-cell>
          <table:table-cell table:style-name="Tableau14.A3" office:value-type="string">
            <text:p text:style-name="Standard"><text:span text:style-name="T14">Dupliquer volontairement des données pour éviter les jointures. IsarTicket copie nom+lieu de l'événement : ça permet d'afficher le billet offline sans faire de jointure. Trade-off : redondance vs performance offline.</text:span></text:p>
          </table:table-cell>
        </table:table-row>
        <table:table-row table:style-name="Tableau14.1">
          <table:table-cell table:style-name="Tableau14.A2" office:value-type="string">
            <text:p text:style-name="Standard"><text:span text:style-name="T14">Qu'est-ce que le pattern offline-first ?</text:span></text:p>
          </table:table-cell>
          <table:table-cell table:style-name="Tableau14.A2" office:value-type="string">
            <text:p text:style-name="Standard"><text:span text:style-name="T14">L'app lit d'abord la base locale (Isar), affiche immédiatement, puis synchronise avec le serveur si réseau disponible. Avantages : vitesse d'affichage, fonctionnement sans réseau, résistance aux coupures.</text:span></text:p>
          </table:table-cell>
        </table:table-row>
        <table:table-row table:style-name="Tableau14.1">
          <table:table-cell table:style-name="Tableau14.A3" office:value-type="string">
            <text:p text:style-name="Standard"><text:span text:style-name="T14">Pourquoi Firebase plutôt qu'un back-end custom ?</text:span></text:p>
          </table:table-cell>
          <table:table-cell table:style-name="Tableau14.A3" office:value-type="string">
            <text:p text:style-name="Standard"><text:span text:style-name="T14">Serverless = scaling automatique, gratuit jusqu'à 50k MAU, Auth+Firestore+Push intégrés. Pas d'ops à gérer. Si les coûts explosent (&gt;50k MAU), la couche Repository permet de migrer vers un back-end Dart/Node sans toucher aux écrans.</text:span></text:p>
          </table:table-cell>
        </table:table-row>
      </table:table>
      <text:p text:style-name="P15"/>
      <text:h text:style-name="Heading_20_2" text:outline-level="2"><text:bookmark-start text:name="__RefHeading__7083_930615432"/>3.2 Questions sur les diagrammes<text:bookmark-end text:name="__RefHeading__7083_930615432"/></text:h>
      <text:p text:style-name="P12"/>
      <table:table table:name="Tableau15" table:style-name="Tableau15">
        <table:table-column table:style-name="Tableau15.A"/>
        <table:table-column table:style-name="Tableau15.B"/>
        <table:table-row table:style-name="Tableau15.1">
          <table:table-cell table:style-name="Tableau15.A1" office:value-type="string">
            <text:p text:style-name="Standard"><text:span text:style-name="T21">Question</text:span></text:p>
          </table:table-cell>
          <table:table-cell table:style-name="Tableau15.A1" office:value-type="string">
            <text:p text:style-name="Standard"><text:span text:style-name="T21">Réponse à donner</text:span></text:p>
          </table:table-cell>
        </table:table-row>
        <table:table-row table:style-name="Tableau15.1">
          <table:table-cell table:style-name="Tableau15.A2" office:value-type="string">
            <text:p text:style-name="Standard"><text:span text:style-name="T14">Différence MCD, MLD, ERD ?</text:span></text:p>
          </table:table-cell>
          <table:table-cell table:style-name="Tableau15.A2" office:value-type="string">
            <text:p text:style-name="Standard"><text:span text:style-name="T14">MCD = conceptuel Merise (entités + associations, sans techno). MLD = logique SQL (tables + PK/FK). ERD = schéma réel Isar (types Dart). Les 3 ont les mêmes 5 entités : traçabilité complète.</text:span></text:p>
          </table:table-cell>
        </table:table-row>
        <table:table-row table:style-name="Tableau15.1">
          <table:table-cell table:style-name="Tableau15.A3" office:value-type="string">
            <text:p text:style-name="Standard"><text:span text:style-name="T14">Qu'est-ce qu'une cardinalité 1,N ?</text:span></text:p>
          </table:table-cell>
          <table:table-cell table:style-name="Tableau15.A3" office:value-type="string">
            <text:p text:style-name="Standard"><text:span text:style-name="T14">Un élément côté 1 peut être associé à 1 ou plusieurs éléments côté N. Ex : 1 utilisateur peut avoir N billets, mais chaque billet appartient à exactement 1 utilisateur.</text:span></text:p>
          </table:table-cell>
        </table:table-row>
        <table:table-row table:style-name="Tableau15.1">
          <table:table-cell table:style-name="Tableau15.A2" office:value-type="string">
            <text:p text:style-name="Standard"><text:span text:style-name="T14">Pourquoi la cardinalité 0,N pour les billets d'un événement ?</text:span></text:p>
          </table:table-cell>
          <table:table-cell table:style-name="Tableau15.A2" office:value-type="string">
            <text:p text:style-name="Standard"><text:span text:style-name="T14">Un événement peut avoir 0 billet (créé dans le catalogue mais pas encore vendu) à N billets. Le 0 est crucial : l'événement existe avant toute vente.</text:span></text:p>
          </table:table-cell>
        </table:table-row>
        <text:soft-page-break/>
        <table:table-row table:style-name="Tableau15.1">
          <table:table-cell table:style-name="Tableau15.A3" office:value-type="string">
            <text:p text:style-name="Standard"><text:span text:style-name="T14">C'est quoi une entité-association dans le MCD ?</text:span></text:p>
          </table:table-cell>
          <table:table-cell table:style-name="Tableau15.A3" office:value-type="string">
            <text:p text:style-name="Standard"><text:span text:style-name="T14">Une association qui porte des attributs propres. FAVORI porte 'dateAjout' — donc elle ne peut pas rester juste une ligne de relation, elle devient une entité-association à part entière.</text:span></text:p>
          </table:table-cell>
        </table:table-row>
        <table:table-row table:style-name="Tableau15.1">
          <table:table-cell table:style-name="Tableau15.A2" office:value-type="string">
            <text:p text:style-name="Standard"><text:span text:style-name="T14">Qu'est-ce qu'une clé étrangère (FK) ?</text:span></text:p>
          </table:table-cell>
          <table:table-cell table:style-name="Tableau15.A2" office:value-type="string">
            <text:p text:style-name="Standard"><text:span text:style-name="T14">Un champ qui référence la clé primaire d'une autre table. Dans Billet, id_evenement est une FK qui pointe vers Evenement(id_evenement). Ça crée le lien entre les deux tables.</text:span></text:p>
          </table:table-cell>
        </table:table-row>
        <table:table-row table:style-name="Tableau15.1">
          <table:table-cell table:style-name="Tableau15.A3" office:value-type="string">
            <text:p text:style-name="Standard"><text:span text:style-name="T14">Différence PK et UK dans votre MLD ?</text:span></text:p>
          </table:table-cell>
          <table:table-cell table:style-name="Tableau15.A3" office:value-type="string">
            <text:p text:style-name="Standard"><text:span text:style-name="T14">PK = identifiant technique auto-incrémenté par Isar (isarId). UK = contrainte métier d'unicité sur eventId (identifiant fonctionnel). On cherche par eventId dans le code, pas par l'id technique.</text:span></text:p>
          </table:table-cell>
        </table:table-row>
        <table:table-row table:style-name="Tableau15.1">
          <table:table-cell table:style-name="Tableau15.A2" office:value-type="string">
            <text:p text:style-name="Standard"><text:span text:style-name="T14">C'est quoi un swimlane dans le diagramme d'activité ?</text:span></text:p>
          </table:table-cell>
          <table:table-cell table:style-name="Tableau15.A2" office:value-type="string">
            <text:p text:style-name="Standard"><text:span text:style-name="T14">Un couloir vertical qui indique quel acteur est responsable de chaque action. 3 couloirs : Utilisateur (actions UI), Système (automatisations), Organisateur/Hôte (actions métier côté partenaires).</text:span></text:p>
          </table:table-cell>
        </table:table-row>
        <table:table-row table:style-name="Tableau15.1">
          <table:table-cell table:style-name="Tableau15.A3" office:value-type="string">
            <text:p text:style-name="Standard"><text:span text:style-name="T14">Que représente le fork/join dans le diagramme d'activité ?</text:span></text:p>
          </table:table-cell>
          <table:table-cell table:style-name="Tableau15.A3" office:value-type="string">
            <text:p text:style-name="Standard"><text:span text:style-name="T14">Fork = division en branches parallèles (transport et hébergement sont indépendants). Join = synchronisation : on attend que les deux soient terminés avant de continuer. Ça ne signifie pas multi-threading, mais indépendance fonctionnelle.</text:span></text:p>
          </table:table-cell>
        </table:table-row>
        <table:table-row table:style-name="Tableau15.1">
          <table:table-cell table:style-name="Tableau15.A2" office:value-type="string">
            <text:p text:style-name="Standard"><text:span text:style-name="T14">Qu'est-ce que le stéréotype «manages» dans le diagramme de classes ?</text:span></text:p>
          </table:table-cell>
          <table:table-cell table:style-name="Tableau15.A2" office:value-type="string">
            <text:p text:style-name="Standard"><text:span text:style-name="T14">Une dépendance d'utilisation : EventRepository 'gère' les Event sans les posséder. À distinguer de la composition (un objet contient l'autre) et de l'héritage (is-a).</text:span></text:p>
          </table:table-cell>
        </table:table-row>
        <table:table-row table:style-name="Tableau15.1">
          <table:table-cell table:style-name="Tableau15.A3" office:value-type="string">
            <text:p text:style-name="Standard"><text:span text:style-name="T14">Pourquoi CartItem → Ticket est en pointillé ?</text:span></text:p>
          </table:table-cell>
          <table:table-cell table:style-name="Tableau15.A3" office:value-type="string">
            <text:p text:style-name="Standard"><text:span text:style-name="T14">Flèche en pointillé = dépendance ou transition, pas une association permanente. CartItem existe temporairement. Au checkout, il est transformé en Ticket. La table CartItem est ensuite vidée.</text:span></text:p>
          </table:table-cell>
        </table:table-row>
      </table:table>
      <text:p text:style-name="P15"/>
      <text:h text:style-name="Heading_20_2" text:outline-level="2"><text:bookmark-start text:name="__RefHeading__7085_930615432"/>3.3 Questions sur l'architecture et les choix projet<text:bookmark-end text:name="__RefHeading__7085_930615432"/></text:h>
      <text:p text:style-name="P12"/>
      <table:table table:name="Tableau16" table:style-name="Tableau16">
        <table:table-column table:style-name="Tableau16.A"/>
        <table:table-column table:style-name="Tableau16.B"/>
        <table:table-row table:style-name="Tableau16.1">
          <table:table-cell table:style-name="Tableau16.A1" office:value-type="string">
            <text:p text:style-name="Standard"><text:span text:style-name="T21">Question</text:span></text:p>
          </table:table-cell>
          <table:table-cell table:style-name="Tableau16.A1" office:value-type="string">
            <text:p text:style-name="Standard"><text:span text:style-name="T21">Réponse à donner</text:span></text:p>
          </table:table-cell>
        </table:table-row>
        <table:table-row table:style-name="Tableau16.1">
          <table:table-cell table:style-name="Tableau16.A2" office:value-type="string">
            <text:p text:style-name="Standard"><text:span text:style-name="T14">Quel est votre modèle économique ?</text:span></text:p>
          </table:table-cell>
          <table:table-cell table:style-name="Tableau16.A2" office:value-type="string">
            <text:p text:style-name="Standard"><text:span text:style-name="T14">3 sources : commission 3-5% sur la billetterie, affiliation sur transport/hébergement, abonnement B2B organisateurs (dashboard avancé, rapports CO₂, notifs ciblées). Gratuit pour les utilisateurs finaux.</text:span></text:p>
          </table:table-cell>
        </table:table-row>
        <table:table-row table:style-name="Tableau16.1">
          <table:table-cell table:style-name="Tableau16.A3" office:value-type="string">
            <text:p text:style-name="Standard"><text:span text:style-name="T14">Pourquoi MoSCoW ?</text:span></text:p>
          </table:table-cell>
          <table:table-cell table:style-name="Tableau16.A3" office:value-type="string">
            <text:p text:style-name="Standard"><text:span text:style-name="T14">Méthode de priorisation : Must Have (billetterie, QR, transport), Should Have (hébergement, social), Could Have (assistant IA, B2B), Won't Have V1 (VR, NFT tickets). Permet de livrer un MVP cohérent sans sur-scope.</text:span></text:p>
          </table:table-cell>
        </table:table-row>
        <table:table-row table:style-name="Tableau16.1">
          <table:table-cell table:style-name="Tableau16.A2" office:value-type="string">
            <text:p text:style-name="Standard"><text:span text:style-name="T14">Comment vous gérez la scalabilité ?</text:span></text:p>
          </table:table-cell>
          <table:table-cell table:style-name="Tableau16.A2" office:value-type="string">
            <text:p text:style-name="Standard"><text:span text:style-name="T14">Phase 1-2 : Firebase (serverless, scaling auto, gratuit à 50k MAU). Phase 3+ : si coûts explosent, migration back-end Dart/Node + PostgreSQL grâce à la couche Repository. Monitoring Firebase quotidien.</text:span></text:p>
          </table:table-cell>
        </table:table-row>
        <table:table-row table:style-name="Tableau16.1">
          <table:table-cell table:style-name="Tableau16.A3" office:value-type="string">
            <text:p text:style-name="Standard"><text:span text:style-name="T14">Comment vous testez l'application ?</text:span></text:p>
          </table:table-cell>
          <table:table-cell table:style-name="Tableau16.A3" office:value-type="string">
            <text:p text:style-name="Standard"><text:span text:style-name="T14">6 niveaux : tests unitaires (domain + data, &gt;80% coverage, flutter_test + mockito), tests de widgets (&gt;60%), tests d'intégration (parcours clés, integration_test), tests E2E (patrol), performance (DevTools), accessibilité (WCAG).</text:span></text:p>
          </table:table-cell>
        </table:table-row>
        <table:table-row table:style-name="Tableau16.1">
          <table:table-cell table:style-name="Tableau16.A2" office:value-type="string">
            <text:p text:style-name="Standard"><text:span text:style-name="T14">L'assistant planification IA est implémenté ?</text:span></text:p>
          </table:table-cell>
          <table:table-cell table:style-name="Tableau16.A2" office:value-type="string">
            <text:p text:style-name="Standard"><text:span text:style-name="T14">Non, c'est un Could Have MoSCoW, prévu en phase 5-6 (oct-déc 2026). Le MVP se concentre sur les Must Have. On évite l'IA pour l'IA — si elle s'intègre, ce doit être pour une valeur mesurable.</text:span></text:p>
          </table:table-cell>
        </table:table-row>
        <table:table-row table:style-name="Tableau16.1">
          <table:table-cell table:style-name="Tableau16.A3" office:value-type="string">
            <text:p text:style-name="Standard"><text:span text:style-name="T14">Quelle est votre gestion des risques ?</text:span></text:p>
          </table:table-cell>
          <table:table-cell table:style-name="Tableau16.A3" office:value-type="string">
            <text:p text:style-name="Standard"><text:span text:style-name="T14">6 risques documentés : Isar+Web (mitigation : Hive CE), APIs transport complexes (mitigation : abstraction + mock), performances assistant (mitigation : algo incrémental), retards (mitigation : MoSCoW), RGPD, Firebase coûts.</text:span></text:p>
          </table:table-cell>
        </table:table-row>
        <table:table-row table:style-name="Tableau16.1">
          <table:table-cell table:style-name="Tableau16.A2" office:value-type="string">
            <text:p text:style-name="Standard"><text:span text:style-name="T14">Comment gérez-vous le RGPD ?</text:span></text:p>
          </table:table-cell>
          <table:table-cell table:style-name="Tableau16.A2" office:value-type="string">
            <text:p text:style-name="Standard"><text:span text:style-name="T14">Privacy by Design : consentement granulaire par traitement, droit export JSON, suppression cascade Isar, aucun partage de données perso entre users. La messagerie interne ne révèle ni email ni téléphone.</text:span></text:p>
          </table:table-cell>
        </table:table-row>
        <table:table-row table:style-name="Tableau16.1">
          <table:table-cell table:style-name="Tableau16.A3" office:value-type="string">
            <text:p text:style-name="Standard"><text:span text:style-name="T14">Qu'est-ce que l'éco-score et comment est-il calculé ?</text:span></text:p>
          </table:table-cell>
          <table:table-cell table:style-name="Tableau16.A3" office:value-type="string">
            <text:p text:style-name="Standard"><text:span text:style-name="T14">Score personnel basé sur les CO₂ économisés vs voiture individuelle, selon référentiels ADEME. Ex : prendre le train Paris-Lyon économise ~35kg CO₂. Score cumulatif avec classement communautaire et badges de progression.</text:span></text:p>
          </table:table-cell>
        </table:table-row>
        <table:table-row table:style-name="Tableau16.1">
          <table:table-cell table:style-name="Tableau16.A2" office:value-type="string">
            <text:p text:style-name="Standard"><text:span text:style-name="T14">Pourquoi 6 phases dans votre planning ?</text:span></text:p>
          </table:table-cell>
          <table:table-cell table:style-name="Tableau16.A2" office:value-type="string">
            <text:p text:style-name="Standard"><text:span text:style-name="T14">Phase 1-2 : MVP (billetterie+QR+profil). Phase 3 : transport + hébergement. Phase 4 : social + gamification. Phase 5 : B2B organisateurs. Phase 6 : assistant + optimisations. Découpage MoSCoW qui permet de livrer de la valeur à chaque phase.</text:span></text:p>
          </table:table-cell>
        </table:table-row>
        <table:table-row table:style-name="Tableau16.1">
          <table:table-cell table:style-name="Tableau16.A3" office:value-type="string">
            <text:p text:style-name="Standard"><text:span text:style-name="T14">Comment vous assurez l'accessibilité ?</text:span></text:p>
          </table:table-cell>
          <table:table-cell table:style-name="Tableau16.A3" office:value-type="string">
            <text:p text:style-name="Standard"><text:span text:style-name="T14">WCAG 2.1 AA : contraste 4.5:1 vérifié, Semantics labels sur tous les widgets interactifs, compatibilité VoiceOver (iOS) et TalkBack </text:span><text:soft-page-break/><text:span text:style-name="T14">(Android), navigation clavier sur web, zones tactiles min 44x44pt, mode interface simplifié.</text:span></text:p>
          </table:table-cell>
        </table:table-row>
      </table:table>
      <text:p text:style-name="P15"/>
      <text:h text:style-name="Heading_20_2" text:outline-level="2"><text:bookmark-start text:name="__RefHeading__7087_930615432"/>3.4 Questions pièges — Réponses à ne pas rater<text:bookmark-end text:name="__RefHeading__7087_930615432"/></text:h>
      <text:p text:style-name="P12"/>
      <table:table table:name="Tableau17" table:style-name="Tableau17">
        <table:table-column table:style-name="Tableau17.A"/>
        <table:table-column table:style-name="Tableau17.B"/>
        <table:table-row table:style-name="Tableau17.1">
          <table:table-cell table:style-name="Tableau17.A1" office:value-type="string">
            <text:p text:style-name="Standard"><text:span text:style-name="T21">Question piège</text:span></text:p>
          </table:table-cell>
          <table:table-cell table:style-name="Tableau17.A1" office:value-type="string">
            <text:p text:style-name="Standard"><text:span text:style-name="T21">Réponse à avoir</text:span></text:p>
          </table:table-cell>
        </table:table-row>
        <table:table-row table:style-name="Tableau17.1">
          <table:table-cell table:style-name="Tableau17.A2" office:value-type="string">
            <text:p text:style-name="Standard"><text:span text:style-name="T14">Montrez-moi comment Riverpod fonctionne dans votre code.</text:span></text:p>
          </table:table-cell>
          <table:table-cell table:style-name="Tableau17.A2" office:value-type="string">
            <text:p text:style-name="Standard"><text:span text:style-name="T14">EventProvider : un FutureProvider qui appelle EventRepository.getAll(). Les Screens font ref.watch(eventProvider) — quand Isar met à jour les événements, tous les écrans abonnés se rebuild. Pas de setState(), pas de StreamController.</text:span></text:p>
          </table:table-cell>
        </table:table-row>
        <table:table-row table:style-name="Tableau17.1">
          <table:table-cell table:style-name="Tableau17.A3" office:value-type="string">
            <text:p text:style-name="Standard"><text:span text:style-name="T14">Votre CDC parle de 60 user stories mais votre code n'en implémente qu'une partie ?</text:span></text:p>
          </table:table-cell>
          <table:table-cell table:style-name="Tableau17.A3" office:value-type="string">
            <text:p text:style-name="Standard"><text:span text:style-name="T14">Normal et assumé. Le CDC définit le périmètre complet du produit. Le code livré est le MVP (phases 1-2 du planning). Les user stories sont priorisées MoSCoW : les Must Have sont implémentés, les Should/Could attendent la V2.</text:span></text:p>
          </table:table-cell>
        </table:table-row>
        <table:table-row table:style-name="Tableau17.1">
          <table:table-cell table:style-name="Tableau17.A2" office:value-type="string">
            <text:p text:style-name="Standard"><text:span text:style-name="T14">Isar ne supporte pas le web — votre app web ne marche pas ?</text:span></text:p>
          </table:table-cell>
          <table:table-cell table:style-name="Tableau17.A2" office:value-type="string">
            <text:p text:style-name="Standard"><text:span text:style-name="T14">La version web est le back-office organisateur (B2B), qui peut fonctionner avec une API distante sans besoin d'offline-first. Pour la V2, la migration vers Hive CE est documentée et estimée à 2-3 jours grâce à la couche Repository.</text:span></text:p>
          </table:table-cell>
        </table:table-row>
        <table:table-row table:style-name="Tableau17.1">
          <table:table-cell table:style-name="Tableau17.A3" office:value-type="string">
            <text:p text:style-name="Standard"><text:span text:style-name="T14">Votre MCD a 5 entités mais votre CDC parle de transport, covoiturage, hébergement...</text:span></text:p>
          </table:table-cell>
          <table:table-cell table:style-name="Tableau17.A3" office:value-type="string">
            <text:p text:style-name="Standard"><text:span text:style-name="T14">Le MCD représente la V1 telle qu'implémentée. Les modules transport, hébergement, covoiturage sont en phases 3-4 (V2). Leur ajout au MCD introduirait 3-4 nouvelles entités — on a préféré un MCD fidèle au code livré.</text:span></text:p>
          </table:table-cell>
        </table:table-row>
        <table:table-row table:style-name="Tableau17.1">
          <table:table-cell table:style-name="Tableau17.A2" office:value-type="string">
            <text:p text:style-name="Standard"><text:span text:style-name="T14">La dénormalisation dans IsarTicket — vous n'avez pas peur de la désynchronisation ?</text:span></text:p>
          </table:table-cell>
          <table:table-cell table:style-name="Tableau17.A2" office:value-type="string">
            <text:p text:style-name="Standard"><text:span text:style-name="T14">C'est voulu : un billet est un document juridique (preuve d'achat). Il doit conserver les informations au moment de la transaction, même si l'organisateur modifie l'événement après. C'est le pattern event sourcing / snapshot.</text:span></text:p>
          </table:table-cell>
        </table:table-row>
        <table:table-row table:style-name="Tableau17.1">
          <table:table-cell table:style-name="Tableau17.A3" office:value-type="string">
            <text:p text:style-name="Standard"><text:span text:style-name="T14">Pourquoi ne pas utiliser GetX qui est plus simple ?</text:span></text:p>
          </table:table-cell>
          <table:table-cell table:style-name="Tableau17.A3" office:value-type="string">
            <text:p text:style-name="Standard"><text:span text:style-name="T14">GetX est populaire mais son architecture est floue (tout dans les controllers, difficile de tester), il utilise des globals, et son compile-safety est nul. Riverpod est plus verbeux mais son code est testable, maintenable et compile-safe.</text:span></text:p>
          </table:table-cell>
        </table:table-row>
        <table:table-row table:style-name="Tableau17.1">
          <table:table-cell table:style-name="Tableau17.A2" office:value-type="string">
            <text:p text:style-name="Standard"><text:span text:style-name="T14">60 FPS sur tous les appareils Android ? Vraiment ?</text:span></text:p>
          </table:table-cell>
          <table:table-cell table:style-name="Tableau17.A2" office:value-type="string">
            <text:p text:style-name="Standard"><text:span text:style-name="T14">C'est l'objectif et la garantie de Flutter avec la compilation AOT. Sur les appareils très anciens (Android 5/6), on peut descendre à 30 FPS sur les animations lourdes. C'est pourquoi on profile avec Flutter DevTools et on optimise les rebuilds avec Riverpod.select().</text:span></text:p>
          </table:table-cell>
        </table:table-row>
        <table:table-row table:style-name="Tableau17.1">
          <table:table-cell table:style-name="Tableau17.A3" office:value-type="string">
            <text:p text:style-name="Standard"><text:span text:style-name="T14">Votre équipe de 4 peut vraiment livrer tout le CDC ?</text:span></text:p>
          </table:table-cell>
          <table:table-cell table:style-name="Tableau17.A3" office:value-type="string">
            <text:p text:style-name="Standard"><text:span text:style-name="T14">Non, et on ne l'a jamais prétendu — c'est pourquoi on a une priorisation MoSCoW. Le MVP livré couvre les Must Have (phases 1-2). Le CDC complet est le roadmap 12 mois. Une équipe startup de 4 livrerait les Must Have en 6-8 mois en full-time.</text:span></text:p>
          </table:table-cell>
        </table:table-row>
      </table:table>
      <text:p text:style-name="Standard"/>
      <text:h text:style-name="P1" text:outline-level="1"><text:bookmark-start text:name="__RefHeading__7089_930615432"/>4. Glossaire éclair — 40 termes en 2 mots<text:bookmark-end text:name="__RefHeading__7089_930615432"/></text:h>
      <text:p text:style-name="P12"/>
      <text:p text:style-name="P16"><text:span text:style-name="T17">Pour chaque terme, voici la définition ultra-courte à retenir — et l'analogie à sortir si on vous demande d'expliquer.</text:span></text:p>
      <text:p text:style-name="P8"/>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Standard"><text:span text:style-name="T21">Terme</text:span></text:p>
          </table:table-cell>
          <table:table-cell table:style-name="Tableau18.A1" office:value-type="string">
            <text:p text:style-name="Standard"><text:span text:style-name="T21">Définition en 5 mots</text:span></text:p>
          </table:table-cell>
          <table:table-cell table:style-name="Tableau18.A1" office:value-type="string">
            <text:p text:style-name="Standard"><text:span text:style-name="T21">Analogie à utiliser</text:span></text:p>
          </table:table-cell>
        </table:table-row>
        <table:table-row table:style-name="Tableau18.1">
          <table:table-cell table:style-name="Tableau18.A2" office:value-type="string">
            <text:p text:style-name="Standard"><text:span text:style-name="T14">Flutter</text:span></text:p>
          </table:table-cell>
          <table:table-cell table:style-name="Tableau18.A2" office:value-type="string">
            <text:p text:style-name="Standard"><text:span text:style-name="T14">Framework Google, 1 code → 3 plateformes</text:span></text:p>
          </table:table-cell>
          <table:table-cell table:style-name="Tableau18.A2" office:value-type="string">
            <text:p text:style-name="Standard"><text:span text:style-name="T14">Un plan de maison universel (Android/iOS/Web)</text:span></text:p>
          </table:table-cell>
        </table:table-row>
        <table:table-row table:style-name="Tableau18.1">
          <table:table-cell table:style-name="Tableau18.A3" office:value-type="string">
            <text:p text:style-name="Standard"><text:span text:style-name="T14">Dart</text:span></text:p>
          </table:table-cell>
          <table:table-cell table:style-name="Tableau18.A3" office:value-type="string">
            <text:p text:style-name="Standard"><text:span text:style-name="T14">Langage de programmation de Flutter</text:span></text:p>
          </table:table-cell>
          <table:table-cell table:style-name="Tableau18.A3" office:value-type="string">
            <text:p text:style-name="Standard"><text:span text:style-name="T14">Le français de Flutter</text:span></text:p>
          </table:table-cell>
        </table:table-row>
        <table:table-row table:style-name="Tableau18.1">
          <table:table-cell table:style-name="Tableau18.A2" office:value-type="string">
            <text:p text:style-name="Standard"><text:span text:style-name="T14">Compilation AOT</text:span></text:p>
          </table:table-cell>
          <table:table-cell table:style-name="Tableau18.A2" office:value-type="string">
            <text:p text:style-name="Standard"><text:span text:style-name="T14">Code traduit en machine AVANT installation</text:span></text:p>
          </table:table-cell>
          <table:table-cell table:style-name="Tableau18.A2" office:value-type="string">
            <text:p text:style-name="Standard"><text:span text:style-name="T14">Livre traduit avant impression (vs traducteur simultané)</text:span></text:p>
          </table:table-cell>
        </table:table-row>
        <table:table-row table:style-name="Tableau18.1">
          <table:table-cell table:style-name="Tableau18.A3" office:value-type="string">
            <text:p text:style-name="Standard"><text:span text:style-name="T14">Hot reload</text:span></text:p>
          </table:table-cell>
          <table:table-cell table:style-name="Tableau18.A3" office:value-type="string">
            <text:p text:style-name="Standard"><text:span text:style-name="T14">Voir les modifs en temps réel sans relancer l'app</text:span></text:p>
          </table:table-cell>
          <table:table-cell table:style-name="Tableau18.A3" office:value-type="string">
            <text:p text:style-name="Standard"><text:span text:style-name="T14">Changer la déco sans sortir de la maison</text:span></text:p>
          </table:table-cell>
        </table:table-row>
        <table:table-row table:style-name="Tableau18.1">
          <table:table-cell table:style-name="Tableau18.A2" office:value-type="string">
            <text:p text:style-name="Standard"><text:span text:style-name="T14">Null-safety</text:span></text:p>
          </table:table-cell>
          <table:table-cell table:style-name="Tableau18.A2" office:value-type="string">
            <text:p text:style-name="Standard"><text:span text:style-name="T14">Erreurs de valeur manquante détectées à la compilation</text:span></text:p>
          </table:table-cell>
          <table:table-cell table:style-name="Tableau18.A2" office:value-type="string">
            <text:p text:style-name="Standard"><text:span text:style-name="T14">Contrôle passeport à l'aéroport avant embarquement</text:span></text:p>
          </table:table-cell>
        </table:table-row>
        <table:table-row table:style-name="Tableau18.1">
          <table:table-cell table:style-name="Tableau18.A3" office:value-type="string">
            <text:p text:style-name="Standard"><text:span text:style-name="T14">Riverpod</text:span></text:p>
          </table:table-cell>
          <table:table-cell table:style-name="Tableau18.A3" office:value-type="string">
            <text:p text:style-name="Standard"><text:span text:style-name="T14">Gestionnaire d'état réactif compile-safe</text:span></text:p>
          </table:table-cell>
          <table:table-cell table:style-name="Tableau18.A3" office:value-type="string">
            <text:p text:style-name="Standard"><text:span text:style-name="T14">Système nerveux : transmet les infos automatiquement</text:span></text:p>
          </table:table-cell>
        </table:table-row>
        <table:table-row table:style-name="Tableau18.1">
          <table:table-cell table:style-name="Tableau18.A2" office:value-type="string">
            <text:p text:style-name="Standard"><text:span text:style-name="T14">Provider (Riverpod)</text:span></text:p>
          </table:table-cell>
          <table:table-cell table:style-name="Tableau18.A2" office:value-type="string">
            <text:p text:style-name="Standard"><text:span text:style-name="T14">Fournisseur de données réactif</text:span></text:p>
          </table:table-cell>
          <table:table-cell table:style-name="Tableau18.A2" office:value-type="string">
            <text:p text:style-name="Standard"><text:span text:style-name="T14">Flux RSS : mis à jour auto pour les abonnés</text:span></text:p>
          </table:table-cell>
        </table:table-row>
        <table:table-row table:style-name="Tableau18.1">
          <table:table-cell table:style-name="Tableau18.A3" office:value-type="string">
            <text:p text:style-name="Standard"><text:span text:style-name="T14">BuildContext</text:span></text:p>
          </table:table-cell>
          <table:table-cell table:style-name="Tableau18.A3" office:value-type="string">
            <text:p text:style-name="Standard"><text:span text:style-name="T14">Position d'un widget dans l'arbre — Riverpod n'en a pas besoin</text:span></text:p>
          </table:table-cell>
          <table:table-cell table:style-name="Tableau18.A3" office:value-type="string">
            <text:p text:style-name="Standard"><text:span text:style-name="T14">L'adresse d'un widget (Riverpod l'évite)</text:span></text:p>
          </table:table-cell>
        </table:table-row>
        <table:table-row table:style-name="Tableau18.1">
          <table:table-cell table:style-name="Tableau18.A2" office:value-type="string">
            <text:p text:style-name="Standard"><text:span text:style-name="T14">Clean Architecture</text:span></text:p>
          </table:table-cell>
          <table:table-cell table:style-name="Tableau18.A2" office:value-type="string">
            <text:p text:style-name="Standard"><text:span text:style-name="T14">Code en couches indépendantes : Métier / Données / UI</text:span></text:p>
          </table:table-cell>
          <table:table-cell table:style-name="Tableau18.A2" office:value-type="string">
            <text:p text:style-name="Standard"><text:span text:style-name="T14">Immeuble à étages : rénover le RDC sans toucher aux fondations</text:span></text:p>
          </table:table-cell>
        </table:table-row>
        <table:table-row table:style-name="Tableau18.1">
          <table:table-cell table:style-name="Tableau18.A3" office:value-type="string">
            <text:p text:style-name="Standard"><text:span text:style-name="T14">Feature-First</text:span></text:p>
          </table:table-cell>
          <table:table-cell table:style-name="Tableau18.A3" office:value-type="string">
            <text:p text:style-name="Standard"><text:span text:style-name="T14">Code organisé par fonctionnalité, pas par type</text:span></text:p>
          </table:table-cell>
          <table:table-cell table:style-name="Tableau18.A3" office:value-type="string">
            <text:p text:style-name="Standard"><text:span text:style-name="T14">Ranger par pièce (cuisine, chambre), pas par matière</text:span></text:p>
          </table:table-cell>
        </table:table-row>
        <table:table-row table:style-name="Tableau18.1">
          <table:table-cell table:style-name="Tableau18.A2" office:value-type="string">
            <text:p text:style-name="Standard"><text:span text:style-name="T14">Repository</text:span></text:p>
          </table:table-cell>
          <table:table-cell table:style-name="Tableau18.A2" office:value-type="string">
            <text:p text:style-name="Standard"><text:span text:style-name="T14">Intermédiaire entre code et base de données</text:span></text:p>
          </table:table-cell>
          <table:table-cell table:style-name="Tableau18.A2" office:value-type="string">
            <text:p text:style-name="Standard"><text:span text:style-name="T14">Bibliothécaire : vous demandez le livre, il sait où le trouver</text:span></text:p>
          </table:table-cell>
        </table:table-row>
        <table:table-row table:style-name="Tableau18.1">
          <table:table-cell table:style-name="Tableau18.A3" office:value-type="string">
            <text:p text:style-name="Standard"><text:span text:style-name="T14">Singleton</text:span></text:p>
          </table:table-cell>
          <table:table-cell table:style-name="Tableau18.A3" office:value-type="string">
            <text:p text:style-name="Standard"><text:span text:style-name="T14">Une seule instance dans toute l'app</text:span></text:p>
          </table:table-cell>
          <table:table-cell table:style-name="Tableau18.A3" office:value-type="string">
            <text:p text:style-name="Standard"><text:span text:style-name="T14">Il n'y a qu'un directeur dans l'école</text:span></text:p>
          </table:table-cell>
        </table:table-row>
        <table:table-row table:style-name="Tableau18.1">
          <table:table-cell table:style-name="Tableau18.A2" office:value-type="string">
            <text:p text:style-name="Standard"><text:span text:style-name="T14">Freezed</text:span></text:p>
          </table:table-cell>
          <table:table-cell table:style-name="Tableau18.A2" office:value-type="string">
            <text:p text:style-name="Standard"><text:span text:style-name="T14">Générateur de modèles immutables Dart</text:span></text:p>
          </table:table-cell>
          <table:table-cell table:style-name="Tableau18.A2" office:value-type="string">
            <text:p text:style-name="Standard"><text:span text:style-name="T14">Robot qui fabrique les formulaires à votre place</text:span></text:p>
          </table:table-cell>
        </table:table-row>
        <table:table-row table:style-name="Tableau18.1">
          <table:table-cell table:style-name="Tableau18.A3" office:value-type="string">
            <text:p text:style-name="Standard"><text:span text:style-name="T14">copyWith()</text:span></text:p>
          </table:table-cell>
          <table:table-cell table:style-name="Tableau18.A3" office:value-type="string">
            <text:p text:style-name="Standard"><text:span text:style-name="T14">Copie d'objet avec un champ modifié</text:span></text:p>
          </table:table-cell>
          <table:table-cell table:style-name="Tableau18.A3" office:value-type="string">
            <text:p text:style-name="Standard"><text:span text:style-name="T14">Photocopier + corriger une ligne</text:span></text:p>
          </table:table-cell>
        </table:table-row>
        <table:table-row table:style-name="Tableau18.1">
          <table:table-cell table:style-name="Tableau18.A2" office:value-type="string">
            <text:p text:style-name="Standard"><text:span text:style-name="T14">Immutabilité</text:span></text:p>
          </table:table-cell>
          <table:table-cell table:style-name="Tableau18.A2" office:value-type="string">
            <text:p text:style-name="Standard"><text:span text:style-name="T14">Objet non modifiable après création</text:span></text:p>
          </table:table-cell>
          <table:table-cell table:style-name="Tableau18.A2" office:value-type="string">
            <text:p text:style-name="Standard"><text:span text:style-name="T14">Acte notarié : on ne rature pas, on refait</text:span></text:p>
          </table:table-cell>
        </table:table-row>
        <table:table-row table:style-name="Tableau18.1">
          <table:table-cell table:style-name="Tableau18.A3" office:value-type="string">
            <text:p text:style-name="Standard"><text:span text:style-name="T14">Isar</text:span></text:p>
          </table:table-cell>
          <table:table-cell table:style-name="Tableau18.A3" office:value-type="string">
            <text:p text:style-name="Standard"><text:span text:style-name="T14">Base NoSQL locale ultra-rapide sur le téléphone</text:span></text:p>
          </table:table-cell>
          <table:table-cell table:style-name="Tableau18.A3" office:value-type="string">
            <text:p text:style-name="Standard"><text:span text:style-name="T14">Carnet de notes personnel, consultable sans Wi-Fi</text:span></text:p>
          </table:table-cell>
        </table:table-row>
        <table:table-row table:style-name="Tableau18.1">
          <table:table-cell table:style-name="Tableau18.A2" office:value-type="string">
            <text:p text:style-name="Standard"><text:span text:style-name="T14">NoSQL</text:span></text:p>
          </table:table-cell>
          <table:table-cell table:style-name="Tableau18.A2" office:value-type="string">
            <text:p text:style-name="Standard"><text:span text:style-name="T14">Base de données sans tables SQL — documents entiers</text:span></text:p>
          </table:table-cell>
          <table:table-cell table:style-name="Tableau18.A2" office:value-type="string">
            <text:p text:style-name="Standard"><text:span text:style-name="T14">Classeur à pochettes (dossier complet) vs tableau Excel</text:span></text:p>
          </table:table-cell>
        </table:table-row>
        <table:table-row table:style-name="Tableau18.1">
          <table:table-cell table:style-name="Tableau18.A3" office:value-type="string">
            <text:p text:style-name="Standard"><text:span text:style-name="T14">Offline-first</text:span></text:p>
          </table:table-cell>
          <table:table-cell table:style-name="Tableau18.A3" office:value-type="string">
            <text:p text:style-name="Standard"><text:span text:style-name="T14">App fonctionne d'abord en local, sync ensuite</text:span></text:p>
          </table:table-cell>
          <table:table-cell table:style-name="Tableau18.A3" office:value-type="string">
            <text:p text:style-name="Standard"><text:span text:style-name="T14">Google Docs hors connexion : modifs sync au retour du réseau</text:span></text:p>
          </table:table-cell>
        </table:table-row>
        <table:table-row table:style-name="Tableau18.1">
          <table:table-cell table:style-name="Tableau18.A2" office:value-type="string">
            <text:p text:style-name="Standard"><text:span text:style-name="T14">Dénormalisation</text:span></text:p>
          </table:table-cell>
          <table:table-cell table:style-name="Tableau18.A2" office:value-type="string">
            <text:p text:style-name="Standard"><text:span text:style-name="T14">Dupliquer des données pour éviter les jointures</text:span></text:p>
          </table:table-cell>
          <table:table-cell table:style-name="Tableau18.A2" office:value-type="string">
            <text:p text:style-name="Standard"><text:span text:style-name="T14">Imprimer son adresse sur chaque carte de visite</text:span></text:p>
          </table:table-cell>
        </table:table-row>
        <table:table-row table:style-name="Tableau18.1">
          <table:table-cell table:style-name="Tableau18.A3" office:value-type="string">
            <text:p text:style-name="Standard"><text:span text:style-name="T14">3NF (3e forme normale)</text:span></text:p>
          </table:table-cell>
          <table:table-cell table:style-name="Tableau18.A3" office:value-type="string">
            <text:p text:style-name="Standard"><text:span text:style-name="T14">Règle SQL : chaque info stockée une seule fois</text:span></text:p>
          </table:table-cell>
          <table:table-cell table:style-name="Tableau18.A3" office:value-type="string">
            <text:p text:style-name="Standard"><text:span text:style-name="T14">Annuaire : chaque numéro apparaît une fois</text:span></text:p>
          </table:table-cell>
        </table:table-row>
        <table:table-row table:style-name="Tableau18.1">
          <table:table-cell table:style-name="Tableau18.A2" office:value-type="string">
            <text:p text:style-name="Standard"><text:span text:style-name="T14">Clé primaire (PK)</text:span></text:p>
          </table:table-cell>
          <table:table-cell table:style-name="Tableau18.A2" office:value-type="string">
            <text:p text:style-name="Standard"><text:span text:style-name="T14">Identifiant unique de chaque enregistrement</text:span></text:p>
          </table:table-cell>
          <table:table-cell table:style-name="Tableau18.A2" office:value-type="string">
            <text:p text:style-name="Standard"><text:span text:style-name="T14">Numéro de sécurité sociale</text:span></text:p>
          </table:table-cell>
        </table:table-row>
        <table:table-row table:style-name="Tableau18.1">
          <table:table-cell table:style-name="Tableau18.A3" office:value-type="string">
            <text:p text:style-name="Standard"><text:span text:style-name="T14">Clé étrangère (FK)</text:span></text:p>
          </table:table-cell>
          <table:table-cell table:style-name="Tableau18.A3" office:value-type="string">
            <text:p text:style-name="Standard"><text:span text:style-name="T14">Référence vers la PK d'une autre table</text:span></text:p>
          </table:table-cell>
          <table:table-cell table:style-name="Tableau18.A3" office:value-type="string">
            <text:p text:style-name="Standard"><text:span text:style-name="T14">Numéro de dossier sur une facture</text:span></text:p>
          </table:table-cell>
        </table:table-row>
        <table:table-row table:style-name="Tableau18.1">
          <table:table-cell table:style-name="Tableau18.A2" office:value-type="string">
            <text:p text:style-name="Standard"><text:span text:style-name="T14">MCD</text:span></text:p>
          </table:table-cell>
          <table:table-cell table:style-name="Tableau18.A2" office:value-type="string">
            <text:p text:style-name="Standard"><text:span text:style-name="T14">Modèle Conceptuel de Données (Merise)</text:span></text:p>
          </table:table-cell>
          <table:table-cell table:style-name="Tableau18.A2" office:value-type="string">
            <text:p text:style-name="Standard"><text:span text:style-name="T14">Scénario de film : personnages et relations</text:span></text:p>
          </table:table-cell>
        </table:table-row>
        <table:table-row table:style-name="Tableau18.1">
          <table:table-cell table:style-name="Tableau18.A3" office:value-type="string">
            <text:p text:style-name="Standard"><text:span text:style-name="T14">MLD</text:span></text:p>
          </table:table-cell>
          <table:table-cell table:style-name="Tableau18.A3" office:value-type="string">
            <text:p text:style-name="Standard"><text:span text:style-name="T14">Modèle Logique de Données — tables SQL</text:span></text:p>
          </table:table-cell>
          <table:table-cell table:style-name="Tableau18.A3" office:value-type="string">
            <text:p text:style-name="Standard"><text:span text:style-name="T14">Plan détaillé de l'entrepôt : étagères et dimensions</text:span></text:p>
          </table:table-cell>
        </table:table-row>
        <table:table-row table:style-name="Tableau18.1">
          <table:table-cell table:style-name="Tableau18.A2" office:value-type="string">
            <text:p text:style-name="Standard"><text:span text:style-name="T14">ERD</text:span></text:p>
          </table:table-cell>
          <table:table-cell table:style-name="Tableau18.A2" office:value-type="string">
            <text:p text:style-name="Standard"><text:span text:style-name="T14">Entity-Relationship Diagram — schéma réel implémenté</text:span></text:p>
          </table:table-cell>
          <table:table-cell table:style-name="Tableau18.A2" office:value-type="string">
            <text:p text:style-name="Standard"><text:span text:style-name="T14">Plan d'exécution du chantier</text:span></text:p>
          </table:table-cell>
        </table:table-row>
        <table:table-row table:style-name="Tableau18.1">
          <table:table-cell table:style-name="Tableau18.A3" office:value-type="string">
            <text:p text:style-name="Standard"><text:span text:style-name="T14">Swimlane</text:span></text:p>
          </table:table-cell>
          <table:table-cell table:style-name="Tableau18.A3" office:value-type="string">
            <text:p text:style-name="Standard"><text:span text:style-name="T14">Couloir d'un diagramme d'activité (1 acteur = 1 couloir)</text:span></text:p>
          </table:table-cell>
          <table:table-cell table:style-name="Tableau18.A3" office:value-type="string">
            <text:p text:style-name="Standard"><text:span text:style-name="T14">Couloir de natation : chaque nageur dans le sien</text:span></text:p>
          </table:table-cell>
        </table:table-row>
        <table:table-row table:style-name="Tableau18.1">
          <table:table-cell table:style-name="Tableau18.A2" office:value-type="string">
            <text:p text:style-name="Standard"><text:span text:style-name="T14">Fork/Join UML</text:span></text:p>
          </table:table-cell>
          <table:table-cell table:style-name="Tableau18.A2" office:value-type="string">
            <text:p text:style-name="Standard"><text:span text:style-name="T14">Fork = divise en branches, Join = les réunit</text:span></text:p>
          </table:table-cell>
          <table:table-cell table:style-name="Tableau18.A2" office:value-type="string">
            <text:p text:style-name="Standard"><text:span text:style-name="T14">Bifurcation sur une route puis convergence</text:span></text:p>
          </table:table-cell>
        </table:table-row>
        <table:table-row table:style-name="Tableau18.1">
          <table:table-cell table:style-name="Tableau18.A3" office:value-type="string">
            <text:p text:style-name="Standard"><text:span text:style-name="T14">Cardinalité 1,N</text:span></text:p>
          </table:table-cell>
          <table:table-cell table:style-name="Tableau18.A3" office:value-type="string">
            <text:p text:style-name="Standard"><text:span text:style-name="T14">Un élément à un ou plusieurs éléments</text:span></text:p>
          </table:table-cell>
          <table:table-cell table:style-name="Tableau18.A3" office:value-type="string">
            <text:p text:style-name="Standard"><text:span text:style-name="T14">1 parent a N enfants</text:span></text:p>
          </table:table-cell>
        </table:table-row>
        <text:soft-page-break/>
        <table:table-row table:style-name="Tableau18.1">
          <table:table-cell table:style-name="Tableau18.A2" office:value-type="string">
            <text:p text:style-name="Standard"><text:span text:style-name="T14">HMAC-SHA256</text:span></text:p>
          </table:table-cell>
          <table:table-cell table:style-name="Tableau18.A2" office:value-type="string">
            <text:p text:style-name="Standard"><text:span text:style-name="T14">Signature cryptographique d'un message avec clé secrète</text:span></text:p>
          </table:table-cell>
          <table:table-cell table:style-name="Tableau18.A2" office:value-type="string">
            <text:p text:style-name="Standard"><text:span text:style-name="T14">Sceau royal : prouve l'origine, impossible à reproduire sans le sceau</text:span></text:p>
          </table:table-cell>
        </table:table-row>
        <table:table-row table:style-name="Tableau18.1">
          <table:table-cell table:style-name="Tableau18.A3" office:value-type="string">
            <text:p text:style-name="Standard"><text:span text:style-name="T14">AES-256</text:span></text:p>
          </table:table-cell>
          <table:table-cell table:style-name="Tableau18.A3" office:value-type="string">
            <text:p text:style-name="Standard"><text:span text:style-name="T14">Algorithme de chiffrement 256 bits — standard militaire</text:span></text:p>
          </table:table-cell>
          <table:table-cell table:style-name="Tableau18.A3" office:value-type="string">
            <text:p text:style-name="Standard"><text:span text:style-name="T14">Coffre-fort à combinaison complexe</text:span></text:p>
          </table:table-cell>
        </table:table-row>
        <table:table-row table:style-name="Tableau18.1">
          <table:table-cell table:style-name="Tableau18.A2" office:value-type="string">
            <text:p text:style-name="Standard"><text:span text:style-name="T14">JWT</text:span></text:p>
          </table:table-cell>
          <table:table-cell table:style-name="Tableau18.A2" office:value-type="string">
            <text:p text:style-name="Standard"><text:span text:style-name="T14">Jeton d'authentification signé</text:span></text:p>
          </table:table-cell>
          <table:table-cell table:style-name="Tableau18.A2" office:value-type="string">
            <text:p text:style-name="Standard"><text:span text:style-name="T14">Bracelet VIP : prouve votre identité sans re-montrer la carte bancaire</text:span></text:p>
          </table:table-cell>
        </table:table-row>
        <table:table-row table:style-name="Tableau18.1">
          <table:table-cell table:style-name="Tableau18.A3" office:value-type="string">
            <text:p text:style-name="Standard"><text:span text:style-name="T14">TLS 1.3</text:span></text:p>
          </table:table-cell>
          <table:table-cell table:style-name="Tableau18.A3" office:value-type="string">
            <text:p text:style-name="Standard"><text:span text:style-name="T14">Protocole de chiffrement des communications internet</text:span></text:p>
          </table:table-cell>
          <table:table-cell table:style-name="Tableau18.A3" office:value-type="string">
            <text:p text:style-name="Standard"><text:span text:style-name="T14">Tunnel blindé entre le téléphone et le serveur</text:span></text:p>
          </table:table-cell>
        </table:table-row>
        <table:table-row table:style-name="Tableau18.1">
          <table:table-cell table:style-name="Tableau18.A2" office:value-type="string">
            <text:p text:style-name="Standard"><text:span text:style-name="T14">Firebase</text:span></text:p>
          </table:table-cell>
          <table:table-cell table:style-name="Tableau18.A2" office:value-type="string">
            <text:p text:style-name="Standard"><text:span text:style-name="T14">Plateforme Google : Auth + BDD cloud + notifications</text:span></text:p>
          </table:table-cell>
          <table:table-cell table:style-name="Tableau18.A2" office:value-type="string">
            <text:p text:style-name="Standard"><text:span text:style-name="T14">Couteau suisse du développeur</text:span></text:p>
          </table:table-cell>
        </table:table-row>
        <table:table-row table:style-name="Tableau18.1">
          <table:table-cell table:style-name="Tableau18.A3" office:value-type="string">
            <text:p text:style-name="Standard"><text:span text:style-name="T14">Stripe</text:span></text:p>
          </table:table-cell>
          <table:table-cell table:style-name="Tableau18.A3" office:value-type="string">
            <text:p text:style-name="Standard"><text:span text:style-name="T14">Service de paiement certifié PCI-DSS</text:span></text:p>
          </table:table-cell>
          <table:table-cell table:style-name="Tableau18.A3" office:value-type="string">
            <text:p text:style-name="Standard"><text:span text:style-name="T14">Notaire pour les paiements : il certifie, vous ne gérez pas</text:span></text:p>
          </table:table-cell>
        </table:table-row>
        <table:table-row table:style-name="Tableau18.1">
          <table:table-cell table:style-name="Tableau18.A2" office:value-type="string">
            <text:p text:style-name="Standard"><text:span text:style-name="T14">RGPD</text:span></text:p>
          </table:table-cell>
          <table:table-cell table:style-name="Tableau18.A2" office:value-type="string">
            <text:p text:style-name="Standard"><text:span text:style-name="T14">Règlement européen sur la protection des données</text:span></text:p>
          </table:table-cell>
          <table:table-cell table:style-name="Tableau18.A2" office:value-type="string">
            <text:p text:style-name="Standard"><text:span text:style-name="T14">Droit des citoyens : savoir, corriger, supprimer leurs données</text:span></text:p>
          </table:table-cell>
        </table:table-row>
        <table:table-row table:style-name="Tableau18.1">
          <table:table-cell table:style-name="Tableau18.A3" office:value-type="string">
            <text:p text:style-name="Standard"><text:span text:style-name="T14">Privacy by Design</text:span></text:p>
          </table:table-cell>
          <table:table-cell table:style-name="Tableau18.A3" office:value-type="string">
            <text:p text:style-name="Standard"><text:span text:style-name="T14">Protection vie privée intégrée dès la conception</text:span></text:p>
          </table:table-cell>
          <table:table-cell table:style-name="Tableau18.A3" office:value-type="string">
            <text:p text:style-name="Standard"><text:span text:style-name="T14">Construire des volets dès le départ, pas les rajouter après</text:span></text:p>
          </table:table-cell>
        </table:table-row>
        <table:table-row table:style-name="Tableau18.1">
          <table:table-cell table:style-name="Tableau18.A2" office:value-type="string">
            <text:p text:style-name="Standard"><text:span text:style-name="T14">MVP</text:span></text:p>
          </table:table-cell>
          <table:table-cell table:style-name="Tableau18.A2" office:value-type="string">
            <text:p text:style-name="Standard"><text:span text:style-name="T14">Version minimale qui apporte déjà de la valeur</text:span></text:p>
          </table:table-cell>
          <table:table-cell table:style-name="Tableau18.A2" office:value-type="string">
            <text:p text:style-name="Standard"><text:span text:style-name="T14">Food truck avant d'ouvrir le restaurant</text:span></text:p>
          </table:table-cell>
        </table:table-row>
        <table:table-row table:style-name="Tableau18.1">
          <table:table-cell table:style-name="Tableau18.A3" office:value-type="string">
            <text:p text:style-name="Standard"><text:span text:style-name="T14">MoSCoW</text:span></text:p>
          </table:table-cell>
          <table:table-cell table:style-name="Tableau18.A3" office:value-type="string">
            <text:p text:style-name="Standard"><text:span text:style-name="T14">Méthode priorisation : Must/Should/Could/Won't Have</text:span></text:p>
          </table:table-cell>
          <table:table-cell table:style-name="Tableau18.A3" office:value-type="string">
            <text:p text:style-name="Standard"><text:span text:style-name="T14">Valise : essentiel en cabine, reste en soute</text:span></text:p>
          </table:table-cell>
        </table:table-row>
        <table:table-row table:style-name="Tableau18.1">
          <table:table-cell table:style-name="Tableau18.A2" office:value-type="string">
            <text:p text:style-name="Standard"><text:span text:style-name="T14">Sprint</text:span></text:p>
          </table:table-cell>
          <table:table-cell table:style-name="Tableau18.A2" office:value-type="string">
            <text:p text:style-name="Standard"><text:span text:style-name="T14">Période de travail courte (2 semaines) → livrable fonctionnel</text:span></text:p>
          </table:table-cell>
          <table:table-cell table:style-name="Tableau18.A2" office:value-type="string">
            <text:p text:style-name="Standard"><text:span text:style-name="T14">Écrire et publier un chapitre avant le suivant</text:span></text:p>
          </table:table-cell>
        </table:table-row>
        <table:table-row table:style-name="Tableau18.1">
          <table:table-cell table:style-name="Tableau18.A3" office:value-type="string">
            <text:p text:style-name="Standard"><text:span text:style-name="T14">Backlog</text:span></text:p>
          </table:table-cell>
          <table:table-cell table:style-name="Tableau18.A3" office:value-type="string">
            <text:p text:style-name="Standard"><text:span text:style-name="T14">Liste priorisée de tâches restantes</text:span></text:p>
          </table:table-cell>
          <table:table-cell table:style-name="Tableau18.A3" office:value-type="string">
            <text:p text:style-name="Standard"><text:span text:style-name="T14">Pile de dossiers 'à traiter' classée par urgence</text:span></text:p>
          </table:table-cell>
        </table:table-row>
      </table:table>
      <text:p text:style-name="Standard"/>
      <text:h text:style-name="P1" text:outline-level="1"><text:bookmark-start text:name="__RefHeading__7091_930615432"/>5. Checklist — Le jour J<text:bookmark-end text:name="__RefHeading__7091_930615432"/></text:h>
      <text:p text:style-name="P9"/>
      <table:table table:name="Tableau19" table:style-name="Tableau19">
        <table:table-column table:style-name="Tableau19.A"/>
        <table:table-row table:style-name="Tableau19.1">
          <table:table-cell table:style-name="Tableau19.A1" office:value-type="string">
            <text:p text:style-name="Standard"><text:span text:style-name="T8">☐ La veille</text:span></text:p>
          </table:table-cell>
        </table:table-row>
        <table:table-row table:style-name="Tableau19.1">
          <table:table-cell table:style-name="Tableau19.A2" office:value-type="string">
            <text:p text:style-name="Standard"><text:span text:style-name="T12">☐ <text:s/>Relire cette feuille 1 fois complète</text:span></text:p>
          </table:table-cell>
        </table:table-row>
        <table:table-row table:style-name="Tableau19.1">
          <table:table-cell table:style-name="Tableau19.A2" office:value-type="string">
            <text:p text:style-name="Standard"><text:span text:style-name="T12">☐ <text:s/>Faire 1 passage oral chrono (viser 7'30'')</text:span></text:p>
          </table:table-cell>
        </table:table-row>
        <table:table-row table:style-name="Tableau19.1">
          <table:table-cell table:style-name="Tableau19.A2" office:value-type="string">
            <text:p text:style-name="Standard"><text:span text:style-name="T12">☐ <text:s/>Vérifier que le PowerPoint s'ouvre sur l'ordi de présentation</text:span></text:p>
          </table:table-cell>
        </table:table-row>
        <table:table-row table:style-name="Tableau19.1">
          <table:table-cell table:style-name="Tableau19.A2" office:value-type="string">
            <text:p text:style-name="Standard"><text:span text:style-name="T12">☐ <text:s/>Vérifier que le fichier draw.io s'ouvre dans app.diagrams.net</text:span></text:p>
          </table:table-cell>
        </table:table-row>
        <table:table-row table:style-name="Tableau19.1">
          <table:table-cell table:style-name="Tableau19.A2" office:value-type="string">
            <text:p text:style-name="Standard"><text:span text:style-name="T12">☐ <text:s/>Préparer une réponse pour 'que changeriez-vous ?' et 'quel KPI clé ?'</text:span></text:p>
          </table:table-cell>
        </table:table-row>
        <table:table-row table:style-name="Tableau19.1">
          <table:table-cell table:style-name="Tableau19.A2" office:value-type="string">
            <text:p text:style-name="Standard"><text:span text:style-name="T12">☐ <text:s/>Dormir 7h minimum — la mémoire consolide pendant le sommeil</text:span></text:p>
          </table:table-cell>
        </table:table-row>
      </table:table>
      <text:p text:style-name="P17"/>
      <table:table table:name="Tableau20" table:style-name="Tableau20">
        <table:table-column table:style-name="Tableau20.A"/>
        <table:table-row table:style-name="Tableau20.1">
          <table:table-cell table:style-name="Tableau20.A1" office:value-type="string">
            <text:p text:style-name="Standard"><text:span text:style-name="T8">☐ Le matin</text:span></text:p>
          </table:table-cell>
        </table:table-row>
        <table:table-row table:style-name="Tableau20.1">
          <table:table-cell table:style-name="Tableau20.A2" office:value-type="string">
            <text:p text:style-name="Standard"><text:span text:style-name="T12">☐ <text:s/>Relire la section '5 messages à retenir absolument'</text:span></text:p>
          </table:table-cell>
        </table:table-row>
        <table:table-row table:style-name="Tableau20.1">
          <table:table-cell table:style-name="Tableau20.A2" office:value-type="string">
            <text:p text:style-name="Standard"><text:span text:style-name="T12">☐ <text:s/>Relire les 8 questions pièges et leurs réponses</text:span></text:p>
          </table:table-cell>
        </table:table-row>
        <table:table-row table:style-name="Tableau20.1">
          <table:table-cell table:style-name="Tableau20.A2" office:value-type="string">
            <text:p text:style-name="Standard"><text:span text:style-name="T12">☐ <text:s/>Relire le glossaire éclair (5-10 min)</text:span></text:p>
          </table:table-cell>
        </table:table-row>
        <table:table-row table:style-name="Tableau20.1">
          <table:table-cell table:style-name="Tableau20.A2" office:value-type="string">
            <text:p text:style-name="Standard"><text:span text:style-name="T12">☐ <text:s/>Arriver 15 min en avance pour tester le matériel</text:span></text:p>
          </table:table-cell>
        </table:table-row>
        <table:table-row table:style-name="Tableau20.1">
          <table:table-cell table:style-name="Tableau20.A2" office:value-type="string">
            <text:p text:style-name="Standard"><text:span text:style-name="T12">☐ <text:s/>Avoir le fichier draw.io en backup sur clé USB ET dans le cloud</text:span></text:p>
          </table:table-cell>
        </table:table-row>
      </table:table>
      <text:p text:style-name="P17"/>
      <table:table table:name="Tableau21" table:style-name="Tableau21">
        <table:table-column table:style-name="Tableau21.A"/>
        <table:table-row table:style-name="Tableau21.1">
          <table:table-cell table:style-name="Tableau21.A1" office:value-type="string">
            <text:p text:style-name="Standard"><text:span text:style-name="T8">☐ Pendant la présentation</text:span></text:p>
          </table:table-cell>
        </table:table-row>
        <table:table-row table:style-name="Tableau21.1">
          <table:table-cell table:style-name="Tableau21.A2" office:value-type="string">
            <text:p text:style-name="Standard"><text:span text:style-name="T12">☐ <text:s/>Regarder le jury, pas l'écran</text:span></text:p>
          </table:table-cell>
        </table:table-row>
        <table:table-row table:style-name="Tableau21.1">
          <table:table-cell table:style-name="Tableau21.A2" office:value-type="string">
            <text:p text:style-name="Standard"><text:span text:style-name="T12">☐ <text:s/>Pointer les éléments du diagramme en parlant (souris ou pointeur)</text:span></text:p>
          </table:table-cell>
        </table:table-row>
        <table:table-row table:style-name="Tableau21.1">
          <table:table-cell table:style-name="Tableau21.A2" office:value-type="string">
            <text:p text:style-name="Standard"><text:span text:style-name="T12">☐ <text:s/>Ne jamais lire les slides — les slides sont un support visuel, pas un téléprompteur</text:span></text:p>
          </table:table-cell>
        </table:table-row>
        <table:table-row table:style-name="Tableau21.1">
          <table:table-cell table:style-name="Tableau21.A2" office:value-type="string">
            <text:p text:style-name="Standard"><text:span text:style-name="T12">☐ <text:s/>Parler lentement (on a toujours tendance à aller trop vite quand on est stressé)</text:span></text:p>
          </table:table-cell>
        </table:table-row>
        <table:table-row table:style-name="Tableau21.1">
          <table:table-cell table:style-name="Tableau21.A2" office:value-type="string">
            <text:p text:style-name="Standard"><text:span text:style-name="T12">☐ <text:s/>Si question difficile : 'Bonne question — laissez-moi reformuler pour être précis...'</text:span></text:p>
          </table:table-cell>
        </table:table-row>
        <table:table-row table:style-name="Tableau21.1">
          <table:table-cell table:style-name="Tableau21.A2" office:value-type="string">
            <text:p text:style-name="Standard"><text:span text:style-name="T12">☐ <text:s/>Si on ne sait pas : 'Ce point n'est pas dans le MVP V1, mais voici comment on l'aborderait...'</text:span></text:p>
          </table:table-cell>
        </table:table-row>
      </table:table>
      <text:p text:style-name="P15"/>
      <text:p text:style-name="P16"><text:span text:style-name="T3">Bonne chance à toute l'équipe Neptu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5pt" fo:language="fr" fo:country="FR" style:font-size-asian="10.5pt" style:language-asian="zh" style:country-asian="CN"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5pt" fo:language="fr" fo:country="FR" style:font-name-asian="Arial2" style:font-size-asian="10.5pt" style:language-asian="zh" style:country-asian="CN" style:font-name-complex="Arial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635cm" fo:margin-bottom="0.353cm"/>
      <style:text-properties fo:color="#7c3aed" style:font-name="Arial1" fo:font-size="18pt" fo:font-weight="bold" style:font-name-asian="Arial2" style:font-size-asian="18pt" style:font-weight-asian="bold" style:font-name-complex="Arial2"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494cm" fo:margin-bottom="0.282cm"/>
      <style:text-properties fo:color="#0f172a" style:font-name="Arial1" fo:font-size="14pt" fo:font-weight="bold" style:font-name-asian="Arial2" style:font-size-asian="14pt" style:font-weight-asian="bold" style:font-name-complex="Arial2"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353cm" fo:margin-bottom="0.212cm"/>
      <style:text-properties fo:color="#ec4899" style:font-name="Arial1" fo:font-size="12pt" fo:font-weight="bold" style:font-name-asian="Arial2" style:font-size-asian="12pt" style:font-weight-asian="bold" style:font-name-complex="Arial2" style:font-size-complex="12pt" style:font-weight-complex="bold"/>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default-outline-level="" style:list-style-name="">
      <style:paragraph-properties fo:margin-top="0cm" fo:margin-bottom="0cm" fo:line-height="10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21cm" style:type="right" style:leader-style="dotted" style:leader-text="."/>
        </style:tab-stops>
      </style:paragraph-properties>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212cm" fo:border-left="none" fo:border-right="none" fo:border-top="none" fo:border-bottom="0.009cm solid #7c3aed"/>
    </style:style>
    <style:style style:name="MP2" style:family="paragraph" style:parent-style-name="Standard">
      <style:paragraph-properties fo:text-align="center" style:justify-single-word="false" fo:padding-left="0cm" fo:padding-right="0cm" fo:padding-top="0.212cm" fo:padding-bottom="0cm" fo:border-left="none" fo:border-right="none" fo:border-top="0.004cm solid #e2e8f0" fo:border-bottom="none"/>
    </style:style>
    <style:style style:name="MT1" style:family="text">
      <style:text-properties fo:color="#7c3aed" style:font-name="Arial" fo:font-size="9pt" fo:font-weight="bold" style:font-name-asian="Arial2" style:font-size-asian="9pt" style:font-weight-asian="bold" style:font-name-complex="Arial2" style:font-size-complex="9pt" style:font-weight-complex="bold"/>
    </style:style>
    <style:style style:name="MT2" style:family="text">
      <style:text-properties fo:color="#94a3b8" style:font-name="Arial" fo:font-size="8pt" style:font-name-asian="Arial2" style:font-size-asian="8pt" style:font-name-complex="Arial2" style:font-size-complex="8pt"/>
    </style:style>
    <style:page-layout style:name="Mpm1">
      <style:page-layout-properties fo:page-width="21.001cm" fo:page-height="29.7cm" style:num-format="1" style:print-orientation="portrait" fo:margin-top="1.249cm" fo:margin-bottom="1.249cm" fo:margin-left="1.94cm" fo:margin-right="1.9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91cm" fo:margin-left="0cm" fo:margin-right="0cm" fo:margin-bottom="0.591cm" style:dynamic-spacing="true"/>
      </style:header-style>
      <style:footer-style>
        <style:header-footer-properties fo:min-height="0.691cm" fo:margin-left="0cm" fo:margin-right="0cm" fo:margin-top="0.591cm" style:dynamic-spacing="true"/>
      </style:footer-style>
    </style:page-layout>
  </office:automatic-styles>
  <office:master-styles>
    <style:master-page style:name="Standard" style:page-layout-name="Mpm1">
      <style:header>
        <text:p text:style-name="MP1"><text:span text:style-name="MT1">PULSAR</text:span><text:span text:style-name="MT2"> — Feuille de révision — Équipe Neptune</text:span></text:p>
      </style:header>
      <style:footer>
        <text:p text:style-name="MP2"><text:span text:style-name="MT2">Soutenance orale — Mai 2026 — Page </text:span><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meta:editing-cycles>1</meta:editing-cycles>
    <meta:creation-date>2026-05-25T14:43:01.370</meta:creation-date>
    <dc:date>2026-05-25T22:22:20.34</dc:date>
    <meta:document-statistic meta:table-count="21" meta:image-count="0" meta:object-count="0" meta:page-count="16" meta:paragraph-count="473" meta:word-count="5636" meta:character-count="33971"/>
    <meta:generator>OpenOffice/4.1.14$Win32 OpenOffice.org_project/4114m1$Build-9811</meta:generator>
  </office:meta>
</office:document-meta>
</file>